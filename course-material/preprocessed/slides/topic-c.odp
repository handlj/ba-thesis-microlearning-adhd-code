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draw:fill="none" fo:min-height="5.788cm" loext:decorative="false"/>
      <style:paragraph-properties style:writing-mode="lr-tb"/>
    </style:style>
    <style:style style:name="gr3" style:family="graphic" style:parent-style-name="Default_5f_1">
      <style:graphic-properties svg:stroke-color="#3465a4" draw:fill="none" draw:textarea-horizontal-align="justify" draw:textarea-vertical-align="middle" draw:auto-grow-height="false" fo:min-height="1.528cm" fo:min-width="30.026cm" loext:decorative="false"/>
    </style:style>
    <style:style style:name="gr4" style:family="graphic" style:parent-style-name="Default_5f_1">
      <style:graphic-properties svg:stroke-color="#ff1a00" draw:fill="none" draw:textarea-horizontal-align="justify" draw:textarea-vertical-align="middle" draw:auto-grow-height="false" fo:min-height="1.16cm" fo:min-width="14.232cm" loext:decorative="false"/>
    </style:style>
    <style:style style:name="gr5" style:family="graphic" style:parent-style-name="Default_5f_1">
      <style:graphic-properties svg:stroke-color="#18b200" draw:fill="none" draw:textarea-horizontal-align="justify" draw:textarea-vertical-align="middle" draw:auto-grow-height="false" fo:min-height="1.184cm" fo:min-width="17.534cm" loext:decorative="false"/>
    </style:style>
    <style:style style:name="gr6" style:family="graphic" style:parent-style-name="Default_5f_1">
      <style:graphic-properties svg:stroke-color="#ff1a00" draw:fill="none" draw:textarea-horizontal-align="justify" draw:textarea-vertical-align="middle" draw:auto-grow-height="false" fo:min-height="0.637cm" fo:min-width="11.66cm" loext:decorative="false"/>
    </style:style>
    <style:style style:name="gr7" style:family="graphic" style:parent-style-name="Default_5f_1">
      <style:graphic-properties svg:stroke-color="#18b200" draw:fill="none" draw:textarea-horizontal-align="justify" draw:textarea-vertical-align="middle" draw:auto-grow-height="false" fo:min-height="0.582cm" fo:min-width="10.297cm" loext:decorative="false"/>
    </style:style>
    <style:style style:name="gr8" style:family="graphic" style:parent-style-name="Default_5f_1">
      <style:graphic-properties svg:stroke-color="#3465a4" draw:fill="none" draw:textarea-horizontal-align="justify" draw:textarea-vertical-align="middle" draw:auto-grow-height="false" fo:min-height="0.512cm" fo:min-width="9.025cm" loext:decorative="false"/>
    </style:style>
    <style:style style:name="gr9" style:family="graphic" style:parent-style-name="Default_5f_1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6.007cm" fo:min-width="13.455cm" fo:padding-top="0.075cm" fo:padding-bottom="0.075cm" fo:padding-left="0.2cm" fo:padding-right="0.2cm" loext:decorative="false"/>
    </style:style>
    <style:style style:name="gr10" style:family="graphic" style:parent-style-name="standard">
      <style:graphic-properties draw:stroke="none" draw:fill="solid" draw:fill-color="#e0e0e0" fo:min-height="5.574cm" loext:decorative="false"/>
      <style:paragraph-properties style:writing-mode="lr-tb"/>
    </style:style>
    <style:style style:name="gr11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763cm" fo:min-width="27.44cm" loext:decorative="false"/>
    </style:style>
    <style:style style:name="gr12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846cm" fo:min-width="28.202cm" loext:decorative="false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5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Titel_20_und_20_Inhalt_5f_-outline1" style:list-style-name="L2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el_20_und_20_Inhalt_5f_-notes">
      <style:graphic-properties draw:fill-color="#ffffff" fo:min-height="12.593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e0e0e0"/>
      <style:paragraph-properties fo:margin-left="0cm" fo:margin-right="0cm" fo:margin-top="0.198cm" fo:margin-bottom="0cm" fo:line-height="100%" fo:text-align="start" fo:text-indent="0cm" style:punctuation-wrap="hanging" style:font-independent-line-spacing="true"/>
      <style:text-properties fo:font-size="28pt" fo:hyphenate="false"/>
    </style:style>
    <style:style style:name="P11" style:family="paragraph">
      <style:paragraph-properties fo:margin-left="0cm" fo:margin-right="0cm" fo:margin-top="0.398cm" fo:margin-bottom="0.2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cm" fo:margin-bottom="0.1cm" fo:line-height="100%" fo:text-indent="0cm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e0e0e0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e0e0e0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198cm" fo:margin-bottom="0cm" fo:text-indent="0cm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0pt" style:language-asian="de" style:country-asian="AT" style:font-style-asian="normal" style:font-weight-asian="bold" style:font-name-complex="Droid Sans Devanagari2" style:font-size-complex="20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#e0e0e0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/>
    </style:style>
    <style:style style:name="T2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style:font-name="Courier New" fo:background-color="#e0e0e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>
        <office:forms form:automatic-focus="false" form:apply-design-mode="false"/>
        <draw:frame draw:name="Titel 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(0): Basics von for-Schleifen</text:span></text:p>
          </draw:text-box>
        </draw:frame>
        <draw:frame draw:name="Inhaltsplatzhalter 10" presentation:style-name="pr2" draw:text-style-name="P5" draw:layer="layout" svg:width="32.993cm" svg:height="13.897cm" svg:x="2.446cm" svg:y="4.246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 text:style-name="P3"><text:span text:style-name="T2">Iterieren/Durchlaufen von Sequenzen (z. B. Listen)</text:span></text:p>
                  </text:list-item>
                  <text:list-item>
                    <text:p xml:id="id2" text:id="id2" text:style-name="P3"><text:span text:style-name="T3">FÜR</text:span><text:span text:style-name="T2"> jedes Element </text:span><text:span text:style-name="T3">IN</text:span><text:span text:style-name="T2"> Sequenz</text:span><text:span text:style-name="T3">:</text:span></text:p>
                    <text:p xml:id="id3" text:id="id3" text:style-name="P3"><text:span text:style-name="T2"><text:s text:c="5"/></text:span><text:span text:style-name="T2">Führe Anweisungen aus</text:span></text:p>
                    <text:p text:style-name="P3"><text:span text:style-name="T2"/></text:p>
                  </text:list-item>
                  <text:list-item>
                    <text:p xml:id="id4" text:id="id4" text:style-name="P3"><text:span text:style-name="T3">Python-Syntax für for-Loops (Schleifen):</text:span></text:p>
                    <text:list>
                      <text:list-header>
                        <text:p xml:id="id5" text:id="id5" text:style-name="P4"><text:span text:style-name="T4">for</text:span><text:span text:style-name="T5"> item </text:span><text:span text:style-name="T4">in</text:span><text:span text:style-name="T5"> list_of_items</text:span><text:span text:style-name="T4">:</text:span></text:p>
                        <text:p xml:id="id6" text:id="id6" text:style-name="P4"><text:span text:style-name="T5"><text:s text:c="4"/></text:span><text:span text:style-name="T5">print('This will be repeated.')</text:span></text:p>
                        <text:p text:style-name="P4"><text:span text:style-name="T6"/></text:p>
                      </text:list-header>
                    </text:list>
                  </text:list-item>
                  <text:list-item>
                    <text:p xml:id="id7" text:id="id7" text:style-name="P4"><text:span text:style-name="T2">Laufvariablen können beliebigen Namen haben</text:span></text:p>
                  </text:list-item>
                  <text:list-item>
                    <text:p xml:id="id8" text:id="id8" text:style-name="P4"><text:span text:style-name="T2">Wiederholter Code-Block mit beliebig vielen Anweisungen</text:span></text:p>
                  </text:list-item>
                </text:list>
              </text:list-item>
            </text:list>
          </draw:text-box>
        </draw:frame>
        <draw:frame draw:name="Datumsplatzhalter 9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7">Thorsten Ruprechter</text:span></text:p>
          </draw:text-box>
        </draw:frame>
        <draw:frame draw:name="Fußzeilenplatzhalter 9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8">Informatik BW</text:span></text:p>
          </draw:text-box>
        </draw:frame>
        <draw:frame draw:name="Foliennummernplatzhalter 9" presentation:style-name="pr4" draw:text-style-name="P7" draw:layer="layout" svg:width="1.696cm" svg:height="1.705cm" svg:x="-0.025cm" svg:y="1.174cm" presentation:class="page-number" presentation:user-transformed="true">
          <draw:text-box>
            <text:p text:style-name="P8"><text:span text:style-name="T9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(1): Beispiel</text:span></text:p>
          </draw:text-box>
        </draw:frame>
        <draw:frame draw:name="Inhaltsplatzhalter 11" presentation:style-name="pr6" draw:text-style-name="P10" draw:layer="layout" svg:width="32.993cm" svg:height="6.096cm" svg:x="2.046cm" svg:y="7.11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5">lectures = ['Maths', 'English', 'Computer Science']</text:span></text:p>
                    <text:p text:style-name="P3"><text:span text:style-name="T5"/></text:p>
                    <text:p text:style-name="P3"><text:span text:style-name="T4">for</text:span><text:span text:style-name="T5"> lecture </text:span><text:span text:style-name="T4">in</text:span><text:span text:style-name="T5"> lectures:</text:span></text:p>
                    <text:p text:style-name="P3"><text:span text:style-name="T5"><text:s text:c="4"/></text:span><text:span text:style-name="T4">print(</text:span><text:span text:style-name="T5">f'I love {lecture}'</text:span><text:span text:style-name="T4">)</text:span></text:p>
                  </text:list-header>
                </text:list>
              </text:list-item>
            </text:list>
          </draw:text-box>
        </draw:frame>
        <draw:frame draw:name="Datumsplatzhalter 10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7">Thorsten Ruprechter</text:span></text:p>
          </draw:text-box>
        </draw:frame>
        <draw:frame draw:name="Fußzeilenplatzhalter 10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8">Informatik BW</text:span></text:p>
          </draw:text-box>
        </draw:frame>
        <draw:frame draw:name="Foliennummernplatzhalter 10" presentation:style-name="pr4" draw:text-style-name="P7" draw:layer="layout" svg:width="1.696cm" svg:height="1.705cm" svg:x="-0.025cm" svg:y="1.174cm" presentation:class="page-number" presentation:user-transformed="true">
          <draw:text-box>
            <text:p text:style-name="P8"><text:span text:style-name="T9"><text:page-number>&lt;Foliennumm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ausgabe des aktuellen Werts in Variable lecture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Inhaltsplatzhalter 13" presentation:style-name="pr2" draw:text-style-name="P5" draw:layer="layout" svg:width="32.993cm" svg:height="13.897cm" svg:x="1.6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10">lectures</text:span><text:span text:style-name="T5"> = ['Maths', 'English', 'Computer Science']</text:span></text:p>
                    <text:p text:style-name="P3"><text:span text:style-name="T5"/></text:p>
                    <text:p text:style-name="P11"><text:span text:style-name="T4">for</text:span><text:span text:style-name="T5"> </text:span><text:span text:style-name="T11">lecture</text:span><text:span text:style-name="T5"> </text:span><text:span text:style-name="T4">in</text:span><text:span text:style-name="T5"> </text:span><text:span text:style-name="T10">lectures</text:span><text:span text:style-name="T5">:</text:span></text:p>
                    <text:p text:style-name="P11"><text:span text:style-name="T5"><text:s text:c="4"/></text:span><text:span text:style-name="T4">print(</text:span><text:span text:style-name="T5">f'I love {</text:span><text:span text:style-name="T11">lecture</text:span><text:span text:style-name="T5">}'</text:span><text:span text:style-name="T4">)</text:span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13" xml:id="id12" draw:id="id12" draw:layer="layout" svg:width="13.716cm" svg:height="6.038cm" svg:x="21.823cm" svg:y="11.976cm">
          <draw:text-box>
            <text:p text:style-name="P12"><text:span text:style-name="T12">Legende</text:span></text:p>
            <text:p text:style-name="P12"><text:span text:style-name="T13">Iterierte Sequenz (z. B. Liste)</text:span></text:p>
            <text:p text:style-name="P12"><text:span text:style-name="T14">Definition der Sequenz</text:span></text:p>
            <text:p text:style-name="P12"><text:span text:style-name="T14">for-Loop Definition (Syntax)</text:span></text:p>
            <text:p text:style-name="P12"><text:span text:style-name="T14">Wiederholter Code-Block</text:span></text:p>
            <text:p text:style-name="P12"><text:span text:style-name="T15">Lauf-/Schleifen-Variable</text:span></text:p>
          </draw:text-box>
        </draw:frame>
        <draw:frame draw:name="Titel 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(2): Beispiel</text:span></text:p>
          </draw:text-box>
        </draw:frame>
        <draw:frame draw:name="Datumsplatzhalter 11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7">Thorsten Ruprechter</text:span></text:p>
          </draw:text-box>
        </draw:frame>
        <draw:frame draw:name="Fußzeilenplatzhalter 11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8">Informatik BW</text:span></text:p>
          </draw:text-box>
        </draw:frame>
        <draw:frame draw:name="Foliennummernplatzhalter 13" presentation:style-name="pr4" draw:text-style-name="P7" draw:layer="layout" svg:width="1.696cm" svg:height="1.705cm" svg:x="-0.025cm" svg:y="1.174cm" presentation:class="page-number" presentation:user-transformed="true">
          <draw:text-box>
            <text:p text:style-name="P8"><text:span text:style-name="T9"><text:page-number>&lt;Foliennummer&gt;</text:page-number></text:span></text:p>
          </draw:text-box>
        </draw:frame>
        <draw:custom-shape draw:style-name="gr3" draw:text-style-name="P14" xml:id="id9" draw:id="id9" draw:layer="layout" svg:width="30.526cm" svg:height="1.778cm" svg:x="2.502cm" svg:y="7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xml:id="id10" draw:id="id10" draw:layer="layout" svg:width="14.732cm" svg:height="1.41cm" svg:x="2.502cm" svg:y="10.6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11" draw:id="id11" draw:layer="layout" svg:width="18.034cm" svg:height="1.434cm" svg:x="2.502cm" svg:y="12.4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13" draw:id="id13" draw:layer="layout" svg:width="12.16cm" svg:height="0.887cm" svg:x="21.93cm" svg:y="14.9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4" draw:id="id14" draw:layer="layout" svg:width="10.797cm" svg:height="0.832cm" svg:x="21.923cm" svg:y="16.0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15" draw:id="id15" draw:layer="layout" svg:width="9.525cm" svg:height="0.762cm" svg:x="21.94cm" svg:y="14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6" draw:id="id16" draw:layer="layout" svg:width="13.855cm" svg:height="6.157cm" svg:x="21.644cm" svg:y="12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9" draw:layer="layout" svg:width="17.271cm" svg:height="12.593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Code-Block, der in jedem durchlauf ausgegeben wird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3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(0): Basics</text:span></text:p>
          </draw:text-box>
        </draw:frame>
        <draw:frame draw:name="Inhaltsplatzhalter 31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7" text:id="id17" text:style-name="P15"><text:span text:style-name="T16">Ausführen von Anweisungen bis Bedingung nicht mehr erfüllt</text:span></text:p>
                    <text:list>
                      <text:list-item>
                        <text:p xml:id="id18" text:id="id18" text:style-name="P16"><text:span text:style-name="T16">„</text:span><text:span text:style-name="T16">Solange Bedingung erfüllt, führe Anweisungen aus“</text:span></text:p>
                      </text:list-item>
                    </text:list>
                    <text:p text:style-name="P3"><text:span text:style-name="T2"/></text:p>
                  </text:list-item>
                  <text:list-item>
                    <text:p xml:id="id19" text:id="id19" text:style-name="P17"><text:span text:style-name="T17">SOLANGE</text:span><text:span text:style-name="T16"> </text:span><text:span text:style-name="T18">Bedingung erfüllt</text:span><text:span text:style-name="T17">:</text:span></text:p>
                    <text:p xml:id="id20" text:id="id20" text:style-name="P17"><text:span text:style-name="T16"><text:s text:c="4"/></text:span><text:span text:style-name="T18">Führe Anweisungen aus</text:span></text:p>
                    <text:p text:style-name="P3"><text:span text:style-name="T2"/></text:p>
                  </text:list-item>
                  <text:list-item>
                    <text:p xml:id="id21" text:id="id21" text:style-name="P3"><text:span text:style-name="T3">Python-Syntax:</text:span></text:p>
                    <text:list>
                      <text:list-header>
                        <text:p xml:id="id22" text:id="id22" text:style-name="P15"><text:span text:style-name="T4">while</text:span><text:span text:style-name="T5"> </text:span><text:span text:style-name="T19">condition</text:span><text:span text:style-name="T4">:</text:span></text:p>
                        <text:p xml:id="id23" text:id="id23" text:style-name="P15"><text:span text:style-name="T5"><text:s text:c="4"/></text:span><text:span text:style-name="T5">print('Running')</text:span></text:p>
                        <text:p text:style-name="P4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Datumsplatzhalter 37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7">Thorsten Ruprechter</text:span></text:p>
          </draw:text-box>
        </draw:frame>
        <draw:frame draw:name="Fußzeilenplatzhalter 36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8">Informatik BW</text:span></text:p>
          </draw:text-box>
        </draw:frame>
        <draw:frame draw:name="Foliennummernplatzhalter 37" presentation:style-name="pr4" draw:text-style-name="P7" draw:layer="layout" svg:width="1.696cm" svg:height="1.705cm" svg:x="-0.025cm" svg:y="1.174cm" presentation:class="page-number" presentation:user-transformed="true">
          <draw:text-box>
            <text:p text:style-name="P8"><text:span text:style-name="T9"><text:page-number>&lt;Foliennummer&gt;</text:page-number></text:span></text:p>
          </draw:text-box>
        </draw:frame>
        <draw:frame draw:style-name="gr10" draw:text-style-name="P18" xml:id="id24" draw:id="id24" draw:layer="layout" svg:width="8.382cm" svg:height="5.824cm" svg:x="27.178cm" svg:y="12.392cm">
          <draw:text-box>
            <text:p><text:span text:style-name="T2">x = 0</text:span></text:p>
            <text:p><text:span text:style-name="T20">while</text:span><text:span text:style-name="T21"> x &lt; 3</text:span><text:span text:style-name="T20">:</text:span></text:p>
            <text:p><text:span text:style-name="T21"><text:s text:c="4"/></text:span><text:span text:style-name="T21">print(x)</text:span></text:p>
            <text:p><text:span text:style-name="T21"><text:s text:c="4"/></text:span><text:span text:style-name="T21">x = x + 1</text:span></text:p>
            <text:p><text:span text:style-name="T21">print(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p text:style-name="P19">Tafel danach</text:p>
            </draw:text-box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custom-shape draw:style-name="gr11" draw:text-style-name="P20" xml:id="id31" draw:id="id31" draw:layer="layout" svg:width="27.94cm" svg:height="6.013cm" svg:x="3.202cm" svg:y="11.43cm">
          <text:p/>
          <draw:enhanced-geometry svg:viewBox="0 0 21600 21600" draw:type="rectangle" draw:enhanced-path="M 0 0 L 21600 0 21600 21600 0 21600 0 0 Z N"/>
        </draw:custom-shape>
        <draw:frame draw:name="Titel 38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(1): Kombination mit User-Input</text:span></text:p>
          </draw:text-box>
        </draw:frame>
        <draw:frame draw:name="Inhaltsplatzhalter 32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25" text:id="id25" text:style-name="P3"><text:span text:style-name="T2">Möglichkeit: Ausführen bis spezieller Input</text:span></text:p>
                    <text:p text:style-name="P3"><text:span text:style-name="T2"/></text:p>
                  </text:list-item>
                  <text:list-item>
                    <text:p xml:id="id26" text:id="id26" text:style-name="P3"><text:span text:style-name="T16">Kontrolle durch </text:span><text:span text:style-name="T2">Bedingungen oder „Flags“ (= Boolean-Variable) </text:span></text:p>
                    <text:p text:style-name="P3"><text:span text:style-name="T2"/></text:p>
                    <text:p xml:id="id27" text:id="id27" text:style-name="P3"><text:span text:style-name="T5">user_input = ''</text:span></text:p>
                    <text:p xml:id="id28" text:id="id28" text:style-name="P3"><text:span text:style-name="T20">while</text:span><text:span text:style-name="T21"> user_input != 'quit':</text:span></text:p>
                    <text:p xml:id="id29" text:id="id29" text:style-name="P3"><text:span text:style-name="T5"><text:s text:c="4"/></text:span><text:span text:style-name="T21">user_input = </text:span><text:span text:style-name="T20">input(</text:span><text:span text:style-name="T21">'What are you saying?'</text:span><text:span text:style-name="T20">) </text:span></text:p>
                    <text:p xml:id="id30" text:id="id30" text:style-name="P3"><text:span text:style-name="T5"><text:s text:c="4"/></text:span><text:span text:style-name="T4">print(</text:span><text:span text:style-name="T5">user_</text:span><text:span text:style-name="T21">input</text:span><text:span text:style-name="T20">)</text:span></text:p>
                  </text:list-item>
                </text:list>
              </text:list-item>
            </text:list>
          </draw:text-box>
        </draw:frame>
        <draw:frame draw:name="Datumsplatzhalter 38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7">Thorsten Ruprechter</text:span></text:p>
          </draw:text-box>
        </draw:frame>
        <draw:frame draw:name="Fußzeilenplatzhalter 37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8">Informatik BW</text:span></text:p>
          </draw:text-box>
        </draw:frame>
        <draw:frame draw:name="Foliennummernplatzhalter 38" presentation:style-name="pr4" draw:text-style-name="P7" draw:layer="layout" svg:width="1.696cm" svg:height="1.705cm" svg:x="-0.025cm" svg:y="1.174cm" presentation:class="page-number" presentation:user-transformed="true">
          <draw:text-box>
            <text:p text:style-name="P8"><text:span text:style-name="T9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user-transformed="true">
            <draw:text-box>
              <text:p>Danach: Programmierbeispiel</text:p>
            </draw:text-box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custom-shape draw:style-name="gr12" draw:text-style-name="P20" xml:id="id35" draw:id="id35" draw:layer="layout" svg:width="28.702cm" svg:height="6.096cm" svg:x="3.256cm" svg:y="11.176cm">
          <text:p/>
          <draw:enhanced-geometry svg:viewBox="0 0 21600 21600" draw:type="rectangle" draw:enhanced-path="M 0 0 L 21600 0 21600 21600 0 21600 0 0 Z N"/>
        </draw:custom-shape>
        <draw:frame draw:name="Titel 39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(2): Endlosschleifen (Infinite Loops)</text:span></text:p>
          </draw:text-box>
        </draw:frame>
        <draw:frame draw:name="Inhaltsplatzhalter 33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32" text:id="id32" text:style-name="P17"><text:span text:style-name="T16">Programm läuft unendlich</text:span></text:p>
                    <text:list>
                      <text:list-item>
                        <text:p xml:id="id33" text:id="id33" text:style-name="P17"><text:span text:style-name="T22">while</text:span><text:span text:style-name="T23"> True</text:span></text:p>
                      </text:list-item>
                    </text:list>
                  </text:list-item>
                  <text:list-item>
                    <text:p xml:id="id34" text:id="id34" text:style-name="P17"><text:span text:style-name="T16">Abbruchbedingung durch </text:span><text:span text:style-name="T23">break</text:span></text:p>
                    <text:p text:style-name="P3"><text:span text:style-name="T2"/></text:p>
                    <text:p xml:id="id36" text:id="id36" text:style-name="P15"><text:span text:style-name="T22">while</text:span><text:span text:style-name="T23"> True:</text:span></text:p>
                    <text:p xml:id="id37" text:id="id37" text:style-name="P15"><text:span text:style-name="T23"><text:s text:c="4"/></text:span><text:span text:style-name="T23">user_input = </text:span><text:span text:style-name="T22">input(</text:span><text:span text:style-name="T23">'What are you saying?'</text:span><text:span text:style-name="T22">)</text:span><text:span text:style-name="T23"> </text:span></text:p>
                    <text:p xml:id="id38" text:id="id38" text:style-name="P15"><text:span text:style-name="T23"><text:s text:c="4"/></text:span><text:span text:style-name="T22">print(</text:span><text:span text:style-name="T23">user_input</text:span><text:span text:style-name="T22">)</text:span></text:p>
                    <text:p xml:id="id39" text:id="id39" text:style-name="P15"><text:span text:style-name="T23"><text:s text:c="4"/></text:span><text:span text:style-name="T22">if</text:span><text:span text:style-name="T23"> user_input == 'quit':</text:span></text:p>
                    <text:p xml:id="id40" text:id="id40" text:style-name="P15"><text:span text:style-name="T23"><text:s text:c="6"/></text:span><text:span text:style-name="T22">break</text:span></text:p>
                  </text:list-item>
                </text:list>
              </text:list-item>
            </text:list>
          </draw:text-box>
        </draw:frame>
        <draw:frame draw:name="Datumsplatzhalter 39" presentation:style-name="pr3" draw:text-style-name="P21" draw:layer="layout" svg:width="32.542cm" svg:height="0.607cm" svg:x="2.446cm" svg:y="19.474cm" presentation:class="date-time" presentation:user-transformed="true">
          <draw:text-box>
            <text:p text:style-name="P6"><text:span text:style-name="T7">Thorsten Ruprechter</text:span></text:p>
          </draw:text-box>
        </draw:frame>
        <draw:frame draw:name="Fußzeilenplatzhalter 38" presentation:style-name="pr3" draw:text-style-name="P21" draw:layer="layout" svg:width="32.542cm" svg:height="0.607cm" svg:x="2.446cm" svg:y="18.839cm" presentation:class="footer" presentation:user-transformed="true">
          <draw:text-box>
            <text:p text:style-name="P6"><text:span text:style-name="T8">Informatik BW</text:span></text:p>
          </draw:text-box>
        </draw:frame>
        <draw:frame draw:name="Foliennummernplatzhalter 39" presentation:style-name="pr4" draw:text-style-name="P22" draw:layer="layout" svg:width="1.696cm" svg:height="1.705cm" svg:x="-0.025cm" svg:y="1.174cm" presentation:class="page-number" presentation:user-transformed="true">
          <draw:text-box>
            <text:p text:style-name="P8"><text:span text:style-name="T9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3" draw:layer="layout" svg:width="17.271cm" svg:height="12.572cm" svg:x="2.159cm" svg:y="13.271cm" presentation:class="notes">
            <draw:text-box>
              <text:p text:style-name="P19"><text:span text:style-name="T24">True =&gt; 1==1</text:span></text:p>
            </draw:text-box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1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Loops: Keywords zum Schleifen- und Programmablauf</text:span></text:p>
          </draw:text-box>
        </draw:frame>
        <draw:frame draw:name="Inhaltsplatzhalter 5" presentation:style-name="pr2" draw:text-style-name="P5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1" text:id="id41" text:style-name="P3"><text:span text:style-name="T25">pass</text:span></text:p>
                    <text:list>
                      <text:list-item>
                        <text:p xml:id="id42" text:id="id42" text:style-name="P4"><text:span text:style-name="T2">„</text:span><text:span text:style-name="T2">leerer“ Command, tut nichts</text:span><text:span text:style-name="T2"><text:line-break/></text:span><text:span text:style-name="T2"/></text:p>
                      </text:list-item>
                    </text:list>
                  </text:list-item>
                  <text:list-item>
                    <text:p xml:id="id43" text:id="id43" text:style-name="P24"><text:span text:style-name="T26">break</text:span></text:p>
                    <text:list>
                      <text:list-item>
                        <text:p xml:id="id44" text:id="id44" text:style-name="P4"><text:span text:style-name="T2">Schleifenabbruch</text:span></text:p>
                      </text:list-item>
                      <text:list-item>
                        <text:p xml:id="id45" text:id="id45" text:style-name="P4"><text:span text:style-name="T2">Sofortiges Beenden der „innersten Schleife“</text:span><text:span text:style-name="T2"><text:line-break/></text:span><text:span text:style-name="T2"/></text:p>
                      </text:list-item>
                    </text:list>
                  </text:list-item>
                  <text:list-item>
                    <text:p xml:id="id46" text:id="id46" text:style-name="P24"><text:span text:style-name="T26">continue</text:span></text:p>
                    <text:list>
                      <text:list-item>
                        <text:p xml:id="id47" text:id="id47" text:style-name="P4"><text:span text:style-name="T2">Sprung zu nächster Iteration</text:span></text:p>
                      </text:list-item>
                      <text:list-item>
                        <text:p xml:id="id48" text:id="id48" text:style-name="P4"><text:span text:style-name="T2">Abbruch aktueller Durchlauf „innerster Schleife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7" presentation:style-name="pr3" draw:text-style-name="P7" draw:layer="layout" svg:width="32.542cm" svg:height="0.607cm" svg:x="2.446cm" svg:y="19.474cm" presentation:class="date-time" presentation:user-transformed="true">
          <draw:text-box>
            <text:p text:style-name="P6"><text:span text:style-name="T7">Thorsten Ruprechter</text:span></text:p>
          </draw:text-box>
        </draw:frame>
        <draw:frame draw:name="Fußzeilenplatzhalter 7" presentation:style-name="pr3" draw:text-style-name="P7" draw:layer="layout" svg:width="32.542cm" svg:height="0.607cm" svg:x="2.446cm" svg:y="18.839cm" presentation:class="footer" presentation:user-transformed="true">
          <draw:text-box>
            <text:p text:style-name="P6"><text:span text:style-name="T8">Informatik BW</text:span></text:p>
          </draw:text-box>
        </draw:frame>
        <draw:frame draw:name="Foliennummernplatzhalter 7" presentation:style-name="pr4" draw:text-style-name="P7" draw:layer="layout" svg:width="1.696cm" svg:height="1.705cm" svg:x="-0.025cm" svg:y="1.174cm" presentation:class="page-number" presentation:user-transformed="true">
          <draw:text-box>
            <text:p text:style-name="P8"><text:span text:style-name="T9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und eine </text:span><text:span text:style-name="MT8"><text:line-break/></text:span><text:span text:style-name="MT8">Überschrift hinzufüg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04T09:26:27.995924620</dc:date>
    <meta:editing-cycles>1149</meta:editing-cycles>
    <dc:title>Python Crash Course A</dc:title>
    <meta:editing-duration>P3DT14H38M1S</meta:editing-duration>
    <meta:generator>LibreOffice/24.2.7.2$Linux_X86_64 LibreOffice_project/420$Build-2</meta:generator>
    <meta:print-date>2019-10-08T16:20:18.516837285</meta:print-date>
    <meta:document-statistic meta:object-count="23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