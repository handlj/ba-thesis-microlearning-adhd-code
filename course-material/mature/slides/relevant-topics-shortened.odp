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0675A4140C4.png" manifest:media-type="image/png"/>
  <manifest:file-entry manifest:full-path="Pictures/100000010000040B0000040023B8C212.png" manifest:media-type="image/png"/>
  <manifest:file-entry manifest:full-path="Pictures/TablePreview1.svm" manifest:media-type=""/>
  <manifest:file-entry manifest:full-path="Pictures/1000000000000BB80000060C87567720.jpg" manifest:media-type="image/jpeg"/>
  <manifest:file-entry manifest:full-path="Pictures/100000000000012C000000A6E76EA89D.jpg" manifest:media-type="image/jpeg"/>
  <manifest:file-entry manifest:full-path="Pictures/10000000000002C50000010568046C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5f_1">
      <style:graphic-properties loext:decorative="fals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2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37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91cm" loext:decorative="false"/>
      <style:paragraph-properties style:writing-mode="lr-tb"/>
    </style:style>
    <style:style style:name="gr7" style:family="graphic" style:parent-style-name="Default_20_Drawing_20_Style_5f_2_5f_1_5f_1">
      <style:graphic-properties draw:stroke="none" draw:fill="solid" draw:fill-color="#e0e0e0" fo:min-height="3.355cm" loext:decorative="false"/>
      <style:paragraph-properties style:writing-mode="lr-tb"/>
    </style:style>
    <style:style style:name="gr8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766cm" fo:min-width="1.786cm" loext:decorative="false"/>
    </style:style>
    <style:style style:name="gr9" style:family="graphic" style:parent-style-name="Default_20_Drawing_20_Style_5f_2_5f_1_5f_1">
      <style:graphic-properties draw:stroke="none" draw:fill="none" fo:min-height="1.102cm" loext:decorative="false"/>
      <style:paragraph-properties style:writing-mode="lr-tb"/>
    </style:style>
    <style:style style:name="gr10" style:family="graphic" style:parent-style-name="Object_20_without_20_fill_5f_1_5f_1_5f_1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 loext:decorative="false"/>
    </style:style>
    <style:style style:name="gr11" style:family="graphic" style:parent-style-name="Default_20_Drawing_20_Style_5f_2_5f_1_5f_1">
      <style:graphic-properties svg:stroke-color="#fc5c00" draw:fill-color="#fc5c00" draw:textarea-horizontal-align="justify" draw:textarea-vertical-align="middle" draw:auto-grow-height="false" fo:min-height="0.912cm" fo:min-width="1.786cm" loext:decorative="false"/>
    </style:style>
    <style:style style:name="gr12" style:family="graphic" style:parent-style-name="Default_20_Drawing_20_Style_5f_2_5f_1_5f_1">
      <style:graphic-properties draw:stroke="none" draw:fill="solid" draw:fill-color="#e0e0e0" fo:min-height="4.473cm" loext:decorative="false"/>
      <style:paragraph-properties style:writing-mode="lr-tb"/>
    </style:style>
    <style:style style:name="gr13" style:family="graphic" style:parent-style-name="Default_20_Drawing_20_Style_5f_2_5f_1">
      <style:graphic-properties draw:stroke="none" draw:fill="none" fo:min-height="1.893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5.788cm" loext:decorative="false"/>
      <style:paragraph-properties style:writing-mode="lr-tb"/>
    </style:style>
    <style:style style:name="gr15" style:family="graphic" style:parent-style-name="Default_5f_1">
      <style:graphic-properties svg:stroke-color="#3465a4" draw:fill="none" draw:textarea-horizontal-align="justify" draw:textarea-vertical-align="middle" draw:auto-grow-height="false" fo:min-height="1.528cm" fo:min-width="30.026cm" loext:decorative="false"/>
    </style:style>
    <style:style style:name="gr16" style:family="graphic" style:parent-style-name="Default_5f_1">
      <style:graphic-properties svg:stroke-color="#ff1a00" draw:fill="none" draw:textarea-horizontal-align="justify" draw:textarea-vertical-align="middle" draw:auto-grow-height="false" fo:min-height="1.16cm" fo:min-width="14.232cm" loext:decorative="false"/>
    </style:style>
    <style:style style:name="gr17" style:family="graphic" style:parent-style-name="Default_5f_1">
      <style:graphic-properties svg:stroke-color="#18b200" draw:fill="none" draw:textarea-horizontal-align="justify" draw:textarea-vertical-align="middle" draw:auto-grow-height="false" fo:min-height="1.184cm" fo:min-width="17.534cm" loext:decorative="false"/>
    </style:style>
    <style:style style:name="gr18" style:family="graphic" style:parent-style-name="Default_5f_1">
      <style:graphic-properties svg:stroke-color="#ff1a00" draw:fill="none" draw:textarea-horizontal-align="justify" draw:textarea-vertical-align="middle" draw:auto-grow-height="false" fo:min-height="0.637cm" fo:min-width="11.66cm" loext:decorative="false"/>
    </style:style>
    <style:style style:name="gr19" style:family="graphic" style:parent-style-name="Default_5f_1">
      <style:graphic-properties svg:stroke-color="#18b200" draw:fill="none" draw:textarea-horizontal-align="justify" draw:textarea-vertical-align="middle" draw:auto-grow-height="false" fo:min-height="0.582cm" fo:min-width="10.297cm" loext:decorative="false"/>
    </style:style>
    <style:style style:name="gr20" style:family="graphic" style:parent-style-name="Default_5f_1">
      <style:graphic-properties svg:stroke-color="#3465a4" draw:fill="none" draw:textarea-horizontal-align="justify" draw:textarea-vertical-align="middle" draw:auto-grow-height="false" fo:min-height="0.512cm" fo:min-width="9.025cm" loext:decorative="false"/>
    </style:style>
    <style:style style:name="gr21" style:family="graphic" style:parent-style-name="Default_5f_1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007cm" fo:min-width="13.455cm" fo:padding-top="0.075cm" fo:padding-bottom="0.075cm" fo:padding-left="0.2cm" fo:padding-right="0.2cm" loext:decorative="false"/>
    </style:style>
    <style:style style:name="gr22" style:family="graphic" style:parent-style-name="standard">
      <style:graphic-properties draw:stroke="none" draw:fill="solid" draw:fill-color="#e0e0e0" fo:min-height="5.574cm" loext:decorative="false"/>
      <style:paragraph-properties style:writing-mode="lr-tb"/>
    </style:style>
    <style:style style:name="gr23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763cm" fo:min-width="27.44cm" loext:decorative="false"/>
    </style:style>
    <style:style style:name="gr24" style:family="graphic" style:parent-style-name="standard">
      <style:graphic-properties svg:stroke-color="#e0e0e0" draw:fill="solid" draw:fill-color="#e0e0e0" draw:textarea-horizontal-align="justify" draw:textarea-vertical-align="middle" draw:auto-grow-height="false" fo:min-height="5.846cm" fo:min-width="28.202cm" loext:decorative="false"/>
    </style:style>
    <style:style style:name="gr25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Default_20_Drawing_20_Style_5f_3_5f_1_5f_1">
      <style:graphic-properties draw:stroke="none" draw:fill="none" fo:min-height="10.667cm" loext:decorative="false"/>
      <style:paragraph-properties style:writing-mode="lr-tb"/>
    </style:style>
    <style:style style:name="gr27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52cm" fo:min-width="0cm" fo:padding-top="0.176cm" fo:padding-bottom="0.176cm" fo:padding-left="0.301cm" fo:padding-right="0.301cm" loext:decorative="false"/>
    </style:style>
    <style:style style:name="gr28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3.742cm" fo:min-width="0cm" fo:padding-top="0.176cm" fo:padding-bottom="0.176cm" fo:padding-left="0.301cm" fo:padding-right="0.301cm" loext:decorative="false"/>
    </style:style>
    <style:style style:name="gr29" style:family="graphic" style:parent-style-name="Default_20_Drawing_20_Style_5f_3_5f_1_5f_1">
      <style:graphic-properties svg:stroke-width="0.102cm" svg:stroke-color="#000000" draw:marker-start-width="0.356cm" draw:marker-end-width="0.356cm" draw:fill="none" draw:textarea-vertical-align="middle" draw:auto-grow-height="false" fo:min-height="0.888cm" fo:min-width="0cm" fo:padding-top="0.176cm" fo:padding-bottom="0.176cm" fo:padding-left="0.301cm" fo:padding-right="0.301cm" loext:decorative="false"/>
    </style:style>
    <style:style style:name="gr30" style:family="graphic" style:parent-style-name="Default_20_Drawing_20_Style_5f_3_5f_1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31" style:family="graphic" style:parent-style-name="Default_20_Drawing_20_Style_5f_3_5f_1_5f_1">
      <style:graphic-properties draw:stroke="none" draw:fill="solid" draw:fill-color="#e0e0e0" fo:min-height="1.12cm" loext:decorative="false"/>
      <style:paragraph-properties style:writing-mode="lr-tb"/>
    </style:style>
    <style:style style:name="gr32" style:family="graphic" style:parent-style-name="Default_20_Drawing_20_Style_5f_3_5f_1_5f_1">
      <style:graphic-properties draw:stroke="none" draw:fill="solid" draw:fill-color="#ffffff" fo:min-height="1.528cm" loext:decorative="false"/>
      <style:paragraph-properties style:writing-mode="lr-tb"/>
    </style:style>
    <style:style style:name="gr33" style:family="graphic" style:parent-style-name="Default_20_Drawing_20_Style_5f_3_5f_1">
      <style:graphic-properties draw:stroke="none" draw:fill="solid" draw:fill-color="#ffffff" fo:min-height="1.119cm" draw:shadow-offset-x="0.203cm" draw:shadow-offset-y="0.203cm" loext:decorative="false"/>
      <style:paragraph-properties style:writing-mode="lr-tb"/>
    </style:style>
    <style:style style:name="gr34" style:family="graphic" style:parent-style-name="Default_20_Drawing_20_Style_5f_3_5f_1">
      <style:graphic-properties draw:stroke="none" draw:fill="solid" draw:fill-color="#e0e0e0" fo:min-height="0.962cm" loext:decorative="false"/>
      <style:paragraph-properties style:writing-mode="lr-tb"/>
    </style:style>
    <style:style style:name="gr35" style:family="graphic" style:parent-style-name="Default_20_Drawing_20_Style_5f_3_5f_1">
      <style:graphic-properties draw:stroke="none" draw:fill="solid" draw:fill-color="#ffffff" fo:min-height="2.955cm" loext:decorative="false"/>
      <style:paragraph-properties style:writing-mode="lr-tb"/>
    </style:style>
    <style:style style:name="gr36" style:family="graphic" style:parent-style-name="Default_20_Drawing_20_Style_5f_3_5f_1">
      <style:graphic-properties draw:stroke="none" draw:fill="solid" draw:fill-color="#e0e0e0" draw:textarea-vertical-align="middle" fo:min-height="2.52cm" loext:decorative="false"/>
      <style:paragraph-properties style:writing-mode="lr-tb"/>
    </style:style>
    <style:style style:name="gr37" style:family="graphic" style:parent-style-name="Default_20_Drawing_20_Style_5f_3_5f_1">
      <style:graphic-properties draw:stroke="none" draw:fill="solid" draw:fill-color="#ffffff" fo:min-height="1.528cm" loext:decorative="false"/>
      <style:paragraph-properties style:writing-mode="lr-tb"/>
    </style:style>
    <style:style style:name="gr38" style:family="graphic" style:parent-style-name="Default_20_Drawing_20_Style_5f_3_5f_1">
      <style:graphic-properties draw:stroke="none" draw:fill="solid" draw:fill-color="#e0e0e0" fo:min-height="4.068cm" loext:decorative="false"/>
      <style:paragraph-properties style:writing-mode="lr-tb"/>
    </style:style>
    <style:style style:name="gr39" style:family="graphic" style:parent-style-name="Default_20_Drawing_20_Style_5f_3_5f_1_5f_1">
      <style:graphic-properties draw:stroke="none" draw:fill="none" fo:min-height="14.55cm" loext:decorative="false"/>
      <style:paragraph-properties style:writing-mode="lr-tb"/>
    </style:style>
    <style:style style:name="gr40" style:family="graphic" style:parent-style-name="Object_20_without_20_fill_5f_1_5f_1">
      <style:graphic-properties svg:stroke-color="#050505" draw:fill="solid" draw:textarea-vertical-align="middle" loext:decorative="false"/>
    </style:style>
    <style:style style:name="gr41" style:family="graphic" style:parent-style-name="standard">
      <style:graphic-properties draw:stroke="none" draw:fill="none" fo:min-height="14.893cm" loext:decorative="false"/>
      <style:paragraph-properties style:writing-mode="lr-tb"/>
    </style:style>
    <style:style style:name="gr42" style:family="graphic" style:parent-style-name="objectwithoutfill">
      <style:graphic-properties svg:stroke-color="#050505" draw:fill="solid" draw:textarea-vertical-align="middle" loext:decorative="false"/>
    </style:style>
    <style:style style:name="pr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pr4" style:family="presentation" style:parent-style-name="Titel_20_und_20_Inhalt_5f_-outline1" style:list-style-name="L2">
      <style:graphic-properties draw:stroke="none" svg:stroke-width="0cm" draw:fill="solid" draw:fill-color="#d3d3d3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el_20_und_20_Inhalt_5f_-notes">
      <style:graphic-properties draw:fill-color="#ffffff" fo:min-height="19.676cm" loext:decorative="false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el_20_und_20_Inhalt_5f_-outline1" style:list-style-name="L2">
      <style:graphic-properties draw:stroke="none" svg:stroke-width="0cm" draw:fill="solid" draw:fill-color="#d3d3d3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el_20_und_20_Inhalt_5f_-outline1" style:list-style-name="L2">
      <style:graphic-properties draw:stroke="none" svg:stroke-width="0cm" draw:fill="solid" draw:fill-color="#e0e0e0" draw:textarea-vertical-align="top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0_und_20_Inhalt_5f_-notes">
      <style:graphic-properties draw:fill-color="#ffffff" fo:min-height="12.593cm" loext:decorative="false"/>
      <style:paragraph-properties style:writing-mode="lr-tb"/>
    </style:style>
    <style:style style:name="pr13" style:family="presentation" style:parent-style-name="Titel_20_und_20_Inhalt_5f_-notes">
      <style:graphic-properties draw:fill-color="#ffffff" fo:min-height="14.167cm" loext:decorative="false"/>
      <style:paragraph-properties style:writing-mode="lr-tb"/>
    </style:style>
    <style:style style:name="pr14" style:family="presentation" style:parent-style-name="Titel_20_und_20_Inhalt_5f_-outline1" style:list-style-name="L2">
      <style:graphic-properties draw:stroke="none" svg:stroke-width="0cm" draw:fill="solid" draw:fill-color="#e0e0e0" draw:textarea-vertical-align="middle" draw:auto-grow-height="false" draw:fit-to-size="false" style:shrink-to-fit="false" fo:min-height="11.534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7.349cm" style:use-optimal-column-width="false"/>
    </style:style>
    <style:style style:name="co2" style:family="table-column">
      <style:table-column-properties style:column-width="9.871cm" style:use-optimal-column-width="false"/>
    </style:style>
    <style:style style:name="co3" style:family="table-column">
      <style:table-column-properties style:column-width="11.637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1.114cm" style:use-optimal-row-height="false"/>
    </style:style>
    <style:style style:name="ro3" style:family="table-row">
      <style:table-row-properties style:row-height="1.962cm" style:use-optimal-row-height="false"/>
    </style:style>
    <style:style style:name="ro4" style:family="table-row">
      <style:table-row-properties style:row-height="1.174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ourier New" fo:font-size="20pt" style:font-size-asian="20pt" style:font-size-complex="20pt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d3d3d3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ourier New" fo:font-size="28pt" fo:background-color="transparent" fo:hyphenate="false"/>
    </style:style>
    <style:style style:name="P9" style:family="paragraph">
      <style:paragraph-properties style:writing-mode="lr-tb"/>
    </style:style>
    <style:style style:name="P10" style:family="paragraph">
      <style:paragraph-properties fo:margin-left="0.6cm" fo:margin-right="0cm" fo:text-indent="-0.6cm" style:writing-mode="lr-tb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style:font-name="Courier New"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loext:graphic-properties draw:fill="none"/>
      <style:text-properties fo:background-color="#e0e0e0"/>
    </style:style>
    <style:style style:name="P21" style:family="paragraph">
      <loext:graphic-properties draw:fill-color="#ffffff"/>
    </style:style>
    <style:style style:name="P22" style:family="paragraph">
      <style:paragraph-properties fo:margin-top="0.3cm" fo:margin-bottom="0cm" style:punctuation-wrap="hanging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cm" fo:margin-bottom="0cm" fo:line-height="100%" fo:text-align="start" fo:text-indent="0cm" style:punctuation-wrap="hanging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solid" draw:fill-color="#e0e0e0"/>
      <style:paragraph-properties fo:text-align="start"/>
      <style:text-properties fo:background-color="#e0e0e0"/>
    </style:style>
    <style:style style:name="P30" style:family="paragraph">
      <loext:graphic-properties draw:fill-color="#fc5c00"/>
      <style:paragraph-properties fo:text-align="center"/>
    </style:style>
    <style:style style:name="P31" style:family="paragraph">
      <loext:graphic-properties draw:fill="none"/>
      <style:text-properties style:font-name="Arial1" fo:background-color="#fc5c00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style:paragraph-properties fo:text-align="start"/>
    </style:style>
    <style:style style:name="P35" style:family="paragraph">
      <loext:graphic-properties draw:fill="solid" draw:fill-color="#e0e0e0"/>
      <style:paragraph-properties fo:text-align="center"/>
      <style:text-properties fo:background-color="#e0e0e0"/>
    </style:style>
    <style:style style:name="P36" style:family="paragraph">
      <style:paragraph-properties fo:margin-left="0cm" fo:margin-right="0cm" fo:margin-top="0.2cm" fo:margin-bottom="0.1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solid" draw:fill-color="#d3d3d3"/>
      <style:paragraph-properties fo:margin-left="0cm" fo:margin-right="0cm" fo:margin-top="0.2cm" fo:margin-bottom="0.1cm" fo:line-height="100%" fo:text-align="start" fo:text-indent="0cm" style:punctuation-wrap="hanging" style:font-independent-line-spacing="true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8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solid" draw:fill-color="#e0e0e0"/>
      <style:paragraph-properties fo:margin-left="0cm" fo:margin-right="0cm" fo:text-align="start" fo:text-indent="0cm" style:font-independent-line-spacing="true"/>
      <style:text-properties fo:font-size="28pt" fo:background-color="#e0e0e0"/>
    </style:style>
    <style:style style:name="P40" style:family="paragraph">
      <loext:graphic-properties draw:fill="none"/>
      <style:text-properties fo:font-size="48pt" style:font-size-asian="48pt" style:font-size-complex="48pt"/>
    </style:style>
    <style:style style:name="P41" style:family="paragraph">
      <loext:graphic-properties draw:fill="solid" draw:fill-color="#e0e0e0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8pt" fo:hyphenate="false"/>
    </style:style>
    <style:style style:name="P42" style:family="paragraph">
      <style:paragraph-properties fo:margin-left="0cm" fo:margin-right="0cm" fo:margin-top="0.398cm" fo:margin-bottom="0.2cm" fo:line-height="100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cm" fo:margin-bottom="0.1cm" fo:line-height="100%" fo:text-indent="0cm"/>
    </style:style>
    <style:style style:name="P44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solid" draw:fill-color="#e0e0e0"/>
    </style:style>
    <style:style style:name="P47" style:family="paragraph">
      <loext:graphic-properties draw:fill="solid" draw:fill-color="#e0e0e0"/>
      <style:paragraph-properties fo:text-align="center"/>
    </style:style>
    <style:style style:name="P48" style:family="paragraph">
      <style:paragraph-properties fo:margin-left="0cm" fo:margin-right="0cm" fo:margin-top="0.198cm" fo:margin-bottom="0cm" fo:text-indent="0cm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solid" draw:fill-color="#ffffff"/>
      <style:text-properties fo:font-size="36pt" style:font-size-asian="36pt" style:font-size-complex="36pt"/>
    </style:style>
    <style:style style:name="P51" style:family="paragraph">
      <loext:graphic-properties draw:fill="solid" draw:fill-color="#e0e0e0"/>
      <style:paragraph-properties fo:text-align="center"/>
      <style:text-properties fo:font-size="24pt" style:font-size-asian="24pt" style:font-size-complex="24pt"/>
    </style:style>
    <style:style style:name="P52" style:family="paragraph">
      <loext:graphic-properties draw:fill="solid" draw:fill-color="#e0e0e0"/>
      <style:text-properties fo:font-size="18pt"/>
    </style:style>
    <style:style style:name="P53" style:family="paragraph">
      <style:paragraph-properties fo:margin-left="0.6cm" fo:margin-right="0cm" fo:text-indent="-0.6cm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/>
      <style:text-properties style:font-name="Courier New" fo:font-size="26pt" style:font-size-asian="26pt" style:font-size-complex="26pt"/>
    </style:style>
    <style:style style:name="T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ejaVu Sans" style:font-size-asian="28pt" style:language-asian="de" style:country-asian="AT" style:font-style-asian="normal" style:font-weight-asian="normal" style:font-name-complex="DejaVu Sans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ourier New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loext:opacity="0%" style:font-name="Courier New" fo:font-size="20pt" style:letter-kerning="true" style:font-name-asian="Droid Sans Fallback" style:font-size-asian="20pt" style:font-name-complex="Droid Sans Devanagari2" style:font-size-complex="2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Courier New" fo:background-color="#e0e0e0"/>
    </style:style>
    <style:style style:name="T18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e0e0e0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fo:text-shadow="none" style:text-underline-style="none" fo:font-weight="normal" style:letter-kerning="true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3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34pt" style:language-asian="de" style:country-asian="DE" style:font-style-asian="normal" style:font-weight-asian="normal" style:font-name-complex="Droid Sans Devanagari2" style:font-size-complex="3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f0f0f" loext:opacity="100%" style:font-name="Courier New" fo:font-size="28pt" fo:language="de" fo:country="AT" style:font-size-asian="28pt" style:language-asian="de" style:country-asian="AT" style:font-size-complex="28pt" style:language-complex="de" style:country-complex="AT"/>
    </style:style>
    <style:style style:name="T2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language="de" fo:country="AT" fo:font-style="normal" style:text-underline-style="none" fo:font-weight="normal" fo:background-color="transparent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/>
    </style:style>
    <style:style style:name="T28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1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bold" style:letter-kerning="true" fo:background-color="#e0e0e0" style:font-name-asian="Droid Sans Fallback" style:font-size-asian="28pt" style:font-style-asian="normal" style:font-weight-asian="bold" style:font-name-complex="Droid Sans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fo:background-color="#e0e0e0" style:font-name-asian="Droid Sans Fallback" style:font-size-asian="28pt" style:font-style-asian="normal" style:font-weight-asian="normal" style:font-name-complex="Droid Sans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f0f0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#fc5c00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fo:background-color="#e0e0e0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italic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italic" style:font-weight-asian="normal" style:font-name-complex="Droid Sans Devanagari2" style:font-size-complex="28pt" style:language-complex="de" style:country-complex="A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fo:text-shadow="none" style:text-underline-style="none" fo:font-weight="bold" style:letter-kerning="true" fo:background-color="transparent" style:font-name-asian="Droid Sans Fallback" style:font-size-asian="20pt" style:language-asian="de" style:country-asian="AT" style:font-style-asian="normal" style:font-weight-asian="bold" style:font-name-complex="Droid Sans Devanagari2" style:font-size-complex="20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aadcf7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transparent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language="de" fo:country="AT" fo:font-style="normal" fo:text-shadow="none" style:text-underline-style="none" fo:font-weight="normal" style:letter-kerning="true" fo:background-color="#92e285" style:font-name-asian="Droid Sans Fallback" style:font-size-asian="20pt" style:language-asian="de" style:country-asian="AT" style:font-style-asian="normal" style:font-weight-asian="normal" style:font-name-complex="Droid Sans Devanagari2" style:font-size-complex="2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bold" style:letter-kerning="true" fo:background-color="#e0e0e0" style:font-name-asian="Droid Sans Fallback" style:font-size-asian="28pt" style:language-asian="de" style:country-asian="AT" style:font-style-asian="normal" style:font-weight-asian="bold" style:font-name-complex="Droid Sans Devanagari2" style:font-size-complex="28pt" style:language-complex="de" style:country-complex="A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5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4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4pt" style:language-asian="de" style:country-asian="AT" style:font-style-asian="normal" style:font-weight-asian="normal" style:font-name-complex="Droid Sans Devanagari2" style:font-size-complex="24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de" fo:country="AT" fo:font-style="normal" fo:text-shadow="none" style:text-underline-style="none" fo:font-weight="normal" style:letter-kerning="true" fo:background-color="#e0e0e0" style:font-name-asian="Droid Sans Fallback" style:font-size-asian="28pt" style:language-asian="de" style:country-asian="AT" style:font-style-asian="normal" style:font-weight-asian="normal" style:font-name-complex="Droid Sans Devanagari2" style:font-size-complex="28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variant="normal" fo:text-transform="none" fo:color="#0f0f0f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0f0f0f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1.124cm"/>
        <style:text-properties fo:font-family="Wingdings" style:font-charset="x-symbol" fo:color="#0f0f0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_5f_" presentation:presentation-page-layout-name="AL1T0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ariablen (0)</text:span></text:p>
          </draw:text-box>
        </draw:frame>
        <draw:frame draw:name="Inhaltsplatzhalter 8" presentation:style-name="pr2" draw:text-style-name="P4" draw:layer="layout" svg:width="32.993cm" svg:height="13.897cm" svg:x="2.446cm" svg:y="3.946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 text:style-name="P3"><text:span text:style-name="T2">Label (Etikett) für Werte oder Berechnungen</text:span></text:p>
                    <text:list>
                      <text:list-item>
                        <text:p xml:id="id2" text:id="id2" text:style-name="P3"><text:span text:style-name="T2">„</text:span><text:span text:style-name="T2">Variable referenziert bestimmten Wert“</text:span></text:p>
                      </text:list-item>
                      <text:list-item>
                        <text:p xml:id="id3" text:id="id3" text:style-name="P3"><text:span text:style-name="T2">„</text:span><text:span text:style-name="T2">Platzhalter“</text:span></text:p>
                      </text:list-item>
                    </text:list>
                  </text:list-item>
                  <text:list-item>
                    <text:p xml:id="id5" text:id="id5" text:style-name="P3"><text:span text:style-name="T2">Zuweisung von Werten mit </text:span><text:span text:style-name="T3">=</text:span></text:p>
                    <text:list>
                      <text:list-item>
                        <text:p xml:id="id6" text:id="id6" text:style-name="P3"><text:span text:style-name="T4">&lt;Variablenname&gt;</text:span><text:span text:style-name="T2"> = &lt;Zugewiesener</text:span><text:span text:style-name="T4"> Wert&gt;</text:span></text:p>
                      </text:list-item>
                    </text:list>
                  </text:list-item>
                  <text:list-item>
                    <text:p xml:id="id7" text:id="id7" text:style-name="P3"><text:span text:style-name="T2">Vorübergehendes Speichern von Werten</text:span></text:p>
                    <text:list>
                      <text:list-item>
                        <text:p xml:id="id8" text:id="id8" text:style-name="P3"><text:span text:style-name="T2">„</text:span><text:span text:style-name="T2">Lebensdauer“ bis Programmende</text:span></text:p>
                      </text:list-item>
                    </text:list>
                  </text:list-item>
                  <text:list-item>
                    <text:p xml:id="id9" text:id="id9" text:style-name="P3"><text:span text:style-name="T2">Startwert notwendig, dann beliebig änderbar</text:span></text:p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name="Inhaltsplatzhalter 8" presentation:style-name="pr4" draw:text-style-name="P8" xml:id="id4" draw:id="id4" draw:layer="layout" svg:width="17.244cm" svg:height="3.439cm" svg:x="18.642cm" svg:y="15.1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7"><text:span text:style-name="T6"><text:s/></text:span><text:span text:style-name="T6">number <text:s/>= 123 <text:s text:c="12"/></text:span><text:span text:style-name="T6"><text:line-break/></text:span><text:span text:style-name="T6"> message = 'Hello World!'</text:span></text:p>
                    <text:p text:style-name="P7"><text:span text:style-name="T6"><text:s/></text:span><text:span text:style-name="T6">number2 = number <text:s text:c="6"/>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11" draw:layer="layout" svg:width="17.271cm" svg:height="19.676cm" svg:x="2.159cm" svg:y="13.271cm" presentation:class="notes" presentation:user-transformed="true">
            <draw:text-box>
              <text:p text:style-name="P9"><text:span text:style-name="T7">Analogie: Menschen </text:span><text:span text:style-name="T7">oder Personen – </text:span><text:span text:style-name="T7">haben Namen. Die </text:span><text:span text:style-name="T7">Namen sind nicht </text:span><text:span text:style-name="T7">die Menschen! </text:span><text:span text:style-name="T7">aber sie können </text:span><text:span text:style-name="T7">verwendet werden </text:span><text:span text:style-name="T7">um auf Menschen </text:span><text:span text:style-name="T7">zu verweisen. </text:span></text:p>
              <text:p text:style-name="P9"><text:span text:style-name="T7">__</text:span></text:p>
              <text:p text:style-name="P9"><text:span text:style-name="T7">Oft gibt es mehrere </text:span><text:span text:style-name="T7">Namen (z.b. </text:span><text:span text:style-name="T7">Spitznamen) um </text:span><text:span text:style-name="T7">auf eine Person zu </text:span><text:span text:style-name="T7">verweisen (siehe </text:span><text:span text:style-name="T7">zum Beispiel </text:span><text:span text:style-name="T7">spitznamen). Oder </text:span><text:span text:style-name="T7">auch andere </text:span><text:span text:style-name="T7">Begriffe für </text:span><text:span text:style-name="T7">referenzen auf </text:span><text:span text:style-name="T7">Personen: Z.b.: </text:span><text:span text:style-name="T7">vortragender = </text:span><text:span text:style-name="T7">‘Ruprechter’, </text:span><text:span text:style-name="T7">my_best_friend = </text:span><text:span text:style-name="T7">für jeden </text:span><text:span text:style-name="T7">unterschiedl.</text:span></text:p>
              <text:p text:style-name="P9"><text:span text:style-name="T7">=&gt; Tafel</text:span></text:p>
              <text:p text:style-name="P10"><text:span text:style-name="T7">__</text:span></text:p>
              <text:p text:style-name="P9"><text:span text:style-name="T7">Namen können sich </text:span><text:span text:style-name="T7">auch ändern – eine </text:span><text:span text:style-name="T7">Person kann einen </text:span><text:span text:style-name="T7">bestimmten Namen </text:span><text:span text:style-name="T7">oder Spitznamen </text:span><text:span text:style-name="T7">auch nur </text:span><text:span text:style-name="T7">bestimmte zeit </text:span><text:span text:style-name="T7">haben.</text:span></text:p>
              <text:p text:style-name="P10"><text:span text:style-name="T7">__</text:span></text:p>
              <text:p text:style-name="P9"><text:span text:style-name="T7">Außerdem hängt die </text:span><text:span text:style-name="T7">Bedeutung eines </text:span><text:span text:style-name="T7">Namens je nach </text:span><text:span text:style-name="T7">Kontext ab: </text:span><text:span text:style-name="T7">Vortragender = </text:span><text:span text:style-name="T7">Ruprechter, Physik </text:span><text:span text:style-name="T7">= ?</text:span></text:p>
              <text:p text:style-name="P9"><text:span text:style-name="T7">___</text:span></text:p>
              <text:p text:style-name="P9"><text:span text:style-name="T7">Anderes Beispiel:</text:span></text:p>
              <text:p text:style-name="P9"><text:span text:style-name="T7">mein_alter = 13</text:span><text:span text:style-name="T7"><text:line-break/></text:span><text:span text:style-name="T7">(ändert sich jedes </text:span><text:span text:style-name="T7">Jahr)</text:span></text:p>
              <text:p text:style-name="P9"><text:span text:style-name="T7">____</text:span><text:span text:style-name="T7"><text:line-break/></text:span><text:span text:style-name="T7">President! </text:span><text:span text:style-name="T7">programming</text:span></text:p>
            </draw:text-box>
          </draw:frame>
        </presentation:notes>
      </draw:page>
      <draw:page draw:name="page2" draw:style-name="dp1" draw:master-page-name="Titel_20_und_20_Inhalt_5f_">
        <office:forms form:automatic-focus="false" form:apply-design-mode="false"/>
        <draw:frame draw:name="Titel 1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Datentypen </text:span><text:span text:style-name="T1">für Variablen </text:span><text:span text:style-name="T1">(Auswahl)</text:span></text:p>
          </draw:text-box>
        </draw:frame>
        <draw:frame draw:name="Foliennummernplatzhalter 11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2" draw:layer="layout" svg:width="28.856cm" svg:height="12.881cm" svg:x="3.26cm" svg:y="4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8">Datentyp</text:span></text:p>
              </table:table-cell>
              <table:table-cell>
                <text:p text:style-name="P12"><text:span text:style-name="T8">Funktion</text:span></text:p>
              </table:table-cell>
              <table:table-cell>
                <text:p text:style-name="P12"><text:span text:style-name="T8">Beispie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int</text:span></text:p>
              </table:table-cell>
              <table:table-cell table:style-name="ce3">
                <text:p text:style-name="P14"><text:span text:style-name="T10">ganze Zahlen</text:span></text:p>
              </table:table-cell>
              <table:table-cell>
                <text:p text:style-name="P13"><text:span text:style-name="T9">x = 3 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float</text:span></text:p>
              </table:table-cell>
              <table:table-cell table:style-name="ce3">
                <text:p text:style-name="P14"><text:span text:style-name="T10">Fließkommazahlen</text:span></text:p>
              </table:table-cell>
              <table:table-cell>
                <text:p text:style-name="P13"><text:span text:style-name="T9">x = 3.0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bool</text:span></text:p>
              </table:table-cell>
              <table:table-cell table:style-name="ce3">
                <text:p text:style-name="P14"><text:span text:style-name="T10">Boolesche Werte</text:span></text:p>
              </table:table-cell>
              <table:table-cell>
                <text:p text:style-name="P13"><text:span text:style-name="T9">x = True</text:span></text:p>
                <text:p text:style-name="P13"><text:span text:style-name="T9">x = Fals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str</text:span></text:p>
              </table:table-cell>
              <table:table-cell table:style-name="ce3">
                <text:p text:style-name="P14"><text:span text:style-name="T10">Strings, Zeichenketten</text:span></text:p>
              </table:table-cell>
              <table:table-cell>
                <text:p text:style-name="P13"><text:span text:style-name="T11">x = 'Test</text:span><text:span text:style-name="T9">'</text:span></text:p>
                <text:p text:style-name="P13"><text:span text:style-name="T11">x = "Test"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tuple</text:span></text:p>
              </table:table-cell>
              <table:table-cell table:style-name="ce3">
                <text:p text:style-name="P14"><text:span text:style-name="T10">Tupel</text:span></text:p>
              </table:table-cell>
              <table:table-cell>
                <text:p text:style-name="P13"><text:span text:style-name="T9">x = (1, 2, 3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list</text:span></text:p>
              </table:table-cell>
              <table:table-cell table:style-name="ce3">
                <text:p text:style-name="P14"><text:span text:style-name="T10">Liste</text:span></text:p>
              </table:table-cell>
              <table:table-cell>
                <text:p text:style-name="P13"><text:span text:style-name="T9">x = [1, 2, 3]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dict</text:span></text:p>
              </table:table-cell>
              <table:table-cell table:style-name="ce3">
                <text:p text:style-name="P14"><text:span text:style-name="T10">Dictionary</text:span></text:p>
              </table:table-cell>
              <table:table-cell>
                <text:p text:style-name="P13"><text:span text:style-name="T12">x = {1: 'blue', 2: 'red</text:span><text:span text:style-name="T9">'}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io.TextIOWrapper</text:span></text:p>
              </table:table-cell>
              <table:table-cell table:style-name="ce3">
                <text:p text:style-name="P14"><text:span text:style-name="T10">Dateien</text:span></text:p>
              </table:table-cell>
              <table:table-cell>
                <text:p text:style-name="P13"><text:span text:style-name="T11">x = open('readme.txt</text:span><text:span text:style-name="T12">'</text:span><text:span text:style-name="T9">)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9">...</text:span></text:p>
              </table:table-cell>
              <table:table-cell table:style-name="ce3">
                <text:p text:style-name="P14"><text:span text:style-name="T10">...</text:span></text:p>
              </table:table-cell>
              <table:table-cell>
                <text:p text:style-name="P13"><text:span text:style-name="T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5" draw:layer="layout" svg:width="28.702cm" svg:height="0.962cm" svg:x="3.202cm" svg:y="17.164cm">
          <draw:text-box>
            <text:p><text:span text:style-name="T13">Tabelle 1: Kurze </text:span><text:span text:style-name="T13">Übersicht einer Auswahl </text:span><text:span text:style-name="T13">von Datentypen in </text:span><text:span text:style-name="T13">Pytho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 text:style-name="P9"><text:span text:style-name="T7">Heute: einfache </text:span><text:span text:style-name="T7">Datentypen (vier </text:span><text:span text:style-name="T7">ganz oben)</text:span></text:p>
              <text:p text:style-name="P9"><text:span text:style-name="T7">Danach: Collections : </text:span><text:span text:style-name="T7">Sammlungen von </text:span><text:span text:style-name="T7">mehreren </text:span><text:span text:style-name="T7">Datentypen</text:span></text:p>
              <text:p text:style-name="P9"><text:span text:style-name="T7"/></text:p>
              <text:p text:style-name="P9"><text:span text:style-name="T7">Daten: Temperatur </text:span><text:span text:style-name="T7">im Jänner</text:span></text:p>
              <text:p text:style-name="P9"><text:span text:style-name="T7">Sammlung: </text:span><text:span text:style-name="T7">Monatliche </text:span><text:span text:style-name="T7">Temperaturen 2020</text:span></text:p>
            </draw:text-box>
          </draw:frame>
        </presentation:notes>
      </draw:page>
      <draw:page draw:name="page3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Integer &amp; </text:span><text:span text:style-name="T1">Floating </text:span><text:span text:style-name="T1">Point </text:span><text:span text:style-name="T1">Numbers </text:span><text:span text:style-name="T1">(0):</text:span><text:span text:style-name="T1"><text:line-break/></text:span><text:span text:style-name="T1">Ganzzahlen </text:span><text:span text:style-name="T1">und </text:span><text:span text:style-name="T1">Gleitkomma</text:span><text:span text:style-name="T1">zahl</text:span></text:p>
          </draw:text-box>
        </draw:frame>
        <draw:frame draw:name="Inhaltsplatzhalter 8" presentation:style-name="pr2" draw:text-style-name="P4" draw:layer="layout" svg:width="33.915cm" svg:height="13.897cm" svg:x="1.524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 text:style-name="P16"><text:span text:style-name="T14">Integer (Ganzzahlen): </text:span></text:p>
                    <text:list>
                      <text:list-item>
                        <text:p xml:id="id11" text:id="id11" text:style-name="P17"><text:span text:style-name="T15">1</text:span><text:span text:style-name="T16">, </text:span><text:span text:style-name="T17">-13</text:span><text:span text:style-name="T16">, </text:span><text:span text:style-name="T15">15</text:span><text:span text:style-name="T16">, </text:span><text:span text:style-name="T15">-42</text:span><text:span text:style-name="T16">, </text:span><text:span text:style-name="T15">12345</text:span><text:span text:style-name="T16">, ...</text:span></text:p>
                      </text:list-item>
                    </text:list>
                  </text:list-item>
                  <text:list-item>
                    <text:p xml:id="id12" text:id="id12" text:style-name="P18"><text:span text:style-name="T18">Float (Gleitkommazahl)</text:span></text:p>
                    <text:list>
                      <text:list-item>
                        <text:p xml:id="id13" text:id="id13" text:style-name="P17"><text:span text:style-name="T17">1.3</text:span><text:span text:style-name="T18">, </text:span><text:span text:style-name="T15">3.14159</text:span><text:span text:style-name="T18">, </text:span><text:span text:style-name="T19">-42.123</text:span><text:span text:style-name="T18">, …</text:span></text:p>
                        <text:p text:style-name="P17"><text:span text:style-name="T18"/></text:p>
                      </text:list-item>
                    </text:list>
                  </text:list-item>
                  <text:list-item>
                    <text:p xml:id="id14" text:id="id14" text:style-name="P17"><text:span text:style-name="T18">Operationen</text:span></text:p>
                    <text:list>
                      <text:list-item>
                        <text:p xml:id="id15" text:id="id15" text:style-name="P17"><text:span text:style-name="T20">Addieren </text:span><text:span text:style-name="T21">(</text:span><text:span text:style-name="T22">+</text:span><text:span text:style-name="T20">), Subtrahieren </text:span><text:span text:style-name="T21">(</text:span><text:span text:style-name="T22">-</text:span><text:span text:style-name="T20">), Multiplizieren </text:span><text:span text:style-name="T21">(</text:span><text:span text:style-name="T22">*</text:span><text:span text:style-name="T20">), Dividieren </text:span><text:span text:style-name="T18">(</text:span><text:span text:style-name="T15">/</text:span><text:span text:style-name="T18">)</text:span></text:p>
                      </text:list-item>
                      <text:list-item>
                        <text:p xml:id="id18" text:id="id18" text:style-name="P17"><text:span text:style-name="T18">Exponieren (</text:span><text:span text:style-name="T15">**</text:span><text:span text:style-name="T18">)</text:span></text:p>
                      </text:list-item>
                      <text:list-item>
                        <text:p xml:id="id19" text:id="id19" text:style-name="P17"><text:span text:style-name="T18">Modulo Operator (</text:span><text:span text:style-name="T15">%</text:span><text:span text:style-name="T18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4" draw:text-style-name="P20" draw:layer="layout" svg:width="13.208cm" svg:height="2.487cm" svg:x="22.606cm" svg:y="15.901cm">
          <draw:text-box>
            <text:p xml:id="id16" text:id="id16"><text:span text:style-name="T22">number = 5 + 13 <text:s text:c="5"/></text:span></text:p>
            <text:p xml:id="id17" text:id="id17"><text:span text:style-name="T22">number_2 = number +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1" draw:layer="layout" svg:width="17.271cm" svg:height="12.572cm" svg:x="2.159cm" svg:y="13.271cm" presentation:class="notes" presentation:user-transformed="true">
            <draw:text-box>
              <text:p text:style-name="P9">Operatoren</text:p>
              <text:p text:style-name="P9">Tafel: 11 / 2 = 5.5</text:p>
              <text:p text:style-name="P9">11 % 2 = 1</text:p>
            </draw:text-box>
          </draw:frame>
        </presentation:notes>
      </draw:page>
      <draw:page draw:name="page4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3">Integer &amp; </text:span><text:span text:style-name="T23">Floating </text:span><text:span text:style-name="T23">Point </text:span><text:span text:style-name="T23">Numbers </text:span><text:span text:style-name="T1">(1):</text:span><text:span text:style-name="T1"><text:line-break/></text:span><text:span text:style-name="T1">Erweiterte </text:span><text:span text:style-name="T1">Operatoren</text:span></text:p>
          </draw:text-box>
        </draw:frame>
        <draw:frame draw:name="Inhaltsplatzhalter 8" presentation:style-name="pr2" draw:text-style-name="P4" draw:layer="layout" svg:width="32.993cm" svg:height="13.135cm" svg:x="1.705cm" svg:y="4.826cm" presentation:class="outline" presentation:user-transformed="true">
          <draw:text-box>
            <text:list text:style-name="L2">
              <text:list-item>
                <text:list>
                  <text:list-item>
                    <text:p xml:id="id20" text:id="id20" text:style-name="P16"><text:span text:style-name="T14">Grundrechnung mit direkter Zuweisung:</text:span></text:p>
                    <text:list>
                      <text:list-item>
                        <text:p xml:id="id21" text:id="id21" text:style-name="P17"><text:span text:style-name="T14">Addition (</text:span><text:span text:style-name="T15">+=</text:span><text:span text:style-name="T14">), Subtraktion (</text:span><text:span text:style-name="T17">-=</text:span><text:span text:style-name="T14">), Multiplikation (</text:span><text:span text:style-name="T17">*=</text:span><text:span text:style-name="T14">), Division (</text:span><text:span text:style-name="T17">/=</text:span><text:span text:style-name="T14">)</text:span></text:p>
                        <text:p text:style-name="P18"><text:span text:style-name="T24"/></text:p>
                        <text:p text:style-name="P18"><text:span text:style-name="T24"/></text:p>
                      </text:list-item>
                    </text:list>
                    <text:p xml:id="id22" text:id="id22" text:style-name="P18"><text:span text:style-name="T24">number = 42</text:span></text:p>
                    <text:p xml:id="id23" text:id="id23" text:style-name="P18"><text:span text:style-name="T25">number += 8</text:span></text:p>
                    <text:p xml:id="id24" text:id="id24" text:style-name="P18"><text:span text:style-name="T25">number -= 10</text:span></text:p>
                    <text:p xml:id="id25" text:id="id25" text:style-name="P18"><text:span text:style-name="T25">number /= 4</text:span></text:p>
                    <text:p xml:id="id26" text:id="id26" text:style-name="P18"><text:span text:style-name="T25">number *= 2</text:span></text:p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5" draw:text-style-name="P23" draw:layer="layout" svg:width="5.243cm" svg:height="5.623cm" svg:x="17.363cm" svg:y="12.446cm">
          <draw:text-box>
            <text:p text:style-name="P22"><text:span text:style-name="T26"/></text:p>
            <text:p text:style-name="P22"><text:span text:style-name="T26"/></text:p>
            <text:p text:style-name="P22"><text:span text:style-name="T26"/></text:p>
            <text:p text:style-name="P22"><text:span text:style-name="T26"/></text:p>
          </draw:text-box>
        </draw:frame>
        <draw:frame draw:style-name="gr6" draw:text-style-name="P23" draw:layer="layout" svg:width="12.356cm" svg:height="7.441cm" svg:x="21.024cm" svg:y="11.022cm">
          <draw:text-box>
            <text:p xml:id="id27" text:id="id27" text:style-name="P24"><text:span text:style-name="T27">number = 42</text:span></text:p>
            <text:p xml:id="id28" text:id="id28" text:style-name="P24"><text:span text:style-name="T25">number = number + 8 <text:s/></text:span></text:p>
            <text:p xml:id="id29" text:id="id29" text:style-name="P24"><text:span text:style-name="T25">number = number - 10 </text:span></text:p>
            <text:p xml:id="id30" text:id="id30" text:style-name="P24"><text:span text:style-name="T25">number = number / 4 <text:s/></text:span></text:p>
            <text:p xml:id="id31" text:id="id31" text:style-name="P24"><text:span text:style-name="T25">number = number *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</text:span><text:span text:style-name="T1">Zeichenkette</text:span><text:span text:style-name="T1">n (0)</text:span></text:p>
          </draw:text-box>
        </draw:frame>
        <draw:frame draw:name="Inhaltsplatzhalter 8" presentation:style-name="pr2" draw:text-style-name="P4" draw:layer="layout" svg:width="32.993cm" svg:height="14.74cm" svg:x="2.446cm" svg:y="3.703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6"><text:span text:style-name="T14">Text = Folge von Zeichen („Characters“)</text:span></text:p>
                  </text:list-item>
                  <text:list-item>
                    <text:p xml:id="id33" text:id="id33" text:style-name="P16"><text:span text:style-name="T2">Start und Ende gekennzeichnet mit Anführungszeichen (</text:span><text:span text:style-name="T22">"</text:span><text:span text:style-name="T14"> oder </text:span><text:span text:style-name="T15">'</text:span><text:span text:style-name="T14">)</text:span></text:p>
                    <text:p text:style-name="P16"><text:span text:style-name="T28"/></text:p>
                    <text:p xml:id="id34" text:id="id34" text:style-name="P18"><text:span text:style-name="T16">string = 'Das ist ein String'</text:span></text:p>
                    <text:p xml:id="id35" text:id="id35" text:style-name="P18"><text:span text:style-name="T16">string = "Das ist auch ein String"</text:span></text:p>
                    <text:p xml:id="id36" text:id="id36" text:style-name="P18"><text:span text:style-name="T16">string = '"Python" ist nach "Monty Python" benannt.'</text:span></text:p>
                    <text:p xml:id="id37" text:id="id37" text:style-name="P18"><text:span text:style-name="T25">string = ''</text:span><text:span text:style-name="T16">'Dies ist ein</text:span></text:p>
                    <text:list>
                      <text:list-header>
                        <text:p xml:id="id38" text:id="id38" text:style-name="P18"><text:span text:style-name="T16"><text:s text:c="3"/></text:span><text:span text:style-name="T16"><text:tab/></text:span><text:span text:style-name="T16"><text:tab/></text:span><text:span text:style-name="T16"><text:tab/></text:span><text:span text:style-name="T16">mehrzeiliger </text:span><text:span text:style-name="T25">String''</text:span><text:span text:style-name="T16">'</text:span></text:p>
                      </text:list-header>
                    </text:list>
                    <text:p xml:id="id39" text:id="id39" text:style-name="P18"><text:span text:style-name="T25">string = ""</text:span><text:span text:style-name="T16">"Dies ist auch ein</text:span></text:p>
                    <text:list>
                      <text:list-header>
                        <text:p xml:id="id40" text:id="id40" text:style-name="P18"><text:span text:style-name="T16"><text:s text:c="3"/></text:span><text:span text:style-name="T16"><text:tab/></text:span><text:span text:style-name="T16"><text:tab/></text:span><text:span text:style-name="T16"><text:tab/></text:span><text:span text:style-name="T16">mehrzeiliger </text:span><text:span text:style-name="T25">String"""</text:span></text:p>
                        <text:p text:style-name="P18"><text:span text:style-name="T14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8"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/</text:span><text:span text:style-name="T1">Zeichenkette</text:span><text:span text:style-name="T1">n (1)</text:span></text:p>
          </draw:text-box>
        </draw:frame>
        <draw:frame draw:name="Inhaltsplatzhalter 8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 text:style-name="P16"><text:span text:style-name="T2">Zugriff auf...</text:span></text:p>
                    <text:list>
                      <text:list-item>
                        <text:p xml:id="id42" text:id="id42" text:style-name="P25"><text:span text:style-name="T2">einzelne Zeichen: </text:span><text:span text:style-name="T22">[]</text:span><text:span text:style-name="T20"> </text:span><text:span text:style-name="T25">und</text:span><text:span text:style-name="T20"> Index (0-basiert!)</text:span></text:p>
                        <text:list>
                          <text:list-item>
                            <text:p xml:id="id43" text:id="id43" text:style-name="P26"><text:span text:style-name="T20">Erstes Zeichen = Index 0</text:span></text:p>
                          </text:list-item>
                          <text:list-item>
                            <text:p xml:id="id44" text:id="id44" text:style-name="P26"><text:span text:style-name="T20">Letztes Zeichen = Länge von String - 1</text:span></text:p>
                          </text:list-item>
                        </text:list>
                      </text:list-item>
                      <text:list-item>
                        <text:p xml:id="id45" text:id="id45" text:style-name="P25"><text:span text:style-name="T20">mehrere Zeichen („Slicing“): </text:span><text:span text:style-name="T22">[]</text:span><text:span text:style-name="T20">, </text:span><text:span text:style-name="T22">:</text:span><text:span text:style-name="T25"> </text:span><text:span text:style-name="T20">und Indices</text:span></text:p>
                      </text:list-item>
                      <text:list-item>
                        <text:p xml:id="id46" text:id="id46" text:style-name="P27"><text:span text:style-name="T20">Länge: </text:span><text:span text:style-name="T22">len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Strings (2): </text:span><text:span text:style-name="T1">Zugriff auf </text:span><text:span text:style-name="T1">Teil-Strings </text:span><text:span text:style-name="T1">(Slicing)</text:span></text:p>
          </draw:text-box>
        </draw:frame>
        <draw:frame draw:name="Inhaltsplatzhalter 8" presentation:style-name="pr2" draw:text-style-name="P4" draw:layer="layout" svg:width="28.034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47" text:id="id47" text:style-name="P16"><text:span text:style-name="T2">Zugriffsarten</text:span></text:p>
                    <text:list>
                      <text:list-item>
                        <text:p xml:id="id48" text:id="id48" text:style-name="P18"><text:span text:style-name="T22">string[n]</text:span></text:p>
                        <text:p xml:id="id49" text:id="id49" text:style-name="P18"><text:span text:style-name="T2">➡️ </text:span><text:span text:style-name="T22">n</text:span><text:span text:style-name="T2">-tes Zeichen (</text:span><text:span text:style-name="T22">n</text:span><text:span text:style-name="T2"> = Zahl)</text:span></text:p>
                      </text:list-item>
                      <text:list-item>
                        <text:p xml:id="id50" text:id="id50" text:style-name="P18"><text:span text:style-name="T22">string[start:ende]</text:span><text:span text:style-name="T25"> </text:span><text:span text:style-name="T2"><text:s text:c="3"/></text:span></text:p>
                        <text:p xml:id="id51" text:id="id51" text:style-name="P18"><text:span text:style-name="T2">➡️ </text:span><text:span text:style-name="T2">Zeichen von </text:span><text:span text:style-name="T22">start</text:span><text:span text:style-name="T2"> (inklusive) bis </text:span><text:span text:style-name="T22">ende</text:span><text:span text:style-name="T2"> (exklusive)</text:span></text:p>
                      </text:list-item>
                      <text:list-item>
                        <text:p xml:id="id52" text:id="id52" text:style-name="P18"><text:span text:style-name="T22">string[start:ende:schrittweite]</text:span></text:p>
                        <text:p xml:id="id53" text:id="id53" text:style-name="P18"><text:span text:style-name="T2">➡️ </text:span><text:span text:style-name="T2">Zeichen von </text:span><text:span text:style-name="T25">start</text:span><text:span text:style-name="T2"> (inklusive) bis </text:span><text:span text:style-name="T25">ende</text:span><text:span text:style-name="T2"> (exklusive) <text:s text:c="7"/>in Intervall (</text:span><text:span text:style-name="T22">schrittweite</text:span><text:span text:style-name="T25">)</text:span></text:p>
                        <text:p text:style-name="P18"><text:span text:style-name="T14"/></text:p>
                        <text:p text:style-name="P18"><text:span text:style-name="T14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8"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21" draw:layer="layout" svg:width="17.271cm" svg:height="12.572cm" svg:x="2.159cm" svg:y="13.271cm" presentation:class="notes" presentation:user-transformed="true">
            <draw:text-box>
              <text:p text:style-name="P9">Direkt mit beispiel auf Tafel!</text:p>
            </draw:text-box>
          </draw:frame>
        </presentation:notes>
      </draw:page>
      <draw:page draw:name="page8" draw:style-name="dp1" draw:master-page-name="Titel_20_und_20_Inhalt_5f_" presentation:presentation-page-layout-name="AL1T0">
        <office:forms form:automatic-focus="false" form:apply-design-mode="false"/>
        <draw:frame draw:name="Titel 2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</text:span><text:span text:style-name="T1">en (0): if </text:span><text:span text:style-name="T1">Statements</text:span></text:p>
          </draw:text-box>
        </draw:frame>
        <draw:frame draw:name="Inhaltsplatzhalter 2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54" text:id="id54" text:style-name="P16"><text:span text:style-name="T14">Überprüfen von Bedingungen, konditionelles Ausführen von Code</text:span></text:p>
                    <text:list>
                      <text:list-item>
                        <text:p xml:id="id55" text:id="id55" text:style-name="P18"><text:span text:style-name="T14">„</text:span><text:span text:style-name="T14">WENN-Bedingung“ / “WENN-DANN-Bedingung“</text:span></text:p>
                      </text:list-item>
                    </text:list>
                    <text:p text:style-name="P16"><text:span text:style-name="T14"/></text:p>
                  </text:list-item>
                  <text:list-item>
                    <text:p xml:id="id56" text:id="id56" text:style-name="P16"><text:span text:style-name="T14">„</text:span><text:span text:style-name="T29">WENN</text:span><text:span text:style-name="T14"> </text:span><text:span text:style-name="T30">Bedingung erfüllt</text:span><text:span text:style-name="T14"> </text:span><text:span text:style-name="T29">DANN</text:span><text:span text:style-name="T14"> </text:span><text:span text:style-name="T30">tu etwas</text:span><text:span text:style-name="T14">“</text:span></text:p>
                    <text:p text:style-name="P16"><text:span text:style-name="T14"/></text:p>
                  </text:list-item>
                  <text:list-item>
                    <text:p xml:id="id57" text:id="id57" text:style-name="P16"><text:span text:style-name="T14">Python Syntax:</text:span></text:p>
                    <text:p xml:id="id58" text:id="id58" text:style-name="P18"><text:span text:style-name="T31">if</text:span><text:span text:style-name="T16"> </text:span><text:span text:style-name="T32">condition</text:span><text:span text:style-name="T31">:</text:span><text:span text:style-name="T31"><text:line-break/></text:span><text:span text:style-name="T31"> <text:s text:c="3"/></text:span><text:span text:style-name="T16">print('Do something')</text:span></text:p>
                  </text:list-item>
                </text:list>
              </text:list-item>
            </text:list>
          </draw:text-box>
        </draw:frame>
        <draw:frame draw:name="Foliennummernplatzhalter 2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7" draw:text-style-name="P29" xml:id="id62" draw:id="id62" draw:layer="layout" svg:width="11.276cm" svg:height="3.605cm" svg:x="24.384cm" svg:y="14.683cm">
          <draw:text-box>
            <text:p text:style-name="P28"><text:span text:style-name="T33">if</text:span><text:span text:style-name="T34"> x &gt; 2:</text:span><text:span text:style-name="T33"><text:line-break/></text:span><text:span text:style-name="T33"> <text:s text:c="3"/></text:span><text:span text:style-name="T34">print('In if')</text:span></text:p>
            <text:p text:style-name="P28"><text:span text:style-name="T34">print('Not in if')</text:span></text:p>
          </draw:text-box>
        </draw:frame>
        <draw:custom-shape draw:style-name="gr8" draw:text-style-name="P30" xml:id="id59" draw:id="id59" draw:layer="layout" svg:width="2.286cm" svg:height="1.016cm" svg:x="3.556cm" svg:y="14.54cm">
          <text:p/>
          <draw:enhanced-geometry svg:viewBox="0 0 21600 21600" draw:type="rectangle" draw:enhanced-path="M 0 0 L 21600 0 21600 21600 0 21600 0 0 Z N"/>
        </draw:custom-shape>
        <draw:frame draw:style-name="gr9" draw:text-style-name="P31" xml:id="id60" draw:id="id60" draw:layer="layout" svg:width="12.7cm" svg:height="1.352cm" svg:x="3.302cm" svg:y="16.374cm">
          <draw:text-box>
            <text:p><text:span text:style-name="T35">4 Leerzeichen eingerückt</text:span></text:p>
          </draw:text-box>
        </draw:frame>
        <draw:polyline draw:style-name="gr10" draw:text-style-name="P32" xml:id="id61" draw:id="id61" draw:layer="layout" svg:width="0cm" svg:height="0.871cm" svg:x="4.572cm" svg:y="15.602cm" svg:viewBox="0 0 0 872" draw:points="0,872 0,0">
          <text:p/>
        </draw:polyline>
        <draw:custom-shape draw:style-name="gr11" draw:text-style-name="P30" xml:id="id63" draw:id="id63" draw:layer="layout" svg:width="2.286cm" svg:height="1.162cm" svg:x="24.638cm" svg:y="15.8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 text:style-name="P9"><text:span text:style-name="T7">12:17 spätestens </text:span><text:span text:style-name="T7">beginnen</text:span></text:p>
            </draw:text-box>
          </draw:frame>
        </presentation:notes>
      </draw:page>
      <draw:page draw:name="page9" draw:style-name="dp1" draw:master-page-name="Titel_20_und_20_Inhalt_5f_">
        <office:forms form:automatic-focus="false" form:apply-design-mode="false"/>
        <draw:frame draw:name="Titel 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</text:span><text:span text:style-name="T1">en (1): if-</text:span><text:span text:style-name="T1">else </text:span><text:span text:style-name="T1">Statements</text:span></text:p>
          </draw:text-box>
        </draw:frame>
        <draw:frame draw:name="Inhaltsplatzhalter 1" presentation:style-name="pr2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64" text:id="id64" text:style-name="P16"><text:span text:style-name="T14">if-Statement mit „Fallback“ falls Bedingung nicht erfüllt</text:span></text:p>
                    <text:list>
                      <text:list-item>
                        <text:p xml:id="id65" text:id="id65" text:style-name="P18"><text:span text:style-name="T14">„</text:span><text:span text:style-name="T14">WENN-DANN-SONST-Bedingung“</text:span></text:p>
                      </text:list-item>
                    </text:list>
                    <text:p text:style-name="P16"><text:span text:style-name="T14"/></text:p>
                  </text:list-item>
                  <text:list-item>
                    <text:p xml:id="id66" text:id="id66" text:style-name="P16"><text:span text:style-name="T2">„</text:span><text:span text:style-name="T36">WENN</text:span><text:span text:style-name="T2"> </text:span><text:span text:style-name="T30">Bedingung erfüllt</text:span><text:span text:style-name="T14"> </text:span><text:span text:style-name="T29">DANN</text:span><text:span text:style-name="T14"> </text:span><text:span text:style-name="T30">tu etwas</text:span><text:span text:style-name="T14"> </text:span><text:span text:style-name="T29">SONST</text:span><text:span text:style-name="T14"> </text:span><text:span text:style-name="T30">tu etwas anderes</text:span><text:span text:style-name="T14">“</text:span></text:p>
                    <text:p text:style-name="P16"><text:span text:style-name="T14"/></text:p>
                  </text:list-item>
                  <text:list-item>
                    <text:p xml:id="id67" text:id="id67" text:style-name="P16"><text:span text:style-name="T14">Python Syntax:</text:span></text:p>
                    <text:p xml:id="id68" text:id="id68" text:style-name="P18"><text:span text:style-name="T31">if</text:span><text:span text:style-name="T16"> </text:span><text:span text:style-name="T32">condition</text:span><text:span text:style-name="T31">:</text:span><text:span text:style-name="T31"><text:line-break/></text:span><text:span text:style-name="T31"> <text:s text:c="3"/></text:span><text:span text:style-name="T16">print('Do something')</text:span></text:p>
                    <text:p xml:id="id69" text:id="id69" text:style-name="P18"><text:span text:style-name="T31">else:</text:span><text:span text:style-name="T31"><text:line-break/></text:span><text:span text:style-name="T31"> <text:s text:c="3"/></text:span><text:span text:style-name="T16">print('Do something else')</text:span></text:p>
                  </text:list-item>
                </text:list>
              </text:list-item>
            </text:list>
          </draw:text-box>
        </draw:frame>
        <draw:frame draw:name="Foliennummernplatzhalter 1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12" draw:text-style-name="P35" xml:id="id70" draw:id="id70" draw:layer="layout" svg:width="12.446cm" svg:height="4.723cm" svg:x="23.293cm" svg:y="13.616cm">
          <draw:text-box>
            <text:p text:style-name="P33"><text:span text:style-name="T37">if</text:span><text:span text:style-name="T15"> x &gt; 2:</text:span><text:span text:style-name="T37"> <text:s text:c="11"/></text:span></text:p>
            <text:p text:style-name="P34"><text:span text:style-name="T15"><text:s text:c="4"/></text:span><text:span text:style-name="T15">print('In if')</text:span></text:p>
            <text:p text:style-name="P34"><text:span text:style-name="T37">else:</text:span></text:p>
            <text:p text:style-name="P34"><text:span text:style-name="T34"><text:s text:c="4"/></text:span><text:span text:style-name="T34">print(</text:span><text:span text:style-name="T15">'In else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7">Beispiel:</text:span></text:p>
              <text:p><text:span text:style-name="T7"/></text:p>
              <text:p><text:span text:style-name="T7">WENN ich für die </text:span><text:span text:style-name="T7">Prüfung lerne</text:span></text:p>
              <text:p><text:span text:style-name="T7">DANN bestehe ich </text:span><text:span text:style-name="T7">die LV</text:span></text:p>
              <text:p><text:span text:style-name="T7">SONST falle ich </text:span><text:span text:style-name="T7">durch</text:span></text:p>
            </draw:text-box>
          </draw:frame>
        </presentation:notes>
      </draw:page>
      <draw:page draw:name="page10" draw:style-name="dp1" draw:master-page-name="Titel_20_und_20_Inhalt_5f_">
        <office:forms form:automatic-focus="false" form:apply-design-mode="false"/>
        <draw:frame draw:name="Titel 20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</text:span><text:span text:style-name="T1">en (2): if-elif-</text:span><text:span text:style-name="T1">else </text:span><text:span text:style-name="T1">Statements</text:span></text:p>
          </draw:text-box>
        </draw:frame>
        <draw:frame draw:name="Inhaltsplatzhalter 4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71" text:id="id71" text:style-name="P16"><text:span text:style-name="T2">Mehrere Verzweigungen für kompliziertere Abfragen</text:span></text:p>
                    <text:list>
                      <text:list-item>
                        <text:p xml:id="id72" text:id="id72" text:style-name="P18"><text:span text:style-name="T2">„</text:span><text:span text:style-name="T2">WENN-DANN-SONSTWENN-DANN-SONSTWENN-…“</text:span></text:p>
                      </text:list-item>
                    </text:list>
                    <text:p xml:id="id73" text:id="id73" text:style-name="P16"><text:span text:style-name="T36"/></text:p>
                  </text:list-item>
                  <text:list-item>
                    <text:p xml:id="id74" text:id="id74" text:style-name="P16"><text:span text:style-name="T36">WENN</text:span><text:span text:style-name="T2"> </text:span><text:span text:style-name="T4">Bedingung1 erfüllt</text:span><text:span text:style-name="T2"> </text:span><text:span text:style-name="T36">DANN</text:span><text:span text:style-name="T2"> </text:span><text:span text:style-name="T4">tu etwas</text:span><text:span text:style-name="T2"> </text:span><text:span text:style-name="T14"><text:s/></text:span></text:p>
                    <text:p xml:id="id75" text:id="id75" text:style-name="P16"><text:span text:style-name="T29">SONST WENN </text:span><text:span text:style-name="T30">Bedingung2 erfüllt</text:span><text:span text:style-name="T29"> DANN </text:span><text:span text:style-name="T30">tu etwas anderes</text:span><text:span text:style-name="T14"> </text:span></text:p>
                    <text:p xml:id="id76" text:id="id76" text:style-name="P16"><text:span text:style-name="T29">SONST WENN </text:span><text:span text:style-name="T30">Bedingung3 erfüllt</text:span><text:span text:style-name="T29"> DANN </text:span><text:span text:style-name="T30">tu wieder etwas anderes </text:span></text:p>
                    <text:p xml:id="id77" text:id="id77" text:style-name="P16"><text:span text:style-name="T29">... </text:span></text:p>
                    <text:p xml:id="id78" text:id="id78" text:style-name="P16"><text:span text:style-name="T29">SONST </text:span><text:span text:style-name="T30">tu etwas völlig anderes</text:span></text:p>
                  </text:list-item>
                </text:list>
              </text:list-item>
            </text:list>
          </draw:text-box>
        </draw:frame>
        <draw:frame draw:name="Foliennummernplatzhalter 4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7">Wenn ich für die </text:span><text:span text:style-name="T7">prüfung lerne</text:span></text:p>
              <text:p><text:span text:style-name="T7"><text:s text:c="2"/></text:span><text:span text:style-name="T7">komme ich leicht </text:span><text:span text:style-name="T7">durch</text:span></text:p>
              <text:p><text:span text:style-name="T7">sonst wenn ich die </text:span><text:span text:style-name="T7">übung gut </text:span><text:span text:style-name="T7">absolviere </text:span></text:p>
              <text:p><text:span text:style-name="T7"><text:s text:c="2"/></text:span><text:span text:style-name="T7">schaffe ich die </text:span><text:span text:style-name="T7">klausur gerade so</text:span></text:p>
              <text:p><text:span text:style-name="T7">sonst falle ich durch</text:span></text:p>
            </draw:text-box>
          </draw:frame>
        </presentation:notes>
      </draw:page>
      <draw:page draw:name="page11" draw:style-name="dp1" draw:master-page-name="Titel_20_und_20_Inhalt_5f_">
        <office:forms form:automatic-focus="false" form:apply-design-mode="false"/>
        <draw:frame draw:name="Titel 2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</text:span><text:span text:style-name="T1">en (3): if-elif-</text:span><text:span text:style-name="T1">else </text:span><text:span text:style-name="T1">Statements </text:span><text:span text:style-name="T1">(Syntax)</text:span></text:p>
          </draw:text-box>
        </draw:frame>
        <draw:frame draw:name="Inhaltsplatzhalter 3" presentation:style-name="pr8" draw:text-style-name="P37" draw:layer="layout" svg:width="30.066cm" svg:height="13.234cm" svg:x="2.4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6"><text:span text:style-name="T38">if</text:span><text:span text:style-name="T25"> </text:span><text:span text:style-name="T39">condition</text:span><text:span text:style-name="T38">:</text:span></text:p>
                    <text:p text:style-name="P36"><text:span text:style-name="T25"><text:s text:c="4"/></text:span><text:span text:style-name="T25">print('Do something')</text:span></text:p>
                    <text:p text:style-name="P36"><text:span text:style-name="T38">elif</text:span><text:span text:style-name="T25"> </text:span><text:span text:style-name="T39">condition2</text:span><text:span text:style-name="T38">:</text:span></text:p>
                    <text:p text:style-name="P36"><text:span text:style-name="T25"><text:s text:c="4"/></text:span><text:span text:style-name="T25">print('Do something else')</text:span></text:p>
                    <text:p text:style-name="P36"><text:span text:style-name="T38">elif</text:span><text:span text:style-name="T25"> </text:span><text:span text:style-name="T39">condition3</text:span><text:span text:style-name="T38">:</text:span></text:p>
                    <text:p text:style-name="P36"><text:span text:style-name="T25"><text:s text:c="4"/></text:span><text:span text:style-name="T25">print('Do something different')</text:span></text:p>
                    <text:p text:style-name="P36"><text:span text:style-name="T25"><text:s text:c="4"/></text:span><text:span text:style-name="T25"># there could be more elifs below this</text:span></text:p>
                    <text:p text:style-name="P36"><text:span text:style-name="T38">else</text:span><text:span text:style-name="T25">: # optional</text:span></text:p>
                    <text:list>
                      <text:list-header>
                        <text:p text:style-name="P3"><text:span text:style-name="T25">print('Do something completely different'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3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7">ich habe 8 euro</text:span></text:p>
              <text:p><text:span text:style-name="T7"/></text:p>
              <text:p><text:span text:style-name="T7">Wenn alter &lt;= 6:</text:span></text:p>
              <text:p><text:span text:style-name="T7"><text:s text:c="2"/></text:span><text:span text:style-name="T7">Gratis, Kinderrabatt</text:span></text:p>
              <text:p><text:span text:style-name="T7">Sonst alter &lt;= 4 </text:span><text:span text:style-name="T7">euro:</text:span></text:p>
              <text:p><text:span text:style-name="T7"><text:s text:c="2"/></text:span><text:span text:style-name="T7">Kaufe 2 zuckerl</text:span></text:p>
              <text:p><text:span text:style-name="T7">Sonst wenn preis &lt;= </text:span><text:span text:style-name="T7">6 euro:</text:span></text:p>
              <text:p><text:span text:style-name="T7"><text:s text:c="2"/></text:span><text:span text:style-name="T7">Kaufe 3 zuckerl</text:span></text:p>
              <text:p><text:span text:style-name="T7">Sonst:</text:span></text:p>
              <text:p><text:span text:style-name="T7"><text:s text:c="2"/></text:span><text:span text:style-name="T7">Rabatt, kaufe 8 / 2 </text:span><text:span text:style-name="T7">zuckerl</text:span></text:p>
              <text:p><text:span text:style-name="T7"/></text:p>
              <text:p><text:span text:style-name="T7">Validierung von nur </text:span><text:span text:style-name="T7">EINEM elif</text:span></text:p>
            </draw:text-box>
          </draw:frame>
        </presentation:notes>
      </draw:page>
      <draw:page draw:name="page12" draw:style-name="dp1" draw:master-page-name="Titel_20_und_20_Inhalt_5f_">
        <office:forms form:automatic-focus="false" form:apply-design-mode="false"/>
        <draw:frame draw:name="Titel 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Verzweigung</text:span><text:span text:style-name="T1">en (4): if-elif-</text:span><text:span text:style-name="T1">else </text:span><text:span text:style-name="T1">Statements </text:span><text:span text:style-name="T1">(Beispiel)</text:span></text:p>
          </draw:text-box>
        </draw:frame>
        <draw:frame draw:name="Inhaltsplatzhalter 7" presentation:style-name="pr9" draw:text-style-name="P39" draw:layer="layout" svg:width="17.366cm" svg:height="11.246cm" svg:x="0.414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8"><text:span text:style-name="T25"># Snippet A</text:span></text:p>
                    <text:p text:style-name="P38"><text:span text:style-name="T38">if</text:span><text:span text:style-name="T25"> x &lt; 5</text:span><text:span text:style-name="T38">:</text:span><text:span text:style-name="T38"><text:line-break/></text:span><text:span text:style-name="T25"> <text:s text:c="3"/>print('Small')</text:span></text:p>
                    <text:p text:style-name="P38"><text:span text:style-name="T38">elif</text:span><text:span text:style-name="T25"> x &lt; 15</text:span><text:span text:style-name="T38">:</text:span><text:span text:style-name="T38"><text:line-break/></text:span><text:span text:style-name="T25"> <text:s text:c="3"/>print('Medium')</text:span></text:p>
                    <text:p text:style-name="P38"><text:span text:style-name="T38">elif</text:span><text:span text:style-name="T25"> x &lt; 20</text:span><text:span text:style-name="T38">:</text:span><text:span text:style-name="T38"><text:line-break/></text:span><text:span text:style-name="T25"> <text:s text:c="3"/>print('Big')</text:span></text:p>
                    <text:p text:style-name="P38"><text:span text:style-name="T38">else:</text:span><text:span text:style-name="T38"><text:line-break/></text:span><text:span text:style-name="T38"> <text:s text:c="3"/></text:span><text:span text:style-name="T25">print('Huge')</text:span></text:p>
                  </text:list-header>
                </text:list>
              </text:list-item>
            </text:list>
          </draw:text-box>
        </draw:frame>
        <draw:frame draw:name="Foliennummernplatzhalter 6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name="Inhaltsplatzhalter 9" presentation:style-name="pr10" draw:text-style-name="P39" xml:id="id79" draw:id="id79" draw:layer="layout" svg:width="17.366cm" svg:height="11.246cm" svg:x="18.288cm" svg:y="5.77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8"><text:span text:style-name="T40"># Snippet B</text:span></text:p>
                    <text:p text:style-name="P38"><text:span text:style-name="T38">if</text:span><text:span text:style-name="T25"> x &lt; 5</text:span><text:span text:style-name="T38">:</text:span><text:span text:style-name="T38"><text:line-break/></text:span><text:span text:style-name="T25"> <text:s text:c="3"/>print('Small')</text:span></text:p>
                    <text:p text:style-name="P38"><text:span text:style-name="T38">if</text:span><text:span text:style-name="T25"> x &lt; 15</text:span><text:span text:style-name="T38">:</text:span><text:span text:style-name="T38"><text:line-break/></text:span><text:span text:style-name="T25"> <text:s text:c="3"/>print('Medium')</text:span></text:p>
                    <text:p text:style-name="P38"><text:span text:style-name="T38">if</text:span><text:span text:style-name="T25"> x &lt; 20</text:span><text:span text:style-name="T38">:</text:span><text:span text:style-name="T38"><text:line-break/></text:span><text:span text:style-name="T25"> <text:s text:c="3"/>print('Big')</text:span></text:p>
                    <text:p text:style-name="P38"><text:span text:style-name="T38">else:</text:span><text:span text:style-name="T38"><text:line-break/></text:span><text:span text:style-name="T38"> <text:s text:c="3"/></text:span><text:span text:style-name="T25">print('Huge')</text:span></text:p>
                  </text:list-header>
                </text:list>
              </text:list-item>
            </text:list>
          </draw:text-box>
        </draw:frame>
        <draw:frame draw:style-name="gr13" draw:text-style-name="P40" draw:layer="layout" svg:width="1.302cm" svg:height="2.143cm" svg:x="17.34cm" svg:y="3.703cm">
          <draw:text-box>
            <text:p xml:id="id80" text:id="id80"><text:span text:style-name="T41">≠</text:span></text:p>
          </draw:text-box>
        </draw:frame>
        <draw:frame draw:style-name="gr13" draw:text-style-name="P40" draw:layer="layout" svg:width="1.302cm" svg:height="2.143cm" svg:x="17.34cm" svg:y="16.704cm">
          <draw:text-box>
            <text:p xml:id="id81" text:id="id81"><text:span text:style-name="T41">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Bis 11:30 spätestens beginnen</text:p>
            </draw:text-box>
          </draw:frame>
        </presentation:notes>
      </draw:page>
      <draw:page draw:name="page13" draw:style-name="dp1" draw:master-page-name="Titel_20_und_20_Inhalt_5f_">
        <office:forms form:automatic-focus="false" form:apply-design-mode="false"/>
        <draw:frame draw:name="Titel 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</text:span><text:span text:style-name="T1">(0): Basics </text:span><text:span text:style-name="T1">von for-</text:span><text:span text:style-name="T1">Schleifen</text:span></text:p>
          </draw:text-box>
        </draw:frame>
        <draw:frame draw:name="Inhaltsplatzhalter 10" presentation:style-name="pr7" draw:text-style-name="P4" draw:layer="layout" svg:width="32.993cm" svg:height="13.897cm" svg:x="2.446cm" svg:y="4.246cm" presentation:class="outline" presentation:user-transformed="true">
          <draw:text-box>
            <text:list text:style-name="L2">
              <text:list-item>
                <text:list>
                  <text:list-item>
                    <text:p xml:id="id82" text:id="id82" text:style-name="P16"><text:span text:style-name="T14">Iterieren/Durchlaufen von Sequenzen (z. B. Listen)</text:span></text:p>
                  </text:list-item>
                  <text:list-item>
                    <text:p xml:id="id83" text:id="id83" text:style-name="P16"><text:span text:style-name="T29">FÜR</text:span><text:span text:style-name="T14"> jedes Element </text:span><text:span text:style-name="T29">IN</text:span><text:span text:style-name="T14"> Sequenz</text:span><text:span text:style-name="T29">:</text:span></text:p>
                    <text:p xml:id="id84" text:id="id84" text:style-name="P16"><text:span text:style-name="T14"><text:s text:c="5"/></text:span><text:span text:style-name="T14">Führe Anweisungen aus</text:span></text:p>
                    <text:p text:style-name="P16"><text:span text:style-name="T14"/></text:p>
                  </text:list-item>
                  <text:list-item>
                    <text:p xml:id="id85" text:id="id85" text:style-name="P16"><text:span text:style-name="T29">Python-Syntax für for-Loops (Schleifen):</text:span></text:p>
                    <text:list>
                      <text:list-header>
                        <text:p xml:id="id86" text:id="id86" text:style-name="P18"><text:span text:style-name="T38">for</text:span><text:span text:style-name="T25"> item </text:span><text:span text:style-name="T38">in</text:span><text:span text:style-name="T25"> list_of_items</text:span><text:span text:style-name="T38">:</text:span></text:p>
                        <text:p xml:id="id87" text:id="id87" text:style-name="P18"><text:span text:style-name="T25"><text:s text:c="4"/></text:span><text:span text:style-name="T25">print('This will be repeated.')</text:span></text:p>
                        <text:p text:style-name="P18"><text:span text:style-name="T42"/></text:p>
                      </text:list-header>
                    </text:list>
                  </text:list-item>
                  <text:list-item>
                    <text:p xml:id="id88" text:id="id88" text:style-name="P18"><text:span text:style-name="T14">Laufvariablen können beliebigen Namen haben</text:span></text:p>
                  </text:list-item>
                  <text:list-item>
                    <text:p xml:id="id89" text:id="id89" text:style-name="P18"><text:span text:style-name="T14">Wiederholter Code-Block mit beliebig vielen Anweisungen</text:span></text:p>
                  </text:list-item>
                </text:list>
              </text:list-item>
            </text:list>
          </draw:text-box>
        </draw:frame>
        <draw:frame draw:name="Foliennummernplatzhalter 9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>
        <office:forms form:automatic-focus="false" form:apply-design-mode="false"/>
        <draw:frame draw:name="Titel 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</text:span><text:span text:style-name="T1">(1): Beispiel</text:span></text:p>
          </draw:text-box>
        </draw:frame>
        <draw:frame draw:name="Inhaltsplatzhalter 11" presentation:style-name="pr11" draw:text-style-name="P41" draw:layer="layout" svg:width="32.993cm" svg:height="6.096cm" svg:x="2.046cm" svg:y="7.11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><text:span text:style-name="T25">lectures = ['Maths', 'English', 'Computer Science']</text:span></text:p>
                    <text:p text:style-name="P16"><text:span text:style-name="T25"/></text:p>
                    <text:p text:style-name="P16"><text:span text:style-name="T38">for</text:span><text:span text:style-name="T25"> lecture </text:span><text:span text:style-name="T38">in</text:span><text:span text:style-name="T25"> lectures:</text:span></text:p>
                    <text:p text:style-name="P16"><text:span text:style-name="T25"><text:s text:c="4"/></text:span><text:span text:style-name="T38">print(</text:span><text:span text:style-name="T25">f'I love {lecture}'</text:span><text:span text:style-name="T38">)</text:span></text:p>
                  </text:list-header>
                </text:list>
              </text:list-item>
            </text:list>
          </draw:text-box>
        </draw:frame>
        <draw:frame draw:name="Foliennummernplatzhalter 10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21" draw:layer="layout" svg:width="17.271cm" svg:height="12.572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ausgabe des aktuellen Werts in Variable lecture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15" draw:style-name="dp1" draw:master-page-name="Titel_20_und_20_Inhalt_5f_">
        <office:forms form:automatic-focus="false" form:apply-design-mode="false"/>
        <draw:frame draw:name="Inhaltsplatzhalter 13" presentation:style-name="pr7" draw:text-style-name="P4" draw:layer="layout" svg:width="32.993cm" svg:height="13.897cm" svg:x="1.646cm" svg:y="4.54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><text:span text:style-name="T43">lectures</text:span><text:span text:style-name="T25"> = ['Maths', 'English', 'Computer Science']</text:span></text:p>
                    <text:p text:style-name="P16"><text:span text:style-name="T25"/></text:p>
                    <text:p text:style-name="P42"><text:span text:style-name="T38">for</text:span><text:span text:style-name="T25"> </text:span><text:span text:style-name="T44">lecture</text:span><text:span text:style-name="T25"> </text:span><text:span text:style-name="T38">in</text:span><text:span text:style-name="T25"> </text:span><text:span text:style-name="T43">lectures</text:span><text:span text:style-name="T25">:</text:span></text:p>
                    <text:p text:style-name="P42"><text:span text:style-name="T25"><text:s text:c="4"/></text:span><text:span text:style-name="T38">print(</text:span><text:span text:style-name="T25">f'I love {</text:span><text:span text:style-name="T44">lecture</text:span><text:span text:style-name="T25">}'</text:span><text:span text:style-name="T38">)</text:span></text:p>
                    <text:p text:style-name="P16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44" xml:id="id93" draw:id="id93" draw:layer="layout" svg:width="13.716cm" svg:height="6.038cm" svg:x="21.823cm" svg:y="11.976cm">
          <draw:text-box>
            <text:p text:style-name="P43"><text:span text:style-name="T45">Legende</text:span></text:p>
            <text:p text:style-name="P43"><text:span text:style-name="T46">Iterierte Sequenz (z. B. Liste)</text:span></text:p>
            <text:p text:style-name="P43"><text:span text:style-name="T47">Definition der Sequenz</text:span></text:p>
            <text:p text:style-name="P43"><text:span text:style-name="T47">for-Loop Definition (Syntax)</text:span></text:p>
            <text:p text:style-name="P43"><text:span text:style-name="T47">Wiederholter Code-Block</text:span></text:p>
            <text:p text:style-name="P43"><text:span text:style-name="T48">Lauf-/Schleifen-Variable</text:span></text:p>
          </draw:text-box>
        </draw:frame>
        <draw:frame draw:name="Titel 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or-Loops </text:span><text:span text:style-name="T1">(2): Beispiel</text:span></text:p>
          </draw:text-box>
        </draw:frame>
        <draw:frame draw:name="Foliennummernplatzhalter 13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custom-shape draw:style-name="gr15" draw:text-style-name="P45" xml:id="id90" draw:id="id90" draw:layer="layout" svg:width="30.526cm" svg:height="1.778cm" svg:x="2.502cm" svg:y="7.5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5" xml:id="id91" draw:id="id91" draw:layer="layout" svg:width="14.732cm" svg:height="1.41cm" svg:x="2.502cm" svg:y="10.6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5" xml:id="id92" draw:id="id92" draw:layer="layout" svg:width="18.034cm" svg:height="1.434cm" svg:x="2.502cm" svg:y="12.4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5" xml:id="id94" draw:id="id94" draw:layer="layout" svg:width="12.16cm" svg:height="0.887cm" svg:x="21.93cm" svg:y="14.9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5" xml:id="id95" draw:id="id95" draw:layer="layout" svg:width="10.797cm" svg:height="0.832cm" svg:x="21.923cm" svg:y="16.0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5" xml:id="id96" draw:id="id96" draw:layer="layout" svg:width="9.525cm" svg:height="0.762cm" svg:x="21.94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5" xml:id="id97" draw:id="id97" draw:layer="layout" svg:width="13.855cm" svg:height="6.157cm" svg:x="21.644cm" svg:y="12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2" draw:text-style-name="P21" draw:layer="layout" svg:width="17.271cm" svg:height="12.593cm" svg:x="2.159cm" svg:y="13.271cm" presentation:class="notes" presentation:user-transformed="true">
            <draw:text-box>
              <text:p>WICHTIGES KONZEPT!</text:p>
              <text:p/>
              <text:p>Blau = Initialisierung von Liste mit Schulfächern (lectures), bekannt</text:p>
              <text:p/>
              <text:p>Rot = holt sich erstes element aus liste aller lectures, weist sie variable lecture zu. Erstes element ist ‘Math’</text:p>
              <text:p/>
              <text:p>grün = Code-Block, der in jedem durchlauf ausgegeben wird</text:p>
              <text:p/>
              <text:p>AUF TAFEL</text:p>
              <text:p/>
              <text:p/>
              <text:p/>
            </draw:text-box>
          </draw:frame>
        </presentation:notes>
      </draw:page>
      <draw:page draw:name="page16" draw:style-name="dp1" draw:master-page-name="Titel_20_und_20_Inhalt_5f_">
        <office:forms form:automatic-focus="false" form:apply-design-mode="false"/>
        <draw:frame draw:name="Titel 37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</text:span><text:span text:style-name="T1">(0): Basics</text:span></text:p>
          </draw:text-box>
        </draw:frame>
        <draw:frame draw:name="Inhaltsplatzhalter 31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98" text:id="id98" text:style-name="P7"><text:span text:style-name="T2">Ausführen von Anweisungen bis Bedingung nicht mehr erfüllt</text:span></text:p>
                    <text:list>
                      <text:list-item>
                        <text:p xml:id="id99" text:id="id99" text:style-name="P38"><text:span text:style-name="T2">„</text:span><text:span text:style-name="T2">Solange Bedingung erfüllt, führe Anweisungen aus“</text:span></text:p>
                      </text:list-item>
                    </text:list>
                    <text:p text:style-name="P16"><text:span text:style-name="T14"/></text:p>
                  </text:list-item>
                  <text:list-item>
                    <text:p xml:id="id100" text:id="id100" text:style-name="P3"><text:span text:style-name="T36">SOLANGE</text:span><text:span text:style-name="T2"> </text:span><text:span text:style-name="T4">Bedingung erfüllt</text:span><text:span text:style-name="T36">:</text:span></text:p>
                    <text:p xml:id="id101" text:id="id101" text:style-name="P3"><text:span text:style-name="T2"><text:s text:c="4"/></text:span><text:span text:style-name="T4">Führe Anweisungen aus</text:span></text:p>
                    <text:p text:style-name="P16"><text:span text:style-name="T14"/></text:p>
                  </text:list-item>
                  <text:list-item>
                    <text:p xml:id="id102" text:id="id102" text:style-name="P16"><text:span text:style-name="T29">Python-Syntax:</text:span></text:p>
                    <text:list>
                      <text:list-header>
                        <text:p xml:id="id103" text:id="id103" text:style-name="P7"><text:span text:style-name="T38">while</text:span><text:span text:style-name="T25"> </text:span><text:span text:style-name="T39">condition</text:span><text:span text:style-name="T38">:</text:span></text:p>
                        <text:p xml:id="id104" text:id="id104" text:style-name="P7"><text:span text:style-name="T25"><text:s text:c="4"/></text:span><text:span text:style-name="T25">print('Running')</text:span></text:p>
                        <text:p text:style-name="P18"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37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22" draw:text-style-name="P46" xml:id="id105" draw:id="id105" draw:layer="layout" svg:width="8.382cm" svg:height="5.824cm" svg:x="27.178cm" svg:y="12.392cm">
          <draw:text-box>
            <text:p><text:span text:style-name="T14">x = 0</text:span></text:p>
            <text:p><text:span text:style-name="T31">while</text:span><text:span text:style-name="T16"> x &lt; 3</text:span><text:span text:style-name="T31">:</text:span></text:p>
            <text:p><text:span text:style-name="T16"><text:s text:c="4"/></text:span><text:span text:style-name="T16">print(x)</text:span></text:p>
            <text:p><text:span text:style-name="T16"><text:s text:c="4"/></text:span><text:span text:style-name="T16">x = x + 1</text:span></text:p>
            <text:p><text:span text:style-name="T16">print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21" draw:layer="layout" svg:width="17.271cm" svg:height="12.572cm" svg:x="2.159cm" svg:y="13.271cm" presentation:class="notes">
            <draw:text-box>
              <text:p text:style-name="P9">Tafel danach</text:p>
            </draw:text-box>
          </draw:frame>
        </presentation:notes>
      </draw:page>
      <draw:page draw:name="page17" draw:style-name="dp1" draw:master-page-name="Titel_20_und_20_Inhalt_5f_">
        <office:forms form:automatic-focus="false" form:apply-design-mode="false"/>
        <draw:custom-shape draw:style-name="gr23" draw:text-style-name="P47" xml:id="id112" draw:id="id112" draw:layer="layout" svg:width="27.94cm" svg:height="6.013cm" svg:x="3.202cm" svg:y="11.43cm">
          <text:p/>
          <draw:enhanced-geometry svg:viewBox="0 0 21600 21600" draw:type="rectangle" draw:enhanced-path="M 0 0 L 21600 0 21600 21600 0 21600 0 0 Z N"/>
        </draw:custom-shape>
        <draw:frame draw:name="Titel 38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</text:span><text:span text:style-name="T1">(1): </text:span><text:span text:style-name="T1">Kombination </text:span><text:span text:style-name="T1">mit User-</text:span><text:span text:style-name="T1">Input</text:span></text:p>
          </draw:text-box>
        </draw:frame>
        <draw:frame draw:name="Inhaltsplatzhalter 32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06" text:id="id106" text:style-name="P16"><text:span text:style-name="T14">Möglichkeit: Ausführen bis spezieller Input</text:span></text:p>
                    <text:p text:style-name="P16"><text:span text:style-name="T14"/></text:p>
                  </text:list-item>
                  <text:list-item>
                    <text:p xml:id="id107" text:id="id107" text:style-name="P16"><text:span text:style-name="T2">Kontrolle durch </text:span><text:span text:style-name="T14">Bedingungen oder „Flags“ (= Boolean-Variable) </text:span></text:p>
                    <text:p text:style-name="P16"><text:span text:style-name="T14"/></text:p>
                    <text:p xml:id="id108" text:id="id108" text:style-name="P16"><text:span text:style-name="T25">user_input = ''</text:span></text:p>
                    <text:p xml:id="id109" text:id="id109" text:style-name="P16"><text:span text:style-name="T31">while</text:span><text:span text:style-name="T16"> user_input != 'quit':</text:span></text:p>
                    <text:p xml:id="id110" text:id="id110" text:style-name="P16"><text:span text:style-name="T25"><text:s text:c="4"/></text:span><text:span text:style-name="T16">user_input = </text:span><text:span text:style-name="T31">input(</text:span><text:span text:style-name="T16">'What are you saying?'</text:span><text:span text:style-name="T31">) </text:span></text:p>
                    <text:p xml:id="id111" text:id="id111" text:style-name="P16"><text:span text:style-name="T25"><text:s text:c="4"/></text:span><text:span text:style-name="T38">print(</text:span><text:span text:style-name="T25">user_</text:span><text:span text:style-name="T16">input</text:span><text:span text:style-name="T31">)</text:span></text:p>
                  </text:list-item>
                </text:list>
              </text:list-item>
            </text:list>
          </draw:text-box>
        </draw:frame>
        <draw:frame draw:name="Foliennummernplatzhalter 38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21" draw:layer="layout" svg:width="17.271cm" svg:height="12.572cm" svg:x="2.159cm" svg:y="13.271cm" presentation:class="notes" presentation:user-transformed="true">
            <draw:text-box>
              <text:p>Danach: Programmierbeispiel</text:p>
            </draw:text-box>
          </draw:frame>
        </presentation:notes>
      </draw:page>
      <draw:page draw:name="page18" draw:style-name="dp1" draw:master-page-name="Titel_20_und_20_Inhalt_5f_">
        <office:forms form:automatic-focus="false" form:apply-design-mode="false"/>
        <draw:custom-shape draw:style-name="gr24" draw:text-style-name="P47" xml:id="id116" draw:id="id116" draw:layer="layout" svg:width="28.702cm" svg:height="6.096cm" svg:x="3.256cm" svg:y="11.176cm">
          <text:p/>
          <draw:enhanced-geometry svg:viewBox="0 0 21600 21600" draw:type="rectangle" draw:enhanced-path="M 0 0 L 21600 0 21600 21600 0 21600 0 0 Z N"/>
        </draw:custom-shape>
        <draw:frame draw:name="Titel 39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while Loops </text:span><text:span text:style-name="T1">(2): </text:span><text:span text:style-name="T1">Endlosschlei</text:span><text:span text:style-name="T1">fen (Infinite </text:span><text:span text:style-name="T1">Loops)</text:span></text:p>
          </draw:text-box>
        </draw:frame>
        <draw:frame draw:name="Inhaltsplatzhalter 33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13" text:id="id113" text:style-name="P3"><text:span text:style-name="T2">Programm läuft unendlich</text:span></text:p>
                    <text:list>
                      <text:list-item>
                        <text:p xml:id="id114" text:id="id114" text:style-name="P3"><text:span text:style-name="T49">while</text:span><text:span text:style-name="T22"> True</text:span></text:p>
                      </text:list-item>
                    </text:list>
                  </text:list-item>
                  <text:list-item>
                    <text:p xml:id="id115" text:id="id115" text:style-name="P3"><text:span text:style-name="T2">Abbruchbedingung durch </text:span><text:span text:style-name="T22">break</text:span></text:p>
                    <text:p text:style-name="P16"><text:span text:style-name="T14"/></text:p>
                    <text:p xml:id="id117" text:id="id117" text:style-name="P7"><text:span text:style-name="T49">while</text:span><text:span text:style-name="T22"> True:</text:span></text:p>
                    <text:p xml:id="id118" text:id="id118" text:style-name="P7"><text:span text:style-name="T22"><text:s text:c="4"/></text:span><text:span text:style-name="T22">user_input = </text:span><text:span text:style-name="T49">input(</text:span><text:span text:style-name="T22">'What are you saying?'</text:span><text:span text:style-name="T49">)</text:span><text:span text:style-name="T22"> </text:span></text:p>
                    <text:p xml:id="id119" text:id="id119" text:style-name="P7"><text:span text:style-name="T22"><text:s text:c="4"/></text:span><text:span text:style-name="T49">print(</text:span><text:span text:style-name="T22">user_input</text:span><text:span text:style-name="T49">)</text:span></text:p>
                    <text:p xml:id="id120" text:id="id120" text:style-name="P7"><text:span text:style-name="T22"><text:s text:c="4"/></text:span><text:span text:style-name="T49">if</text:span><text:span text:style-name="T22"> user_input == 'quit':</text:span></text:p>
                    <text:p xml:id="id121" text:id="id121" text:style-name="P7"><text:span text:style-name="T22"><text:s text:c="6"/></text:span><text:span text:style-name="T49">break</text:span></text:p>
                  </text:list-item>
                </text:list>
              </text:list-item>
            </text:list>
          </draw:text-box>
        </draw:frame>
        <draw:frame draw:name="Foliennummernplatzhalter 39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 text:style-name="P9"><text:span text:style-name="T7">True =&gt; 1==1</text:span></text:p>
            </draw:text-box>
          </draw:frame>
        </presentation:notes>
      </draw:page>
      <draw:page draw:name="page19" draw:style-name="dp1" draw:master-page-name="Titel_20_und_20_Inhalt_5f_">
        <office:forms form:automatic-focus="false" form:apply-design-mode="false"/>
        <draw:frame draw:name="Titel 1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Loops: </text:span><text:span text:style-name="T1">Keywords </text:span><text:span text:style-name="T1">zum </text:span><text:span text:style-name="T1">Schleifen- </text:span><text:span text:style-name="T1">und </text:span><text:span text:style-name="T1">Programma</text:span><text:span text:style-name="T1">blauf</text:span></text:p>
          </draw:text-box>
        </draw:frame>
        <draw:frame draw:name="Inhaltsplatzhalter 5" presentation:style-name="pr7" draw:text-style-name="P4" draw:layer="layout" svg:width="32.993cm" svg:height="13.897cm" svg:x="2.446cm" svg:y="4.546cm" presentation:class="outline" presentation:user-transformed="true">
          <draw:text-box>
            <text:list text:style-name="L2">
              <text:list-item>
                <text:list>
                  <text:list-item>
                    <text:p xml:id="id122" text:id="id122" text:style-name="P16"><text:span text:style-name="T15">pass</text:span></text:p>
                    <text:list>
                      <text:list-item>
                        <text:p xml:id="id123" text:id="id123" text:style-name="P18"><text:span text:style-name="T14">„</text:span><text:span text:style-name="T14">leerer“ Command, tut nichts</text:span><text:span text:style-name="T14"><text:line-break/></text:span><text:span text:style-name="T14"/></text:p>
                      </text:list-item>
                    </text:list>
                  </text:list-item>
                  <text:list-item>
                    <text:p xml:id="id124" text:id="id124" text:style-name="P48"><text:span text:style-name="T17">break</text:span></text:p>
                    <text:list>
                      <text:list-item>
                        <text:p xml:id="id125" text:id="id125" text:style-name="P18"><text:span text:style-name="T14">Schleifenabbruch</text:span></text:p>
                      </text:list-item>
                      <text:list-item>
                        <text:p xml:id="id126" text:id="id126" text:style-name="P18"><text:span text:style-name="T14">Sofortiges Beenden der „innersten Schleife“</text:span><text:span text:style-name="T14"><text:line-break/></text:span><text:span text:style-name="T14"/></text:p>
                      </text:list-item>
                    </text:list>
                  </text:list-item>
                  <text:list-item>
                    <text:p xml:id="id127" text:id="id127" text:style-name="P48"><text:span text:style-name="T17">continue</text:span></text:p>
                    <text:list>
                      <text:list-item>
                        <text:p xml:id="id128" text:id="id128" text:style-name="P18"><text:span text:style-name="T14">Sprung zu nächster Iteration</text:span></text:p>
                      </text:list-item>
                      <text:list-item>
                        <text:p xml:id="id129" text:id="id129" text:style-name="P18"><text:span text:style-name="T14">Abbruch aktueller Durchlauf „innerster Schleife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7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>
        <office:forms form:automatic-focus="false" form:apply-design-mode="false"/>
        <draw:frame draw:name="Titel 2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</text:span><text:span text:style-name="T1">(0): </text:span><text:span text:style-name="T1">Grundkonze</text:span><text:span text:style-name="T1">pt</text:span></text:p>
          </draw:text-box>
        </draw:frame>
        <draw:frame draw:name="Foliennummernplatzhalter 32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25" draw:text-style-name="P45" xml:id="id130" draw:id="id130" draw:layer="layout" svg:width="12.214cm" svg:height="12.085cm" svg:x="0.824cm" svg:y="4.895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26" draw:text-style-name="P23" draw:layer="layout" svg:width="21.643cm" svg:height="10.917cm" svg:x="14.163cm" svg:y="5.904cm">
          <draw:text-box>
            <text:p xml:id="id131" text:id="id131"><text:span text:style-name="T14">Input-Parameter/Argumente</text:span></text:p>
            <text:p><text:span text:style-name="T14"/></text:p>
            <text:p><text:span text:style-name="T14"/></text:p>
            <text:p><text:span text:style-name="T14"/></text:p>
            <text:p xml:id="id133" text:id="id133"><text:span text:style-name="T14">Funktions-Logik (Code)</text:span></text:p>
            <text:p><text:span text:style-name="T14"/></text:p>
            <text:p><text:span text:style-name="T50"/></text:p>
            <text:p xml:id="id135" text:id="id135"><text:span text:style-name="T14">Rückgabewert (</text:span><text:span text:style-name="T16">return</text:span><text:span text:style-name="T14"> value), Konsolen-Output, Speichern in Parameter, File-Output...</text:span></text:p>
          </draw:text-box>
        </draw:frame>
        <draw:custom-shape draw:style-name="gr27" draw:text-style-name="P45" xml:id="id132" draw:id="id132" draw:layer="layout" svg:width="1.109cm" svg:height="1.27cm" svg:x="13.012cm" svg:y="5.9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45" xml:id="id134" draw:id="id134" draw:layer="layout" svg:width="1.109cm" svg:height="4.318cm" svg:x="13.029cm" svg:y="8.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45" xml:id="id136" draw:id="id136" draw:layer="layout" svg:width="1.109cm" svg:height="1.308cm" svg:x="13.054cm" svg:y="14.6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7">parameter = </text:span><text:span text:style-name="T7">Name/Variable in </text:span><text:span text:style-name="T7">Funktionsdefinition</text:span></text:p>
              <text:p><text:span text:style-name="T7">argument = </text:span><text:span text:style-name="T7">information </text:span><text:span text:style-name="T7">übergeben an </text:span><text:span text:style-name="T7">funktion</text:span></text:p>
              <text:p><text:span text:style-name="T7"/></text:p>
              <text:p><text:span text:style-name="T7">manchmal vertauscht</text:span></text:p>
            </draw:text-box>
          </draw:frame>
        </presentation:notes>
      </draw:page>
      <draw:page draw:name="page21" draw:style-name="dp1" draw:master-page-name="Titel_20_und_20_Inhalt_5f_">
        <office:forms form:automatic-focus="false" form:apply-design-mode="false"/>
        <draw:frame draw:name="Titel 33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3">Functions </text:span><text:span text:style-name="T23">(1): </text:span><text:span text:style-name="T23"><text:line-break/></text:span><text:span text:style-name="T23">Beispiel </text:span><text:span text:style-name="T22">print('This</text:span><text:span text:style-name="T22">', 'is', </text:span><text:span text:style-name="T22">'a', </text:span><text:span text:style-name="T22">'Test')</text:span></text:p>
          </draw:text-box>
        </draw:frame>
        <draw:frame draw:name="Foliennummernplatzhalter 33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25" draw:text-style-name="P45" draw:layer="layout" svg:width="12.214cm" svg:height="12.085cm" svg:x="6.524cm" svg:y="4.4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30" draw:text-style-name="P49" xml:id="id139" draw:id="id139" draw:layer="layout" svg:width="15.494cm" svg:height="1.369cm" svg:x="10.728cm" svg:y="5.404cm">
          <draw:text-box>
            <text:p><text:span text:style-name="T22">'This', 'is', 'a', 'Test'</text:span></text:p>
          </draw:text-box>
        </draw:frame>
        <draw:frame draw:style-name="gr25" draw:text-style-name="P45" xml:id="id141" draw:id="id141" draw:layer="layout" svg:width="11.856cm" svg:height="1.853cm" svg:x="16.156cm" svg:y="14.478cm">
          <draw:image xlink:href="Pictures/1000000000000293000000675A4140C4.png" xlink:type="simple" xlink:show="embed" xlink:actuate="onLoad" draw:mime-type="image/png">
            <text:p/>
          </draw:image>
        </draw:frame>
        <draw:frame draw:style-name="gr31" draw:text-style-name="P47" xml:id="id137" draw:id="id137" draw:layer="layout" svg:width="6.858cm" svg:height="1.37cm" svg:x="8.89cm" svg:y="9.876cm">
          <draw:text-box>
            <text:p text:style-name="P33"><text:span text:style-name="T22">print</text:span></text:p>
          </draw:text-box>
        </draw:frame>
        <draw:frame draw:style-name="gr32" draw:text-style-name="P50" xml:id="id140" draw:id="id140" draw:layer="layout" svg:width="7.112cm" svg:height="1.778cm" svg:x="9.044cm" svg:y="14.478cm">
          <draw:text-box>
            <text:p><text:span text:style-name="T51">In Konsole:</text:span></text:p>
          </draw:text-box>
        </draw:frame>
        <draw:frame draw:style-name="gr32" draw:text-style-name="P50" xml:id="id138" draw:id="id138" draw:layer="layout" svg:width="7.112cm" svg:height="1.778cm" svg:x="3.81cm" svg:y="5.08cm">
          <draw:text-box>
            <text:p><text:span text:style-name="T51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7">parameter = </text:span><text:span text:style-name="T7">Name/Variable in </text:span><text:span text:style-name="T7">Funktionsdefinition</text:span></text:p>
              <text:p><text:span text:style-name="T7">argument = </text:span><text:span text:style-name="T7">information </text:span><text:span text:style-name="T7">übergeben an </text:span><text:span text:style-name="T7">funktion</text:span></text:p>
              <text:p><text:span text:style-name="T7"/></text:p>
              <text:p><text:span text:style-name="T7">manchmal vertauscht</text:span></text:p>
            </draw:text-box>
          </draw:frame>
        </presentation:notes>
      </draw:page>
      <draw:page draw:name="page22" draw:style-name="dp1" draw:master-page-name="Titel_20_und_20_Inhalt_5f_">
        <office:forms form:automatic-focus="false" form:apply-design-mode="false"/>
        <draw:frame draw:name="Titel 3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23">Functions </text:span><text:span text:style-name="T23">(2): </text:span><text:span text:style-name="T23"><text:line-break/></text:span><text:span text:style-name="T23">Beispiel </text:span><text:span text:style-name="T22">len([4, 8, </text:span><text:span text:style-name="T22">'This', </text:span><text:span text:style-name="T22">'Test'])</text:span></text:p>
          </draw:text-box>
        </draw:frame>
        <draw:frame draw:name="Foliennummernplatzhalter 34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25" draw:text-style-name="P45" draw:layer="layout" svg:width="12.214cm" svg:height="12.085cm" svg:x="11.024cm" svg:y="4.096cm">
          <draw:image xlink:href="Pictures/100000010000040B0000040023B8C212.png" xlink:type="simple" xlink:show="embed" xlink:actuate="onLoad" draw:mime-type="image/png">
            <text:p/>
          </draw:image>
        </draw:frame>
        <draw:frame draw:style-name="gr33" draw:text-style-name="P49" xml:id="id143" draw:id="id143" draw:layer="layout" svg:width="15.494cm" svg:height="1.369cm" svg:x="15.228cm" svg:y="4.804cm">
          <draw:text-box>
            <text:p><text:span text:style-name="T22">[4, 8, 'This', 'Test']</text:span></text:p>
          </draw:text-box>
        </draw:frame>
        <draw:frame draw:style-name="gr34" draw:text-style-name="P51" xml:id="id142" draw:id="id142" draw:layer="layout" svg:width="7.62cm" svg:height="1.212cm" svg:x="13.082cm" svg:y="9.476cm">
          <draw:text-box>
            <text:p text:style-name="P33"><text:span text:style-name="T52">len</text:span></text:p>
          </draw:text-box>
        </draw:frame>
        <draw:frame draw:style-name="gr35" draw:text-style-name="P50" xml:id="id145" draw:id="id145" draw:layer="layout" svg:width="10.706cm" svg:height="3.205cm" svg:x="9.652cm" svg:y="13.97cm">
          <draw:text-box>
            <text:p><text:span text:style-name="T51">Rückgabewert </text:span></text:p>
            <text:p><text:span text:style-name="T51">(</text:span><text:span text:style-name="T53">return</text:span><text:span text:style-name="T51">-value)</text:span></text:p>
          </draw:text-box>
        </draw:frame>
        <draw:frame draw:style-name="gr36" draw:text-style-name="P46" xml:id="id146" draw:id="id146" draw:layer="layout" svg:width="2.784cm" svg:height="2.77cm" svg:x="20.256cm" svg:y="13.994cm">
          <draw:text-box>
            <text:p text:style-name="P33"><text:span text:style-name="T22">4</text:span></text:p>
          </draw:text-box>
        </draw:frame>
        <draw:frame draw:style-name="gr37" draw:text-style-name="P50" xml:id="id144" draw:id="id144" draw:layer="layout" svg:width="7.112cm" svg:height="1.778cm" svg:x="8.128cm" svg:y="4.572cm">
          <draw:text-box>
            <text:p><text:span text:style-name="T51">Argumen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7">parameter = </text:span><text:span text:style-name="T7">Name/Variable in </text:span><text:span text:style-name="T7">Funktionsdefinition</text:span></text:p>
              <text:p><text:span text:style-name="T7">argument = </text:span><text:span text:style-name="T7">information </text:span><text:span text:style-name="T7">übergeben an </text:span><text:span text:style-name="T7">funktion</text:span></text:p>
              <text:p><text:span text:style-name="T7"/></text:p>
              <text:p><text:span text:style-name="T7">manchmal vertauscht</text:span></text:p>
            </draw:text-box>
          </draw:frame>
        </presentation:notes>
      </draw:page>
      <draw:page draw:name="page23" draw:style-name="dp1" draw:master-page-name="Titel_20_und_20_Inhalt_5f_">
        <office:forms form:automatic-focus="false" form:apply-design-mode="false"/>
        <draw:frame draw:name="Titel 35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ktionen/</text:span><text:span text:style-name="T1">Functions </text:span><text:span text:style-name="T1">(3)</text:span></text:p>
          </draw:text-box>
        </draw:frame>
        <draw:frame draw:name="Inhaltsplatzhalter 28" presentation:style-name="pr2" draw:text-style-name="P4" draw:layer="layout" svg:width="32.993cm" svg:height="14.74cm" svg:x="2.446cm" svg:y="3.403cm" presentation:class="outline" presentation:user-transformed="true">
          <draw:text-box>
            <text:list text:style-name="L2">
              <text:list-item>
                <text:list>
                  <text:list-item>
                    <text:p xml:id="id147" text:id="id147" text:style-name="P3"><text:span text:style-name="T2">„</text:span><text:span text:style-name="T2">Benannter Codeblock“ mit spezifischer Aufgabe</text:span></text:p>
                    <text:list>
                      <text:list-item>
                        <text:p xml:id="id149" text:id="id149" text:style-name="P3"><text:span text:style-name="T2">Wiederverwendbar, einfacher lesbar, besser wartbar</text:span></text:p>
                      </text:list-item>
                      <text:list-item>
                        <text:p xml:id="id150" text:id="id150" text:style-name="P3"><text:span text:style-name="T2">Beispiele von Python-Funktionen: </text:span><text:span text:style-name="T22">len()</text:span><text:span text:style-name="T2">, </text:span><text:span text:style-name="T22">print()</text:span><text:span text:style-name="T2">, </text:span><text:span text:style-name="T54">input()</text:span><text:span text:style-name="T2">, … </text:span></text:p>
                      </text:list-item>
                    </text:list>
                  </text:list-item>
                  <text:list-item>
                    <text:p xml:id="id151" text:id="id151" text:style-name="P3"><text:span text:style-name="T2">Definiert durch Schlüsselwort </text:span><text:span text:style-name="T38">def,</text:span><text:span text:style-name="T2">Name der Funktion, Parameter-Liste</text:span></text:p>
                    <text:list>
                      <text:list-item>
                        <text:p xml:id="id152" text:id="id152" text:style-name="P3"><text:span text:style-name="T2">Code-Block in Funktion: eingerückt!</text:span></text:p>
                      </text:list-item>
                    </text:list>
                  </text:list-item>
                  <text:list-item>
                    <text:p xml:id="id153" text:id="id153" text:style-name="P3"><text:span text:style-name="T2">Ausführung bei Aufruf (call), danach Programm fortgesetzt</text:span></text:p>
                  </text:list-item>
                  <text:list-item>
                    <text:p xml:id="id154" text:id="id154" text:style-name="P36"><text:span text:style-name="T2">Rückgabe von Werten an Hauptprogramm möglich (</text:span><text:span text:style-name="T22">return</text:span><text:span text:style-name="T2">)</text:span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name="Foliennummernplatzhalter 35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38" draw:text-style-name="P52" xml:id="id148" draw:id="id148" draw:layer="layout" svg:width="30.897cm" svg:height="4.318cm" svg:x="2.631cm" svg:y="14.07cm">
          <draw:text-box>
            <text:p><text:span text:style-name="T31">def</text:span><text:span text:style-name="T16"> test_function(param):</text:span></text:p>
            <text:p><text:span text:style-name="T16"><text:s text:c="4"/></text:span><text:span text:style-name="T31">print</text:span><text:span text:style-name="T16">(f'You passed "{param}" to this function')</text:span></text:p>
            <text:p><text:span text:style-name="T55"/></text:p>
            <text:p><text:span text:style-name="T16">test_function(1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3" draw:text-style-name="P11" draw:layer="layout" svg:width="17.271cm" svg:height="14.167cm" svg:x="2.159cm" svg:y="13.271cm" presentation:class="notes" presentation:user-transformed="true">
            <draw:text-box>
              <text:p><text:span text:style-name="T7">Ab hier: 40 Minuten!</text:span></text:p>
              <text:p><text:span text:style-name="T7">===</text:span></text:p>
              <text:p><text:span text:style-name="T7"/></text:p>
              <text:p><text:span text:style-name="T7">Code einmal </text:span><text:span text:style-name="T7">schreiben, so oft </text:span><text:span text:style-name="T7">wie nötig </text:span><text:span text:style-name="T7">wiederverwenden </text:span><text:span text:style-name="T7">wenn selbe </text:span><text:span text:style-name="T7">aufgabe wieder </text:span><text:span text:style-name="T7">erledigt werden </text:span><text:span text:style-name="T7">muss</text:span></text:p>
              <text:p><text:span text:style-name="T7"/></text:p>
              <text:p><text:span text:style-name="T7">Definition beginnt mit </text:span><text:span text:style-name="T7">Schlüsselwort def, </text:span><text:span text:style-name="T7">folgt der </text:span><text:span text:style-name="T7">Funktionsname, </text:span><text:span text:style-name="T7">dann parameter</text:span></text:p>
              <text:p><text:span text:style-name="T7"/></text:p>
              <text:p text:style-name="P53"><text:span text:style-name="T7">parameter = </text:span><text:span text:style-name="T7">Name/Variable in </text:span><text:span text:style-name="T7">Funktionsdefinition </text:span><text:span text:style-name="T7">(Info</text:span></text:p>
              <text:p><text:span text:style-name="T7">argument = </text:span><text:span text:style-name="T7">information </text:span><text:span text:style-name="T7">übergeben an </text:span><text:span text:style-name="T7">funktion</text:span></text:p>
              <text:p><text:span text:style-name="T7"/></text:p>
              <text:p><text:span text:style-name="T7">Müssen definiert </text:span><text:span text:style-name="T7">werden, bevor sie </text:span><text:span text:style-name="T7">verwendet werden. </text:span><text:span text:style-name="T7">also code zum </text:span><text:span text:style-name="T7">ausführen unter </text:span><text:span text:style-name="T7">Code für def</text:span></text:p>
              <text:p><text:span text:style-name="T7"/></text:p>
              <text:p><text:span text:style-name="T7">Nicht erlaubt, </text:span><text:span text:style-name="T7">mehrere </text:span><text:span text:style-name="T7">Funktionen mit </text:span><text:span text:style-name="T7">selbem Namen zu </text:span><text:span text:style-name="T7">haben</text:span></text:p>
            </draw:text-box>
          </draw:frame>
        </presentation:notes>
      </draw:page>
      <draw:page draw:name="page24" draw:style-name="dp1" draw:master-page-name="Titel_20_und_20_Inhalt_5f_">
        <office:forms form:automatic-focus="false" form:apply-design-mode="false"/>
        <draw:frame draw:name="Titel 36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</text:span><text:span text:style-name="T1">(4): </text:span><text:span text:style-name="T1"><text:line-break/></text:span><text:span text:style-name="T1">Einfaches </text:span><text:span text:style-name="T1">Code-</text:span><text:span text:style-name="T1">Beispiel für </text:span><text:span text:style-name="T1">Definition </text:span><text:span text:style-name="T1">und Aufruf</text:span></text:p>
          </draw:text-box>
        </draw:frame>
        <draw:frame draw:name="Inhaltsplatzhalter 30" presentation:style-name="pr14" draw:text-style-name="P41" draw:layer="layout" svg:width="32.993cm" svg:height="11.938cm" svg:x="1.778cm" svg:y="5.33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><text:span text:style-name="T31">def</text:span><text:span text:style-name="T16"> test_simple():</text:span></text:p>
                    <text:p text:style-name="P16"><text:span text:style-name="T16"><text:s text:c="4"/></text:span><text:span text:style-name="T16">print(f'Hi everyone!') </text:span></text:p>
                    <text:p text:style-name="P16"><text:span text:style-name="T16"/></text:p>
                    <text:p text:style-name="P16"><text:span text:style-name="T31">def</text:span><text:span text:style-name="T16"> test_param(param):</text:span></text:p>
                    <text:p text:style-name="P16"><text:span text:style-name="T16"><text:s text:c="4"/></text:span><text:span text:style-name="T16">print(f'You passed "{param}" to this function') </text:span></text:p>
                    <text:p text:style-name="P16"><text:span text:style-name="T16"/></text:p>
                    <text:p text:style-name="P16"><text:span text:style-name="T16">test_simple()</text:span></text:p>
                    <text:p text:style-name="P16"><text:span text:style-name="T25">test_param(</text:span><text:span text:style-name="T16">'Hello!')</text:span></text:p>
                  </text:list-header>
                </text:list>
              </text:list-item>
            </text:list>
          </draw:text-box>
        </draw:frame>
        <draw:frame draw:name="Foliennummernplatzhalter 36" presentation:style-name="pr3" draw:text-style-name="P19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2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el_20_und_20_Inhalt_5f_">
        <office:forms form:automatic-focus="false" form:apply-design-mode="false"/>
        <draw:frame draw:name="Titel 1_ 1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</text:span><text:span text:style-name="T1">(7): </text:span><text:span text:style-name="T1">Beispiele für </text:span><text:span text:style-name="T1">valide </text:span><text:span text:style-name="T1">Aufrufe</text:span></text:p>
          </draw:text-box>
        </draw:frame>
        <draw:frame draw:name="Foliennummernplatzhalter 5_ 7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frame draw:style-name="gr39" draw:text-style-name="P55" draw:layer="layout" svg:width="33.353cm" svg:height="14.8cm" svg:x="2.008cm" svg:y="3.302cm">
          <draw:text-box>
            <text:p xml:id="id156" text:id="id156"><text:span text:style-name="T56">def</text:span><text:span text:style-name="T57"> say_name(first, last, country='Austria')</text:span><text:span text:style-name="T56">:</text:span></text:p>
            <text:p xml:id="id157" text:id="id157" text:style-name="P54"><text:span text:style-name="T57"><text:s text:c="4"/></text:span><text:span text:style-name="T57">print(f'Firstname is {first}, surname is {last}.')</text:span></text:p>
            <text:p xml:id="id158" text:id="id158"><text:span text:style-name="T57"><text:s text:c="4"/></text:span><text:span text:style-name="T57">print(f'I live in {country}.')</text:span></text:p>
            <text:p><text:span text:style-name="T58"/></text:p>
            <text:p xml:id="id159" text:id="id159"><text:span text:style-name="T57"># Passing arguments by position</text:span></text:p>
            <text:p xml:id="id160" text:id="id160"><text:span text:style-name="T57">say_name('Max', 'Muster') <text:s text:c="11"/></text:span></text:p>
            <text:p xml:id="id161" text:id="id161"><text:span text:style-name="T57">say_name('Maria', 'Muster', 'Germany')</text:span></text:p>
            <text:p><text:span text:style-name="T57"/></text:p>
            <text:p xml:id="id162" text:id="id162"><text:span text:style-name="T57"># Passing arguments using keyword specification</text:span></text:p>
            <text:p xml:id="id163" text:id="id163"><text:span text:style-name="T57">say_name(first='Max', last='Muster')</text:span></text:p>
            <text:p xml:id="id164" text:id="id164" text:style-name="P54"><text:span text:style-name="T57">say_name(country='Germany', first='Maria', last='Muster')</text:span></text:p>
            <text:p text:style-name="P54"><text:span text:style-name="T57"/></text:p>
            <text:p xml:id="id165" text:id="id165" text:style-name="P54"><text:span text:style-name="T57"># Mix of both</text:span></text:p>
            <text:p xml:id="id166" text:id="id166" text:style-name="P54"><text:span text:style-name="T57">say_name('Maria', country='Germany', last='Muster')</text:span></text:p>
          </draw:text-box>
        </draw:frame>
        <draw:polyline draw:style-name="gr40" draw:text-style-name="P32" xml:id="id155" draw:id="id155" draw:layer="layout" svg:width="29.463cm" svg:height="0cm" svg:x="2.54cm" svg:y="6.8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>
        <office:forms form:automatic-focus="false" form:apply-design-mode="false"/>
        <draw:frame draw:style-name="gr41" draw:text-style-name="P55" draw:layer="layout" svg:width="33.353cm" svg:height="15.143cm" svg:x="2.007cm" svg:y="4.318cm">
          <draw:text-box>
            <text:p xml:id="id168" text:id="id168"><text:span text:style-name="T56">def</text:span><text:span text:style-name="T57"> say_name(first, last, country='Austria')</text:span><text:span text:style-name="T56">:</text:span></text:p>
            <text:p xml:id="id169" text:id="id169" text:style-name="P54"><text:span text:style-name="T57"><text:s text:c="4"/></text:span><text:span text:style-name="T57">print(f'Firstname is {first}, surname is {last}.')</text:span></text:p>
            <text:p xml:id="id170" text:id="id170"><text:span text:style-name="T57"><text:s text:c="4"/></text:span><text:span text:style-name="T57">print(f'I live in {country}.')</text:span></text:p>
            <text:p><text:span text:style-name="T57"/></text:p>
            <text:p xml:id="id171" text:id="id171"><text:span text:style-name="T57">say_name('Max')</text:span></text:p>
            <text:p xml:id="id172" text:id="id172"><text:span text:style-name="T57"><text:s text:c="2"/></text:span><text:span text:style-name="T58"># </text:span><text:span text:style-name="T59">TypeError: say_name() missing 1 required positional argument: 'last_name'</text:span></text:p>
            <text:p xml:id="id173" text:id="id173"><text:span text:style-name="T57">say_name('Austria', 'Muster', 'Max</text:span><text:span text:style-name="T60">')</text:span></text:p>
            <text:p xml:id="id174" text:id="id174"><text:span text:style-name="T60"><text:s text:c="2"/></text:span><text:span text:style-name="T61"># </text:span><text:span text:style-name="T62">Kein Fehler in Ausführung, aber: “Logischer Fehler”</text:span></text:p>
            <text:p xml:id="id175" text:id="id175"><text:span text:style-name="T57">say_name(fs='Max', last='Muster')</text:span></text:p>
            <text:p xml:id="id176" text:id="id176"><text:span text:style-name="T57"><text:s text:c="2"/></text:span><text:span text:style-name="T63"># </text:span><text:span text:style-name="T64">TypeError: say_name() got an unexpected keyword argument 'fs'</text:span></text:p>
            <text:p xml:id="id177" text:id="id177" text:style-name="P54"><text:span text:style-name="T57">say_name(first='Max', 'Muster')</text:span></text:p>
            <text:p xml:id="id178" text:id="id178"><text:span text:style-name="T57"><text:s text:c="2"/></text:span><text:span text:style-name="T63"># </text:span><text:span text:style-name="T64">SyntaxError: positional argument follows keyword argument</text:span></text:p>
            <text:p><text:span text:style-name="T63"/></text:p>
            <text:p xml:id="id179" text:id="id179"><text:span text:style-name="T63"># There are many more possibilities for errors :-)</text:span></text:p>
          </draw:text-box>
        </draw:frame>
        <draw:frame draw:name="Titel 1_4" presentation:style-name="pr1" draw:text-style-name="P2" draw:layer="layout" svg:width="32.993cm" svg:height="3.386cm" svg:x="2.446cm" svg:y="0.317cm" presentation:class="title" presentation:user-transformed="true">
          <draw:text-box>
            <text:p text:style-name="P1"><text:span text:style-name="T1">Functions </text:span><text:span text:style-name="T1">(9): </text:span><text:span text:style-name="T1">Argument </text:span><text:span text:style-name="T1">Errors </text:span><text:span text:style-name="T1">(Beispiele)</text:span></text:p>
          </draw:text-box>
        </draw:frame>
        <draw:frame draw:name="Foliennummernplatzhalter 5_ 9" presentation:style-name="pr3" draw:text-style-name="P6" draw:layer="layout" svg:width="1.696cm" svg:height="1.705cm" svg:x="-0.025cm" svg:y="1.174cm" presentation:class="page-number" presentation:user-transformed="true">
          <draw:text-box>
            <text:p text:style-name="P5"><text:span text:style-name="T5"><text:page-number>&lt;Foliennummer&gt;</text:page-number></text:span></text:p>
          </draw:text-box>
        </draw:frame>
        <draw:polyline draw:style-name="gr42" draw:text-style-name="P32" xml:id="id167" draw:id="id167" draw:layer="layout" svg:width="29.463cm" svg:height="0cm" svg:x="2.54cm" svg:y="8.128cm" svg:viewBox="0 0 29464 0" draw:points="0,0 2946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80034" draw:end-color="#ef0043" draw:start-intensity="100%" draw:end-intensity="100%" draw:angle="180deg" draw:border="0%">
      <loext:gradient-stop svg:offset="0" loext:color-type="rgb" loext:color-value="#b80034"/>
      <loext:gradient-stop svg:offset="1" loext:color-type="rgb" loext:color-value="#ef0043"/>
    </draw:gradient>
    <draw:gradient draw:name="Gradient_20_2" draw:display-name="Gradient 2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ef0043" draw:end-color="#ef0043" draw:start-intensity="100%" draw:end-intensity="100%" draw:angle="180deg" draw:border="0%">
      <loext:gradient-stop svg:offset="0" loext:color-type="rgb" loext:color-value="#ef0043"/>
      <loext:gradient-stop svg:offset="1" loext:color-type="rgb" loext:color-value="#ef0043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.965cm" draw:marker-end-width="0.965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Default_5f_1" style:display-name="Default_1" style:family="graphic">
      <style:graphic-properties draw:stroke="solid" draw:stroke-dash="Dashed_20__28_var_29__20_4" svg:stroke-width="0.152cm" svg:stroke-color="#ffff00" draw:marker-start-width="0.432cm" draw:marker-start-center="false" draw:marker-end-width="0.43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5f_3_5f_1" style:display-name="Default_3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_5f_1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Default_20_Drawing_20_Style_5f_3" style:display-name="Default Drawing Style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2_5f_1" style:display-name="Default Drawing Style_2_1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3_5f_1">
      <style:graphic-properties svg:stroke-width="0.508cm" draw:marker-start-width="0.965cm" draw:marker-end-width="0.965cm"/>
    </style:style>
    <style:style style:name="Object_20_without_20_fill_5f_1_5f_1_5f_1" style:display-name="Object without fill_1_1_1" style:family="graphic"/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271f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stroke-dash="Dashed_20__28_var_29__20_4" svg:stroke-color="#000000" draw:fill="none" draw:shadow="hidden" draw:shadow-offset-x="0.254cm" draw:shadow-offset-y="0.254cm"/>
      <style:paragraph-properties loext:tab-stop-distance="0cm">
        <style:tab-stops/>
      </style:paragraph-properties>
    </style:style>
    <style:style style:name="Default_20_Drawing_20_Style_5f_3_5f_1_5f_1" style:display-name="Default Drawing Style_3_1_1" style:family="graphic">
      <style:graphic-properties draw:stroke="solid" draw:stroke-dash="Dashed_20__28_var_29__20_4" svg:stroke-width="0.102cm" svg:stroke-color="#1c99e0" draw:marker-start-width="0.356cm" draw:marker-start-center="false" draw:marker-end-width="0.356cm" draw:marker-end-center="false" draw:fill="none" draw:fill-color="#e0e0e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_5f_1" style:display-name="Default Drawing Style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fffff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solid" draw:fill-color="#ffffff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language="de" fo:country="AT" fo:font-style="normal" style:text-underline-style="none" fo:font-weight="normal" style:font-size-asian="28pt" style:language-asian="de" style:country-asian="AT" style:font-style-asian="normal" style:font-weight-asian="normal" style:font-size-complex="28pt" style:language-complex="de" style:country-complex="A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/>
      <style:text-properties fo:font-variant="normal" fo:text-transform="none" fo:color="#0f0f0f" loext:opacity="100%" style:text-line-through-style="none" style:text-line-through-type="none" style:text-position="0% 100%" style:font-name="Arial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f0f0f" loext:opacity="100%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de" style:country-asian="DE" style:font-style-asian="normal" style:font-weight-asian="normal" style:font-name-complex="Droid Sans Devanagari2" style:font-family-complex="'Droid Sans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93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4" style:family="graphic" style:parent-style-name="standard">
      <style:graphic-properties draw:stroke="none" svg:stroke-width="0.026cm" draw:fill="solid" draw:fill-color="#d9d9d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8" style:family="graphic" style:parent-style-name="standard">
      <style:graphic-properties draw:stroke="none" svg:stroke-width="0.026cm" draw:fill="gradient" draw:fill-gradient-name="gradient" draw:gradient-step-count="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hidden" draw:shadow-offset-x="0cm" draw:shadow-offset-y="0.076cm" draw:shadow-color="#000000" draw:shadow-opacity="35%" loext:decorative="false"/>
    </style:style>
    <style:style style:name="Mgr10" style:family="graphic" style:parent-style-name="standard">
      <style:graphic-properties draw:stroke="none" svg:stroke-width="0.026cm" draw:fill="solid" draw:fill-color="#d9d9d9" draw:textarea-vertical-align="top" draw:auto-grow-height="false" fo:min-height="1.453cm" fo:min-width="35.436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1" style:family="graphic" style:parent-style-name="standard">
      <style:graphic-properties draw:stroke="none" svg:stroke-width="0.018cm" draw:stroke-linejoin="miter" draw:fill="solid" draw:fill-color="#f70146" draw:textarea-vertical-align="middle" draw:auto-grow-height="false" draw:fit-to-size="false" style:shrink-to-fit="false" fo:min-height="1.346cm" fo:min-width="0.977cm" fo:padding-top="0.18cm" fo:padding-bottom="0.18cm" fo:padding-left="0.36cm" fo:padding-right="0.36cm" fo:wrap-option="wrap" loext:decorative="false"/>
    </style:style>
    <style:style style:name="Mgr12" style:family="graphic" style:parent-style-name="standard">
      <style:graphic-properties draw:stroke="none" svg:stroke-width="0.018cm" draw:stroke-linejoin="miter" draw:fill="solid" draw:fill-color="#d9d9d9" draw:textarea-vertical-align="middle" draw:auto-grow-height="false" draw:fit-to-size="false" style:shrink-to-fit="false" fo:min-height="1.346cm" fo:min-width="35.219cm" fo:padding-top="0.18cm" fo:padding-bottom="0.18cm" fo:padding-left="0.36cm" fo:padding-right="0.36cm" fo:wrap-option="wrap" loext:decorative="false"/>
    </style:style>
    <style:style style:name="Mgr13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gr14" style:family="graphic" style:parent-style-name="standard">
      <style:graphic-properties draw:stroke="none" svg:stroke-width="0.026cm" draw:fill="gradient" draw:fill-gradient-name="Gradient_20_1" draw:textarea-vertical-align="top" draw:auto-grow-height="false" fo:min-height="1.453cm" fo:min-width="1.194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Titel_20_und_20_Inhalt_5f__5f_-title">
      <style:graphic-properties draw:stroke="none" svg:stroke-width="0cm" draw:fill="none" draw:textarea-vertical-align="middle" draw:auto-grow-height="false" draw:fit-to-size="false" style:shrink-to-fit="false" fo:min-height="3.393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8cm" fo:padding-bottom="0.18cm" fo:padding-left="0cm" fo:padding-right="0cm" fo:wrap-option="wrap" loext:decorative="false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1" style:family="paragraph">
      <loext:graphic-properties draw:fill="gradient" draw:fill-gradient-name="gradient" draw:gradient-step-count="0"/>
      <style:paragraph-properties fo:text-align="start"/>
      <style:text-properties fo:font-size="18pt"/>
    </style:style>
    <style:style style:name="MP12" style:family="paragraph">
      <loext:graphic-properties draw:fill="solid" draw:fill-color="#f70146"/>
      <style:paragraph-properties fo:text-align="start" style:font-independent-line-spacing="true"/>
      <style:text-properties fo:font-size="26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.019cm" fo:margin-right="0cm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07cm" fo:font-style="normal" style:text-underline-style="none" fo:font-weight="normal" style:font-name-asian="ＭＳ Ｐゴシック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MT3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70146" loext:opacity="100%" style:text-line-through-style="none" style:text-line-through-type="none" style:text-position="0% 100%" style:font-name="Arial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MT9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7pt" fo:letter-spacing="0.01cm" fo:font-style="normal" style:text-underline-style="none" fo:font-weight="normal" style:font-name-asian="ＭＳ Ｐゴシック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2" style:family="text">
      <style:text-properties fo:font-variant="normal" fo:text-transform="none" fo:color="#0f0f0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344cm" svg:height="3.392cm" svg:x="1.796cm" svg:y="0.81cm" presentation:class="title" presentation:placeholder="true">
        <draw:text-box/>
      </draw:frame>
      <draw:frame presentation:style-name="Blank_20_Slide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custom-shape draw:name="CustomShape 2" draw:style-name="Mgr7" draw:text-style-name="MP10" draw:layer="backgroundobjects" svg:width="1.693cm" svg:height="1.702cm" svg:x="0.005cm" svg:y="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344cm" svg:height="3.392cm" svg:x="1.796cm" svg:y="0.81cm" presentation:class="title" presentation:placeholder="true">
        <draw:text-box/>
      </draw:frame>
      <draw:frame presentation:style-name="Default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529cm" svg:height="10.476cm" svg:x="1.5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8" draw:text-style-name="MP11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-title" draw:layer="backgroundobjects" svg:width="32.344cm" svg:height="3.392cm" svg:x="1.796cm" svg:y="0.81cm" presentation:class="title" presentation:placeholder="true">
        <draw:text-box/>
      </draw:frame>
      <draw:frame presentation:style-name="Default_20_1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529cm" svg:height="10.476cm" svg:x="1.5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2.344cm" svg:height="3.392cm" svg:x="1.796cm" svg:y="0.81cm" presentation:class="title" presentation:placeholder="true">
        <draw:text-box/>
      </draw:frame>
      <draw:frame presentation:style-name="Default_20_2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529cm" svg:height="10.476cm" svg:x="1.5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8.529cm" svg:height="10.476cm" svg:x="1.53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11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12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13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14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529cm" svg:height="10.476cm" svg:x="1.53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Bild 1" draw:style-name="Mgr5" draw:text-style-name="MP7" draw:layer="backgroundobjects" svg:width="35.938cm" svg:height="18.627cm" svg:x="0cm" svg:y="0cm">
        <draw:image xlink:href="Pictures/1000000000000BB80000060C87567720.jpg" xlink:type="simple" xlink:show="embed" xlink:actuate="onLoad" draw:mime-type="image/jpeg">
          <text:p/>
        </draw:image>
      </draw:frame>
      <draw:frame draw:name="Titel 1" presentation:style-name="Mpr17" draw:text-style-name="MP22" draw:layer="backgroundobjects" svg:width="24.053cm" svg:height="6.74cm" svg:x="2.446cm" svg:y="3.868cm" presentation:class="title" presentation:user-transformed="true">
        <draw:text-box>
          <text:p text:style-name="MP14"><text:span text:style-name="MT8">Klicken </text:span><text:span text:style-name="MT8">und </text:span><text:span text:style-name="MT8">eine </text:span><text:span text:style-name="MT8"><text:line-break/></text:span><text:span text:style-name="MT8">Übersch</text:span><text:span text:style-name="MT8">rift </text:span><text:span text:style-name="MT8">hinzufüg</text:span><text:span text:style-name="MT8">en</text:span></text:p>
        </draw:text-box>
      </draw:frame>
      <draw:frame draw:name="Datumsplatzhalter 16" presentation:style-name="Mpr18" draw:text-style-name="MP24" draw:layer="backgroundobjects" svg:width="24.053cm" svg:height="0.999cm" svg:x="2.446cm" svg:y="13.34cm" presentation:class="date-time" presentation:user-transformed="true">
        <draw:text-box>
          <text:p text:style-name="MP23"><text:span text:style-name="MT9">Thorsten </text:span><text:span text:style-name="MT9">Ruprechter</text:span></text:p>
        </draw:text-box>
      </draw:frame>
      <draw:frame draw:name="Fußzeilenplatzhalter 17" presentation:style-name="Mpr18" draw:text-style-name="MP24" draw:layer="backgroundobjects" svg:width="24.053cm" svg:height="2.232cm" svg:x="2.446cm" svg:y="10.738cm" presentation:class="footer" presentation:user-transformed="true">
        <draw:text-box>
          <text:p text:style-name="MP23"><text:span text:style-name="MT10">Informatik BW</text:span></text:p>
        </draw:text-box>
      </draw:frame>
      <draw:custom-shape draw:name="Textfeld 271" draw:style-name="Mgr6" draw:text-style-name="MP26" draw:layer="backgroundobjects" svg:width="5.659cm" svg:height="2.161cm" svg:x="29.36cm" svg:y="3.386cm">
        <text:p text:style-name="MP25"><text:span text:style-name="MT11">WISSEN</text:span></text:p>
        <text:p text:style-name="MP25"><text:span text:style-name="MT11">TECHNIK</text:span></text:p>
        <text:p text:style-name="MP25"><text:span text:style-name="MT11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9" draw:text-style-name="MP28" draw:layer="backgroundobjects" svg:width="29.224cm" svg:height="0.789cm" svg:x="2.446cm" svg:y="18.998cm" presentation:class="outline" presentation:user-transformed="true">
        <draw:text-box>
          <text:list text:style-name="ML3">
            <text:list-item>
              <text:p text:style-name="MP27"><text:span text:style-name="MT12">Klicken und Webadresse hinzufügen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2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2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2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</text:span></text:p>
        </draw:text-box>
      </draw:frame>
      <draw:frame draw:name="Foliennummernplatzhalter 5" presentation:style-name="Mpr2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8.529cm" svg:height="10.476cm" svg:x="1.5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3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8.529cm" svg:height="10.476cm" svg:x="1.53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9" draw:text-style-name="MP10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presentation:style-name="Default_20_1_5f__5f__5f_-title" draw:layer="backgroundobjects" svg:width="32.344cm" svg:height="3.392cm" svg:x="1.796cm" svg:y="0.81cm" presentation:class="title" presentation:placeholder="true">
        <draw:text-box/>
      </draw:frame>
      <draw:frame presentation:style-name="Default_20_1_5f__5f_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Default_20_1_5f__5f__5f_-title" draw:layer="backgroundobjects" svg:width="18.529cm" svg:height="10.476cm" svg:x="1.53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8" draw:style-name="Mgr11" draw:text-style-name="MP12" draw:layer="backgroundobjects" svg:width="1.696cm" svg:height="1.705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12" draw:text-style-name="MP13" draw:layer="backgroundobjects" svg:width="35.938cm" svg:height="1.705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6cm" svg:height="1.26cm" svg:x="32.008cm" svg:y="0.419cm">
        <draw:image xlink:href="Pictures/10000000000002C50000010568046CC3.jpg" xlink:type="simple" xlink:show="embed" xlink:actuate="onLoad" draw:mime-type="image/jpeg">
          <text:p/>
        </draw:image>
        <svg:desc>TU-Graz-logo-RGB-echte-Farbwerte.jpg</svg:desc>
      </draw:frame>
      <draw:frame draw:name="Picture 2" draw:style-name="Mgr5" draw:text-style-name="MP7" draw:layer="backgroundobjects" svg:width="3.055cm" svg:height="1.69cm" svg:x="32.872cm" svg:y="18.629cm">
        <draw:image xlink:href="Pictures/100000000000012C000000A6E76EA89D.jpg" xlink:type="simple" xlink:show="embed" xlink:actuate="onLoad" draw:mime-type="image/jpeg">
          <text:p/>
        </draw:image>
        <svg:desc>https://www.tugraz.at/fileadmin/_migrated/pics/logo_isds_300px.jpg</svg:desc>
      </draw:frame>
      <draw:frame draw:name="Titel 1" presentation:style-name="Mpr32" draw:text-style-name="MP15" draw:layer="backgroundobjects" svg:width="32.993cm" svg:height="3.386cm" svg:x="2.446cm" svg:y="0.317cm" presentation:class="title" presentation:user-transformed="true">
        <draw:text-box>
          <text:p text:style-name="MP14"><text:span text:style-name="MT3">Mastertitelfo</text:span><text:span text:style-name="MT3">rmat </text:span><text:span text:style-name="MT3">bearbeiten</text:span></text:p>
        </draw:text-box>
      </draw:frame>
      <draw:frame draw:name="Inhaltsplatzhalter 2" presentation:style-name="Mpr33" draw:text-style-name="MP18" draw:layer="backgroundobjects" svg:width="32.993cm" svg:height="13.897cm" svg:x="2.446cm" svg:y="4.546cm" presentation:class="outline" presentation:user-transformed="true">
        <draw:text-box>
          <text:list text:style-name="ML3">
            <text:list-item>
              <text:p text:style-name="MP16"><text:span text:style-name="MT4">Zweite Ebene</text:span></text:p>
              <text:list>
                <text:list-item>
                  <text:p text:style-name="MP16"><text:span text:style-name="MT4">Dritte Ebene</text:span></text:p>
                  <text:list>
                    <text:list-item>
                      <text:p text:style-name="MP16"><text:span text:style-name="MT4">Vierte Ebene</text:span></text:p>
                      <text:list>
                        <text:list-item>
                          <text:p text:style-name="MP17"><text:span text:style-name="MT4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4" draw:text-style-name="MP20" draw:layer="backgroundobjects" svg:width="32.542cm" svg:height="0.607cm" svg:x="2.446cm" svg:y="19.474cm" presentation:class="date-time" presentation:user-transformed="true">
        <draw:text-box>
          <text:p text:style-name="MP19"><text:span text:style-name="MT5">Thorsten Ruprechter</text:span></text:p>
        </draw:text-box>
      </draw:frame>
      <draw:frame draw:name="Fußzeilenplatzhalter 4" presentation:style-name="Mpr34" draw:text-style-name="MP20" draw:layer="backgroundobjects" svg:width="32.542cm" svg:height="0.607cm" svg:x="2.446cm" svg:y="18.839cm" presentation:class="footer" presentation:user-transformed="true">
        <draw:text-box>
          <text:p text:style-name="MP19"><text:span text:style-name="MT6">Informatik BW, WS19</text:span></text:p>
        </draw:text-box>
      </draw:frame>
      <draw:frame draw:name="Foliennummernplatzhalter 5" presentation:style-name="Mpr35" draw:text-style-name="MP20" draw:layer="backgroundobjects" svg:width="1.696cm" svg:height="1.705cm" svg:x="-0.025cm" svg:y="1.174cm" presentation:class="page-number" presentation:user-transformed="true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8.529cm" svg:height="10.476cm" svg:x="1.53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14" draw:text-style-name="MP5" draw:layer="backgroundobjects" svg:width="1.693cm" svg:height="1.702cm" svg:x="0.005cm" svg:y="1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6" draw:layer="backgroundobjects" svg:width="35.935cm" svg:height="1.702cm" svg:x="0cm" svg:y="18.6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1" draw:style-name="Mgr5" draw:text-style-name="MP7" draw:layer="backgroundobjects" svg:width="3.403cm" svg:height="1.257cm" svg:x="32.008cm" svg:y="0.419cm">
        <draw:image xlink:href="Pictures/10000000000002C50000010568046CC3.jpg" xlink:type="simple" xlink:show="embed" xlink:actuate="onLoad" draw:mime-type="image/jpeg">
          <text:p/>
        </draw:image>
      </draw:frame>
      <draw:frame draw:name="Picture 2" draw:style-name="Mgr5" draw:text-style-name="MP7" draw:layer="backgroundobjects" svg:width="3.052cm" svg:height="1.687cm" svg:x="32.872cm" svg:y="18.629cm">
        <draw:image xlink:href="Pictures/100000000000012C000000A6E76EA89D.jpg" xlink:type="simple" xlink:show="embed" xlink:actuate="onLoad" draw:mime-type="image/jpeg">
          <text:p/>
        </draw:image>
      </draw:frame>
      <draw:frame draw:name="Bild 1" draw:style-name="Mgr5" draw:text-style-name="MP7" draw:layer="backgroundobjects" svg:width="35.935cm" svg:height="18.624cm" svg:x="0cm" svg:y="0cm">
        <draw:image xlink:href="Pictures/1000000000000BB80000060C87567720.jpg" xlink:type="simple" xlink:show="embed" xlink:actuate="onLoad" draw:mime-type="image/jpeg">
          <text:p/>
        </draw:image>
      </draw:frame>
      <draw:custom-shape draw:name="CustomShape 3" draw:style-name="Mgr6" draw:text-style-name="MP29" draw:layer="backgroundobjects" svg:width="5.656cm" svg:height="2.161cm" svg:x="29.36cm" svg:y="3.386cm">
        <text:p text:style-name="MP8"><text:span text:style-name="MT2">WISSEN</text:span></text:p>
        <text:p text:style-name="MP8"><text:span text:style-name="MT2">TECHNIK</text:span></text:p>
        <text:p text:style-name="MP8"><text:span text:style-name="MT2">LEIDE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2.344cm" svg:height="3.392cm" svg:x="1.796cm" svg:y="0.81cm" presentation:class="title" presentation:placeholder="true">
        <draw:text-box/>
      </draw:frame>
      <draw:frame presentation:style-name="Blank_20_Slide_5f_-outline1" draw:layer="backgroundobjects" svg:width="32.344cm" svg:height="11.784cm" svg:x="1.796cm" svg:y="4.75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7T14:41:22</meta:creation-date>
    <meta:initial-creator>cd@tugraz.at</meta:initial-creator>
    <dc:language>en-US</dc:language>
    <dc:date>2026-05-26T12:25:05.359124238</dc:date>
    <meta:editing-cycles>1152</meta:editing-cycles>
    <dc:title>Python Crash Course A</dc:title>
    <meta:editing-duration>P3DT16H24M31S</meta:editing-duration>
    <meta:generator>LibreOffice/24.2.7.2$Linux_X86_64 LibreOffice_project/420$Build-2</meta:generator>
    <meta:print-date>2019-10-08T16:20:18.516837285</meta:print-date>
    <meta:document-statistic meta:object-count="3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