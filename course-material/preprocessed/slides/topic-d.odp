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0675A4140C4.png" manifest:media-type="image/png"/>
  <manifest:file-entry manifest:full-path="Pictures/100000010000040B0000040023B8C212.png" manifest:media-type="image/png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Default_20_Drawing_20_Style_5f_3_5f_1_5f_1">
      <style:graphic-properties draw:stroke="none" draw:fill="none" fo:min-height="10.667cm" loext:decorative="false"/>
      <style:paragraph-properties style:writing-mode="lr-tb"/>
    </style:style>
    <style:style style:name="gr3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52cm" fo:min-width="0cm" fo:padding-top="0.176cm" fo:padding-bottom="0.176cm" fo:padding-left="0.301cm" fo:padding-right="0.301cm" loext:decorative="false"/>
    </style:style>
    <style:style style:name="gr4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3.742cm" fo:min-width="0cm" fo:padding-top="0.176cm" fo:padding-bottom="0.176cm" fo:padding-left="0.301cm" fo:padding-right="0.301cm" loext:decorative="false"/>
    </style:style>
    <style:style style:name="gr5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88cm" fo:min-width="0cm" fo:padding-top="0.176cm" fo:padding-bottom="0.176cm" fo:padding-left="0.301cm" fo:padding-right="0.301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Default_20_Drawing_20_Style_5f_3_5f_1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8" style:family="graphic" style:parent-style-name="Default_20_Drawing_20_Style_5f_3_5f_1_5f_1">
      <style:graphic-properties draw:stroke="none" draw:fill="solid" draw:fill-color="#e0e0e0" fo:min-height="1.12cm" loext:decorative="false"/>
      <style:paragraph-properties style:writing-mode="lr-tb"/>
    </style:style>
    <style:style style:name="gr9" style:family="graphic" style:parent-style-name="Default_20_Drawing_20_Style_5f_3_5f_1_5f_1">
      <style:graphic-properties draw:stroke="none" draw:fill="solid" draw:fill-color="#ffffff" fo:min-height="1.528cm" loext:decorative="false"/>
      <style:paragraph-properties style:writing-mode="lr-tb"/>
    </style:style>
    <style:style style:name="gr10" style:family="graphic" style:parent-style-name="Default_20_Drawing_20_Style_5f_3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11" style:family="graphic" style:parent-style-name="Default_20_Drawing_20_Style_5f_3_5f_1">
      <style:graphic-properties draw:stroke="none" draw:fill="solid" draw:fill-color="#e0e0e0" fo:min-height="0.962cm" loext:decorative="false"/>
      <style:paragraph-properties style:writing-mode="lr-tb"/>
    </style:style>
    <style:style style:name="gr12" style:family="graphic" style:parent-style-name="Default_20_Drawing_20_Style_5f_3_5f_1">
      <style:graphic-properties draw:stroke="none" draw:fill="solid" draw:fill-color="#ffffff" fo:min-height="2.955cm" loext:decorative="false"/>
      <style:paragraph-properties style:writing-mode="lr-tb"/>
    </style:style>
    <style:style style:name="gr13" style:family="graphic" style:parent-style-name="Default_20_Drawing_20_Style_5f_3_5f_1">
      <style:graphic-properties draw:stroke="none" draw:fill="solid" draw:fill-color="#e0e0e0" draw:textarea-vertical-align="middle" fo:min-height="2.52cm" loext:decorative="false"/>
      <style:paragraph-properties style:writing-mode="lr-tb"/>
    </style:style>
    <style:style style:name="gr14" style:family="graphic" style:parent-style-name="Default_20_Drawing_20_Style_5f_3_5f_1">
      <style:graphic-properties draw:stroke="none" draw:fill="solid" draw:fill-color="#ffffff" fo:min-height="1.528cm" loext:decorative="false"/>
      <style:paragraph-properties style:writing-mode="lr-tb"/>
    </style:style>
    <style:style style:name="gr15" style:family="graphic" style:parent-style-name="Default_20_Drawing_20_Style_5f_3_5f_1">
      <style:graphic-properties draw:stroke="none" draw:fill="solid" draw:fill-color="#e0e0e0" fo:min-height="4.068cm" loext:decorative="false"/>
      <style:paragraph-properties style:writing-mode="lr-tb"/>
    </style:style>
    <style:style style:name="gr16" style:family="graphic" style:parent-style-name="Default_20_Drawing_20_Style_5f_3_5f_1_5f_1">
      <style:graphic-properties draw:stroke="none" draw:fill="none" fo:min-height="14.55cm" loext:decorative="false"/>
      <style:paragraph-properties style:writing-mode="lr-tb"/>
    </style:style>
    <style:style style:name="gr17" style:family="graphic" style:parent-style-name="Object_20_without_20_fill_5f_1_5f_1">
      <style:graphic-properties svg:stroke-color="#050505" draw:fill="solid" draw:textarea-vertical-align="middle" loext:decorative="false"/>
    </style:style>
    <style:style style:name="gr18" style:family="graphic" style:parent-style-name="standard">
      <style:graphic-properties draw:stroke="none" draw:fill="none" fo:min-height="14.893cm" loext:decorative="false"/>
      <style:paragraph-properties style:writing-mode="lr-tb"/>
    </style:style>
    <style:style style:name="gr19" style:family="graphic" style:parent-style-name="objectwithoutfill">
      <style:graphic-properties svg:stroke-color="#050505" draw:fill="solid" draw:textarea-vertical-align="middle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4.167cm" loext:decorative="false"/>
      <style:paragraph-properties style:writing-mode="lr-tb"/>
    </style:style>
    <style:style style:name="pr7" style:family="presentation" style:parent-style-name="Titel_20_und_20_Inhalt_5f_-outline1" style:list-style-name="L3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e0e0e0"/>
      <style:paragraph-properties fo:text-align="center"/>
    </style:style>
    <style:style style:name="P13" style:family="paragraph">
      <loext:graphic-properties draw:fill="solid" draw:fill-color="#ffffff"/>
      <style:text-properties fo:font-size="36pt" style:font-size-asian="36pt" style:font-size-complex="36pt"/>
    </style:style>
    <style:style style:name="P14" style:family="paragraph">
      <loext:graphic-properties draw:fill="solid" draw:fill-color="#e0e0e0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solid" draw:fill-color="#e0e0e0"/>
    </style:style>
    <style:style style:name="P16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e0e0e0"/>
      <style:text-properties fo:font-size="18pt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text-properties style:font-name="Courier New" fo:font-size="26pt" style:font-size-asian="26pt" style:font-size-complex="26pt"/>
    </style:style>
    <style:style style:name="P27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4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4pt" style:language-asian="de" style:country-asian="AT" style:font-style-asian="normal" style:font-weight-asian="normal" style:font-name-complex="Droid Sans Devanagari2" style:font-size-complex="24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>
        <office:forms form:automatic-focus="false" form:apply-design-mode="false"/>
        <draw:frame draw:name="Titel 2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0): Grundkonzept</text:span></text:p>
          </draw:text-box>
        </draw:frame>
        <draw:frame draw:name="Datumsplatzhalter 32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31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32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" draw:text-style-name="P7" xml:id="id1" draw:id="id1" draw:layer="layout" svg:width="12.214cm" svg:height="12.085cm" svg:x="0.824cm" svg:y="4.895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2" draw:text-style-name="P8" draw:layer="layout" svg:width="21.643cm" svg:height="10.917cm" svg:x="14.163cm" svg:y="5.904cm">
          <draw:text-box>
            <text:p xml:id="id2" text:id="id2"><text:span text:style-name="T5">Input-Parameter/Argumente</text:span></text:p>
            <text:p><text:span text:style-name="T5"/></text:p>
            <text:p><text:span text:style-name="T5"/></text:p>
            <text:p><text:span text:style-name="T5"/></text:p>
            <text:p xml:id="id4" text:id="id4"><text:span text:style-name="T5">Funktions-Logik (Code)</text:span></text:p>
            <text:p><text:span text:style-name="T5"/></text:p>
            <text:p><text:span text:style-name="T6"/></text:p>
            <text:p xml:id="id6" text:id="id6"><text:span text:style-name="T5">Rückgabewert (</text:span><text:span text:style-name="T7">return</text:span><text:span text:style-name="T5"> value), Konsolen-Output, Speichern in Parameter, File-Output...</text:span></text:p>
          </draw:text-box>
        </draw:frame>
        <draw:custom-shape draw:style-name="gr3" draw:text-style-name="P7" xml:id="id3" draw:id="id3" draw:layer="layout" svg:width="1.109cm" svg:height="1.27cm" svg:x="13.012cm" svg:y="5.9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7" xml:id="id5" draw:id="id5" draw:layer="layout" svg:width="1.109cm" svg:height="4.318cm" svg:x="13.029cm" svg:y="8.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xml:id="id7" draw:id="id7" draw:layer="layout" svg:width="1.109cm" svg:height="1.308cm" svg:x="13.054cm" svg:y="14.6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>
            <draw:text-box>
              <text:p><text:span text:style-name="T8">parameter = Name/Variable in Funktionsdefinition</text:span></text:p>
              <text:p><text:span text:style-name="T8">argument = information übergeben an funktion</text:span></text:p>
              <text:p><text:span text:style-name="T8"/></text:p>
              <text:p><text:span text:style-name="T8">manchmal vertauscht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3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9">Functions (1): </text:span><text:span text:style-name="T9"><text:line-break/></text:span><text:span text:style-name="T9">Beispiel </text:span><text:span text:style-name="T10">print('This', 'is', 'a', 'Test')</text:span></text:p>
          </draw:text-box>
        </draw:frame>
        <draw:frame draw:name="Datumsplatzhalter 33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32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33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" draw:text-style-name="P7" draw:layer="layout" svg:width="12.214cm" svg:height="12.085cm" svg:x="6.524cm" svg:y="4.4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7" draw:text-style-name="P10" xml:id="id10" draw:id="id10" draw:layer="layout" svg:width="15.494cm" svg:height="1.369cm" svg:x="10.728cm" svg:y="5.404cm">
          <draw:text-box>
            <text:p><text:span text:style-name="T10">'This', 'is', 'a', 'Test'</text:span></text:p>
          </draw:text-box>
        </draw:frame>
        <draw:frame draw:style-name="gr1" draw:text-style-name="P7" xml:id="id12" draw:id="id12" draw:layer="layout" svg:width="11.856cm" svg:height="1.853cm" svg:x="16.156cm" svg:y="14.478cm">
          <draw:image xlink:href="Pictures/1000000000000293000000675A4140C4.png" xlink:type="simple" xlink:show="embed" xlink:actuate="onLoad" draw:mime-type="image/png">
            <text:p/>
          </draw:image>
        </draw:frame>
        <draw:frame draw:style-name="gr8" draw:text-style-name="P12" xml:id="id8" draw:id="id8" draw:layer="layout" svg:width="6.858cm" svg:height="1.37cm" svg:x="8.89cm" svg:y="9.876cm">
          <draw:text-box>
            <text:p text:style-name="P11"><text:span text:style-name="T10">print</text:span></text:p>
          </draw:text-box>
        </draw:frame>
        <draw:frame draw:style-name="gr9" draw:text-style-name="P13" xml:id="id11" draw:id="id11" draw:layer="layout" svg:width="7.112cm" svg:height="1.778cm" svg:x="9.044cm" svg:y="14.478cm">
          <draw:text-box>
            <text:p><text:span text:style-name="T11">In Konsole:</text:span></text:p>
          </draw:text-box>
        </draw:frame>
        <draw:frame draw:style-name="gr9" draw:text-style-name="P13" xml:id="id9" draw:id="id9" draw:layer="layout" svg:width="7.112cm" svg:height="1.778cm" svg:x="3.81cm" svg:y="5.08cm">
          <draw:text-box>
            <text:p><text:span text:style-name="T11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>
            <draw:text-box>
              <text:p><text:span text:style-name="T8">parameter = Name/Variable in Funktionsdefinition</text:span></text:p>
              <text:p><text:span text:style-name="T8">argument = information übergeben an funktion</text:span></text:p>
              <text:p><text:span text:style-name="T8"/></text:p>
              <text:p><text:span text:style-name="T8">manchmal vertauscht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3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9">Functions (2): </text:span><text:span text:style-name="T9"><text:line-break/></text:span><text:span text:style-name="T9">Beispiel </text:span><text:span text:style-name="T10">len([4, 8, 'This', 'Test'])</text:span></text:p>
          </draw:text-box>
        </draw:frame>
        <draw:frame draw:name="Datumsplatzhalter 34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33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34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" draw:text-style-name="P7" draw:layer="layout" svg:width="12.214cm" svg:height="12.085cm" svg:x="11.024cm" svg:y="4.0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10" draw:text-style-name="P10" xml:id="id14" draw:id="id14" draw:layer="layout" svg:width="15.494cm" svg:height="1.369cm" svg:x="15.228cm" svg:y="4.804cm">
          <draw:text-box>
            <text:p><text:span text:style-name="T10">[4, 8, 'This', 'Test']</text:span></text:p>
          </draw:text-box>
        </draw:frame>
        <draw:frame draw:style-name="gr11" draw:text-style-name="P14" xml:id="id13" draw:id="id13" draw:layer="layout" svg:width="7.62cm" svg:height="1.212cm" svg:x="13.082cm" svg:y="9.476cm">
          <draw:text-box>
            <text:p text:style-name="P11"><text:span text:style-name="T12">len</text:span></text:p>
          </draw:text-box>
        </draw:frame>
        <draw:frame draw:style-name="gr12" draw:text-style-name="P13" xml:id="id16" draw:id="id16" draw:layer="layout" svg:width="10.706cm" svg:height="3.205cm" svg:x="9.652cm" svg:y="13.97cm">
          <draw:text-box>
            <text:p><text:span text:style-name="T11">Rückgabewert </text:span></text:p>
            <text:p><text:span text:style-name="T11">(</text:span><text:span text:style-name="T13">return</text:span><text:span text:style-name="T11">-value)</text:span></text:p>
          </draw:text-box>
        </draw:frame>
        <draw:frame draw:style-name="gr13" draw:text-style-name="P15" xml:id="id17" draw:id="id17" draw:layer="layout" svg:width="2.784cm" svg:height="2.77cm" svg:x="20.256cm" svg:y="13.994cm">
          <draw:text-box>
            <text:p text:style-name="P11"><text:span text:style-name="T10">4</text:span></text:p>
          </draw:text-box>
        </draw:frame>
        <draw:frame draw:style-name="gr14" draw:text-style-name="P13" xml:id="id15" draw:id="id15" draw:layer="layout" svg:width="7.112cm" svg:height="1.778cm" svg:x="8.128cm" svg:y="4.572cm">
          <draw:text-box>
            <text:p><text:span text:style-name="T11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>
            <draw:text-box>
              <text:p><text:span text:style-name="T8">parameter = Name/Variable in Funktionsdefinition</text:span></text:p>
              <text:p><text:span text:style-name="T8">argument = information übergeben an funktion</text:span></text:p>
              <text:p><text:span text:style-name="T8"/></text:p>
              <text:p><text:span text:style-name="T8">manchmal vertauscht</text:span>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3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ktionen/Functions (3)</text:span></text:p>
          </draw:text-box>
        </draw:frame>
        <draw:frame draw:name="Inhaltsplatzhalter 28" presentation:style-name="pr5" draw:text-style-name="P18" draw:layer="layout" svg:width="32.993cm" svg:height="14.74cm" svg:x="2.446cm" svg:y="3.403cm" presentation:class="outline" presentation:user-transformed="true">
          <draw:text-box>
            <text:list text:style-name="L3">
              <text:list-item>
                <text:list>
                  <text:list-item>
                    <text:p xml:id="id18" text:id="id18" text:style-name="P16"><text:span text:style-name="T14">„</text:span><text:span text:style-name="T14">Benannter Codeblock“ mit spezifischer Aufgabe</text:span></text:p>
                    <text:list>
                      <text:list-item>
                        <text:p xml:id="id20" text:id="id20" text:style-name="P16"><text:span text:style-name="T14">Wiederverwendbar, einfacher lesbar, besser wartbar</text:span></text:p>
                      </text:list-item>
                      <text:list-item>
                        <text:p xml:id="id21" text:id="id21" text:style-name="P16"><text:span text:style-name="T14">Beispiele von Python-Funktionen: </text:span><text:span text:style-name="T10">len()</text:span><text:span text:style-name="T14">, </text:span><text:span text:style-name="T10">print()</text:span><text:span text:style-name="T14">, </text:span><text:span text:style-name="T15">input()</text:span><text:span text:style-name="T14">, … </text:span></text:p>
                      </text:list-item>
                    </text:list>
                  </text:list-item>
                  <text:list-item>
                    <text:p xml:id="id22" text:id="id22" text:style-name="P16"><text:span text:style-name="T14">Definiert durch Schlüsselwort </text:span><text:span text:style-name="T16">def,</text:span><text:span text:style-name="T14">Name der Funktion, Parameter-Liste</text:span></text:p>
                    <text:list>
                      <text:list-item>
                        <text:p xml:id="id23" text:id="id23" text:style-name="P16"><text:span text:style-name="T14">Code-Block in Funktion: eingerückt!</text:span></text:p>
                      </text:list-item>
                    </text:list>
                  </text:list-item>
                  <text:list-item>
                    <text:p xml:id="id24" text:id="id24" text:style-name="P16"><text:span text:style-name="T14">Ausführung bei Aufruf (call), danach Programm fortgesetzt</text:span></text:p>
                  </text:list-item>
                  <text:list-item>
                    <text:p xml:id="id25" text:id="id25" text:style-name="P17"><text:span text:style-name="T14">Rückgabe von Werten an Hauptprogramm möglich (</text:span><text:span text:style-name="T10">return</text:span><text:span text:style-name="T14">)</text:span></text:p>
                    <text:p text:style-name="P16"><text:span text:style-name="T14"/></text:p>
                    <text:p text:style-name="P16"><text:span text:style-name="T14"/></text:p>
                  </text:list-item>
                </text:list>
              </text:list-item>
            </text:list>
          </draw:text-box>
        </draw:frame>
        <draw:frame draw:name="Datumsplatzhalter 35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34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3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5" draw:text-style-name="P19" xml:id="id19" draw:id="id19" draw:layer="layout" svg:width="30.897cm" svg:height="4.318cm" svg:x="2.631cm" svg:y="14.07cm">
          <draw:text-box>
            <text:p><text:span text:style-name="T17">def</text:span><text:span text:style-name="T7"> test_function(param):</text:span></text:p>
            <text:p><text:span text:style-name="T7"><text:s text:c="4"/></text:span><text:span text:style-name="T17">print</text:span><text:span text:style-name="T7">(f'You passed "{param}" to this function')</text:span></text:p>
            <text:p><text:span text:style-name="T18"/></text:p>
            <text:p><text:span text:style-name="T7">test_function(1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9" draw:layer="layout" svg:width="17.271cm" svg:height="14.167cm" svg:x="2.159cm" svg:y="13.271cm" presentation:class="notes" presentation:user-transformed="true">
            <draw:text-box>
              <text:p><text:span text:style-name="T8">Ab hier: 40 Minuten!</text:span></text:p>
              <text:p><text:span text:style-name="T8">===</text:span></text:p>
              <text:p><text:span text:style-name="T8"/></text:p>
              <text:p><text:span text:style-name="T8">Code einmal schreiben, so oft wie nötig wiederverwenden wenn selbe aufgabe wieder erledigt werden muss</text:span></text:p>
              <text:p><text:span text:style-name="T8"/></text:p>
              <text:p><text:span text:style-name="T8">Definition beginnt mit Schlüsselwort def, folgt der Funktionsname, dann parameter</text:span></text:p>
              <text:p><text:span text:style-name="T8"/></text:p>
              <text:p text:style-name="P20"><text:span text:style-name="T8">parameter = Name/Variable in Funktionsdefinition (Info</text:span></text:p>
              <text:p><text:span text:style-name="T8">argument = information übergeben an funktion</text:span></text:p>
              <text:p><text:span text:style-name="T8"/></text:p>
              <text:p><text:span text:style-name="T8">Müssen definiert werden, bevor sie verwendet werden. also code zum ausführen unter Code für def</text:span></text:p>
              <text:p><text:span text:style-name="T8"/></text:p>
              <text:p><text:span text:style-name="T8">Nicht erlaubt, mehrere Funktionen mit selbem Namen zu haben</text:span>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3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4): </text:span><text:span text:style-name="T1"><text:line-break/></text:span><text:span text:style-name="T1">Einfaches Code-Beispiel für Definition und Aufruf</text:span></text:p>
          </draw:text-box>
        </draw:frame>
        <draw:frame draw:name="Inhaltsplatzhalter 30" presentation:style-name="pr7" draw:text-style-name="P22" draw:layer="layout" svg:width="32.993cm" svg:height="11.938cm" svg:x="1.778cm" svg:y="5.33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1"><text:span text:style-name="T17">def</text:span><text:span text:style-name="T7"> test_simple():</text:span></text:p>
                    <text:p text:style-name="P21"><text:span text:style-name="T7"><text:s text:c="4"/></text:span><text:span text:style-name="T7">print(f'Hi everyone!') </text:span></text:p>
                    <text:p text:style-name="P21"><text:span text:style-name="T7"/></text:p>
                    <text:p text:style-name="P21"><text:span text:style-name="T17">def</text:span><text:span text:style-name="T7"> test_param(param):</text:span></text:p>
                    <text:p text:style-name="P21"><text:span text:style-name="T7"><text:s text:c="4"/></text:span><text:span text:style-name="T7">print(f'You passed </text:span><text:span text:style-name="T7">"{param}" to this </text:span><text:span text:style-name="T7">function') </text:span></text:p>
                    <text:p text:style-name="P21"><text:span text:style-name="T7"/></text:p>
                    <text:p text:style-name="P21"><text:span text:style-name="T7">test_simple()</text:span></text:p>
                    <text:p text:style-name="P21"><text:span text:style-name="T19">test_param(</text:span><text:span text:style-name="T7">'Hello!')</text:span></text:p>
                  </text:list-header>
                </text:list>
              </text:list-item>
            </text:list>
          </draw:text-box>
        </draw:frame>
        <draw:frame draw:name="Datumsplatzhalter 36" presentation:style-name="pr2" draw:text-style-name="P23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35" presentation:style-name="pr2" draw:text-style-name="P23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36" presentation:style-name="pr3" draw:text-style-name="P23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4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_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7): Beispiele für valide Aufrufe</text:span></text:p>
          </draw:text-box>
        </draw:frame>
        <draw:frame draw:name="Datumsplatzhalter 3_ 7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4_ 8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5_ 7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6" draw:text-style-name="P26" draw:layer="layout" svg:width="33.353cm" svg:height="14.8cm" svg:x="2.008cm" svg:y="3.302cm">
          <draw:text-box>
            <text:p xml:id="id27" text:id="id27"><text:span text:style-name="T20">def</text:span><text:span text:style-name="T21"> say_name(first, last, country='Austria')</text:span><text:span text:style-name="T20">:</text:span></text:p>
            <text:p xml:id="id28" text:id="id28" text:style-name="P25"><text:span text:style-name="T21"><text:s text:c="4"/></text:span><text:span text:style-name="T21">print(f'Firstname is {first}, surname is {last}.')</text:span></text:p>
            <text:p xml:id="id29" text:id="id29"><text:span text:style-name="T21"><text:s text:c="4"/></text:span><text:span text:style-name="T21">print(f'I live in {country}.')</text:span></text:p>
            <text:p><text:span text:style-name="T22"/></text:p>
            <text:p xml:id="id30" text:id="id30"><text:span text:style-name="T21"># Passing arguments by position</text:span></text:p>
            <text:p xml:id="id31" text:id="id31"><text:span text:style-name="T21">say_name('Max', 'Muster') <text:s text:c="11"/></text:span></text:p>
            <text:p xml:id="id32" text:id="id32"><text:span text:style-name="T21">say_name('Maria', 'Muster', 'Germany')</text:span></text:p>
            <text:p><text:span text:style-name="T21"/></text:p>
            <text:p xml:id="id33" text:id="id33"><text:span text:style-name="T21"># Passing arguments using keyword specification</text:span></text:p>
            <text:p xml:id="id34" text:id="id34"><text:span text:style-name="T21">say_name(first='Max', last='Muster')</text:span></text:p>
            <text:p xml:id="id35" text:id="id35" text:style-name="P25"><text:span text:style-name="T21">say_name(country='Germany', first='Maria', last='Muster')</text:span></text:p>
            <text:p text:style-name="P25"><text:span text:style-name="T21"/></text:p>
            <text:p xml:id="id36" text:id="id36" text:style-name="P25"><text:span text:style-name="T21"># Mix of both</text:span></text:p>
            <text:p xml:id="id37" text:id="id37" text:style-name="P25"><text:span text:style-name="T21">say_name('Maria', country='Germany', last='Muster')</text:span></text:p>
          </draw:text-box>
        </draw:frame>
        <draw:polyline draw:style-name="gr17" draw:text-style-name="P27" xml:id="id26" draw:id="id26" draw:layer="layout" svg:width="29.463cm" svg:height="0cm" svg:x="2.54cm" svg:y="6.8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_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(9): Argument Errors (Beispiele)</text:span></text:p>
          </draw:text-box>
        </draw:frame>
        <draw:frame draw:name="Datumsplatzhalter 3_ 9" presentation:style-name="pr2" draw:text-style-name="P4" draw:layer="layout" svg:width="32.542cm" svg:height="0.607cm" svg:x="2.446cm" svg:y="19.474cm" presentation:class="date-time" presentation:user-transformed="true">
          <draw:text-box>
            <text:p text:style-name="P3"><text:span text:style-name="T2">Thorsten Ruprechter</text:span></text:p>
          </draw:text-box>
        </draw:frame>
        <draw:frame draw:name="Fußzeilenplatzhalter 4_ 10" presentation:style-name="pr2" draw:text-style-name="P4" draw:layer="layout" svg:width="32.542cm" svg:height="0.607cm" svg:x="2.446cm" svg:y="18.839cm" presentation:class="footer" presentation:user-transformed="true">
          <draw:text-box>
            <text:p text:style-name="P3"><text:span text:style-name="T3">Informatik BW</text:span></text:p>
          </draw:text-box>
        </draw:frame>
        <draw:frame draw:name="Foliennummernplatzhalter 5_ 9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style-name="gr18" draw:text-style-name="P26" draw:layer="layout" svg:width="33.353cm" svg:height="15.143cm" svg:x="2.007cm" svg:y="4.318cm">
          <draw:text-box>
            <text:p xml:id="id39" text:id="id39"><text:span text:style-name="T20">def</text:span><text:span text:style-name="T21"> say_name(first, last, country='Austria')</text:span><text:span text:style-name="T20">:</text:span></text:p>
            <text:p xml:id="id40" text:id="id40" text:style-name="P25"><text:span text:style-name="T21"><text:s text:c="4"/></text:span><text:span text:style-name="T21">print(f'Firstname is {first}, surname is {last}.')</text:span></text:p>
            <text:p xml:id="id41" text:id="id41"><text:span text:style-name="T21"><text:s text:c="4"/></text:span><text:span text:style-name="T21">print(f'I live in {country}.')</text:span></text:p>
            <text:p><text:span text:style-name="T21"/></text:p>
            <text:p xml:id="id42" text:id="id42"><text:span text:style-name="T21">say_name('Max')</text:span></text:p>
            <text:p xml:id="id43" text:id="id43"><text:span text:style-name="T21"><text:s text:c="2"/></text:span><text:span text:style-name="T22"># </text:span><text:span text:style-name="T23">TypeError: say_name() missing 1 required positional argument: 'last_name'</text:span></text:p>
            <text:p xml:id="id44" text:id="id44"><text:span text:style-name="T21">say_name('Austria', 'Muster', 'Max</text:span><text:span text:style-name="T24">')</text:span></text:p>
            <text:p xml:id="id45" text:id="id45"><text:span text:style-name="T24"><text:s text:c="2"/></text:span><text:span text:style-name="T25"># </text:span><text:span text:style-name="T26">Kein Fehler in Ausführung, aber: “Logischer Fehler”</text:span></text:p>
            <text:p xml:id="id46" text:id="id46"><text:span text:style-name="T21">say_name(fs='Max', last='Muster')</text:span></text:p>
            <text:p xml:id="id47" text:id="id47"><text:span text:style-name="T21"><text:s text:c="2"/></text:span><text:span text:style-name="T27"># </text:span><text:span text:style-name="T28">TypeError: say_name() got an unexpected keyword argument 'fs'</text:span></text:p>
            <text:p xml:id="id48" text:id="id48" text:style-name="P25"><text:span text:style-name="T21">say_name(first='Max', 'Muster')</text:span></text:p>
            <text:p xml:id="id49" text:id="id49"><text:span text:style-name="T21"><text:s text:c="2"/></text:span><text:span text:style-name="T27"># </text:span><text:span text:style-name="T28">SyntaxError: positional argument follows keyword argument</text:span></text:p>
            <text:p><text:span text:style-name="T27"/></text:p>
            <text:p xml:id="id50" text:id="id50"><text:span text:style-name="T27"># There are many more possibilities for errors :-)</text:span></text:p>
          </draw:text-box>
        </draw:frame>
        <draw:polyline draw:style-name="gr19" draw:text-style-name="P27" xml:id="id38" draw:id="id38" draw:layer="layout" svg:width="29.463cm" svg:height="0cm" svg:x="2.54cm" svg:y="8.1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und eine </text:span><text:span text:style-name="MT8"><text:line-break/></text:span><text:span text:style-name="MT8">Überschrift hinzufüg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rmat 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4T09:26:45.449294322</dc:date>
    <meta:editing-cycles>1149</meta:editing-cycles>
    <dc:title>Python Crash Course A</dc:title>
    <meta:editing-duration>P3DT14H37M57S</meta:editing-duration>
    <meta:generator>LibreOffice/24.2.7.2$Linux_X86_64 LibreOffice_project/420$Build-2</meta:generator>
    <meta:print-date>2019-10-08T16:20:18.516837285</meta:print-date>
    <meta:document-statistic meta:object-count="2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