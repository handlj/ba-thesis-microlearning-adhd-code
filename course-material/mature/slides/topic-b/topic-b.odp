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2_5f_1_5f_1">
      <style:graphic-properties draw:stroke="none" draw:fill="solid" draw:fill-color="#e0e0e0" fo:min-height="3.355cm" loext:decorative="false"/>
      <style:paragraph-properties style:writing-mode="lr-tb"/>
    </style:style>
    <style:style style:name="gr2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766cm" fo:min-width="1.786cm" loext:decorative="false"/>
    </style:style>
    <style:style style:name="gr3" style:family="graphic" style:parent-style-name="Default_20_Drawing_20_Style_5f_2_5f_1_5f_1">
      <style:graphic-properties draw:stroke="none" draw:fill="none" fo:min-height="1.102cm" loext:decorative="false"/>
      <style:paragraph-properties style:writing-mode="lr-tb"/>
    </style:style>
    <style:style style:name="gr4" style:family="graphic" style:parent-style-name="Object_20_without_20_fill_5f_1_5f_1_5f_1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 loext:decorative="false"/>
    </style:style>
    <style:style style:name="gr5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912cm" fo:min-width="1.786cm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Default_20_Drawing_20_Style_5f_2_5f_1_5f_1">
      <style:graphic-properties draw:stroke="none" draw:fill="solid" draw:fill-color="#e0e0e0" fo:min-height="4.473cm" loext:decorative="false"/>
      <style:paragraph-properties style:writing-mode="lr-tb"/>
    </style:style>
    <style:style style:name="gr8" style:family="graphic" style:parent-style-name="Default_20_Drawing_20_Style_5f_2_5f_1">
      <style:graphic-properties draw:stroke="none" draw:fill="none" fo:min-height="1.893cm" loext:decorative="false"/>
      <style:paragraph-properties style:writing-mode="lr-tb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outline1" style:list-style-name="L2">
      <style:graphic-properties draw:stroke="none" svg:stroke-width="0cm" draw:fill="solid" draw:fill-color="#d3d3d3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e0e0e0"/>
      <style:paragraph-properties fo:text-align="start"/>
      <style:text-properties fo:background-color="#e0e0e0"/>
    </style:style>
    <style:style style:name="P10" style:family="paragraph">
      <loext:graphic-properties draw:fill-color="#fc5c00"/>
      <style:paragraph-properties fo:text-align="center"/>
    </style:style>
    <style:style style:name="P11" style:family="paragraph">
      <loext:graphic-properties draw:fill="none"/>
      <style:text-properties style:font-name="Arial1" fo:background-color="#fc5c00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e0e0e0"/>
      <style:paragraph-properties fo:text-align="center"/>
      <style:text-properties fo:background-color="#e0e0e0"/>
    </style:style>
    <style:style style:name="P18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d3d3d3"/>
      <style:paragraph-properties fo:margin-left="0cm" fo:margin-right="0cm" fo:margin-top="0.2cm" fo:margin-bottom="0.1cm" fo:line-height="100%" fo:text-align="start" fo:text-indent="0cm" style:punctuation-wrap="hanging" style:font-independent-line-spacing="true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e0e0e0"/>
      <style:paragraph-properties fo:margin-left="0cm" fo:margin-right="0cm" fo:text-align="start" fo:text-indent="0cm" style:font-independent-line-spacing="true"/>
      <style:text-properties fo:font-size="28pt" fo:background-color="#e0e0e0"/>
    </style:style>
    <style:style style:name="P23" style:family="paragraph">
      <loext:graphic-properties draw:fill="none"/>
      <style:text-properties fo:font-size="48pt" style:font-size-asian="48pt" style:font-size-complex="48pt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bold" style:letter-kerning="true" fo:background-color="#e0e0e0" style:font-name-asian="Droid Sans Fallback" style:font-size-asian="28pt" style:font-style-asian="normal" style:font-weight-asian="bold" style:font-name-complex="Droid Sans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fo:background-color="#e0e0e0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fc5c00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0pt"/>
    </style:style>
    <style:style style:name="T1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fo:background-color="#e0e0e0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0): if Statements</text:span></text:p>
          </draw:text-box>
        </draw:frame>
        <draw:frame draw:name="Inhaltsplatzhalter 2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Überprüfen von Bedingungen, konditionelles Ausführen von Code</text:span></text:p>
                    <text:list>
                      <text:list-item>
                        <text:p xml:id="id2" text:id="id2" text:style-name="P4"><text:span text:style-name="T2">„</text:span><text:span text:style-name="T2">WENN-Bedingung“ / “WENN-DANN-Bedingung“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xml:id="id3" text:id="id3" text:style-name="P3"><text:span text:style-name="T2">„</text:span><text:span text:style-name="T3">WENN</text:span><text:span text:style-name="T2"> </text:span><text:span text:style-name="T4">Bedingung erfüllt</text:span><text:span text:style-name="T2"> </text:span><text:span text:style-name="T3">DANN</text:span><text:span text:style-name="T2"> </text:span><text:span text:style-name="T4">tu etwas</text:span><text:span text:style-name="T2">“</text:span></text:p>
                    <text:p text:style-name="P3"><text:span text:style-name="T2"/></text:p>
                  </text:list-item>
                  <text:list-item>
                    <text:p xml:id="id4" text:id="id4" text:style-name="P3"><text:span text:style-name="T2">Python Syntax:</text:span></text:p>
                    <text:p xml:id="id5" text:id="id5" text:style-name="P4"><text:span text:style-name="T5">if</text:span><text:span text:style-name="T6"> </text:span><text:span text:style-name="T7">condition</text:span><text:span text:style-name="T5">:</text:span><text:span text:style-name="T5"><text:line-break/></text:span><text:span text:style-name="T5"> <text:s text:c="3"/></text:span><text:span text:style-name="T6">print('Do something')</text:span></text:p>
                  </text:list-item>
                </text:list>
              </text:list-item>
            </text:list>
          </draw:text-box>
        </draw:frame>
        <draw:frame draw:name="Foliennummernplatzhalter 2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8"><text:page-number>&lt;Foliennummer&gt;</text:page-number></text:span></text:p>
          </draw:text-box>
        </draw:frame>
        <draw:frame draw:style-name="gr1" draw:text-style-name="P9" xml:id="id9" draw:id="id9" draw:layer="layout" svg:width="11.276cm" svg:height="3.605cm" svg:x="24.384cm" svg:y="14.683cm">
          <draw:text-box>
            <text:p text:style-name="P8"><text:span text:style-name="T9">if</text:span><text:span text:style-name="T10"> x &gt; 2:</text:span><text:span text:style-name="T9"><text:line-break/></text:span><text:span text:style-name="T9"> <text:s text:c="3"/></text:span><text:span text:style-name="T10">print('In if')</text:span></text:p>
            <text:p text:style-name="P8"><text:span text:style-name="T10">print('Not in if')</text:span></text:p>
          </draw:text-box>
        </draw:frame>
        <draw:custom-shape draw:style-name="gr2" draw:text-style-name="P10" xml:id="id6" draw:id="id6" draw:layer="layout" svg:width="2.286cm" svg:height="1.016cm" svg:x="3.556cm" svg:y="14.54cm">
          <text:p/>
          <draw:enhanced-geometry svg:viewBox="0 0 21600 21600" draw:type="rectangle" draw:enhanced-path="M 0 0 L 21600 0 21600 21600 0 21600 0 0 Z N"/>
        </draw:custom-shape>
        <draw:frame draw:style-name="gr3" draw:text-style-name="P11" xml:id="id7" draw:id="id7" draw:layer="layout" svg:width="12.7cm" svg:height="1.352cm" svg:x="3.302cm" svg:y="16.374cm">
          <draw:text-box>
            <text:p><text:span text:style-name="T11">4 Leerzeichen eingerückt</text:span></text:p>
          </draw:text-box>
        </draw:frame>
        <draw:polyline draw:style-name="gr4" draw:text-style-name="P12" xml:id="id8" draw:id="id8" draw:layer="layout" svg:width="0cm" svg:height="0.871cm" svg:x="4.572cm" svg:y="15.602cm" svg:viewBox="0 0 0 872" draw:points="0,872 0,0">
          <text:p/>
        </draw:polyline>
        <draw:custom-shape draw:style-name="gr5" draw:text-style-name="P10" xml:id="id10" draw:id="id10" draw:layer="layout" svg:width="2.286cm" svg:height="1.162cm" svg:x="24.638cm" svg:y="15.8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4" draw:text-style-name="P14" draw:layer="layout" svg:width="17.271cm" svg:height="12.572cm" svg:x="2.159cm" svg:y="13.271cm" presentation:class="notes">
            <draw:text-box>
              <text:p text:style-name="P13"><text:span text:style-name="T12">12:17 spätestens beginnen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1): if-else Statements</text:span></text:p>
          </draw:text-box>
        </draw:frame>
        <draw:frame draw:name="Inhaltsplatzhalter 1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1" text:id="id11" text:style-name="P3"><text:span text:style-name="T2">if-Statement mit „Fallback“ falls Bedingung nicht erfüllt</text:span></text:p>
                    <text:list>
                      <text:list-item>
                        <text:p xml:id="id12" text:id="id12" text:style-name="P4"><text:span text:style-name="T2">„</text:span><text:span text:style-name="T2">WENN-DANN-SONST-Bedingung“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xml:id="id13" text:id="id13" text:style-name="P3"><text:span text:style-name="T13">„</text:span><text:span text:style-name="T14">WENN</text:span><text:span text:style-name="T13"> </text:span><text:span text:style-name="T4">Bedingung erfüllt</text:span><text:span text:style-name="T2"> </text:span><text:span text:style-name="T3">DANN</text:span><text:span text:style-name="T2"> </text:span><text:span text:style-name="T4">tu etwas</text:span><text:span text:style-name="T2"> </text:span><text:span text:style-name="T3">SONST</text:span><text:span text:style-name="T2"> </text:span><text:span text:style-name="T4">tu etwas anderes</text:span><text:span text:style-name="T2">“</text:span></text:p>
                    <text:p text:style-name="P3"><text:span text:style-name="T2"/></text:p>
                  </text:list-item>
                  <text:list-item>
                    <text:p xml:id="id14" text:id="id14" text:style-name="P3"><text:span text:style-name="T2">Python Syntax:</text:span></text:p>
                    <text:p xml:id="id15" text:id="id15" text:style-name="P4"><text:span text:style-name="T5">if</text:span><text:span text:style-name="T6"> </text:span><text:span text:style-name="T7">condition</text:span><text:span text:style-name="T5">:</text:span><text:span text:style-name="T5"><text:line-break/></text:span><text:span text:style-name="T5"> <text:s text:c="3"/></text:span><text:span text:style-name="T6">print('Do something')</text:span></text:p>
                    <text:p xml:id="id16" text:id="id16" text:style-name="P4"><text:span text:style-name="T5">else:</text:span><text:span text:style-name="T5"><text:line-break/></text:span><text:span text:style-name="T5"> <text:s text:c="3"/></text:span><text:span text:style-name="T6">print('Do something else')</text:span></text:p>
                  </text:list-item>
                </text:list>
              </text:list-item>
            </text:list>
          </draw:text-box>
        </draw:frame>
        <draw:frame draw:name="Foliennummernplatzhalter 1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8"><text:page-number>&lt;Foliennummer&gt;</text:page-number></text:span></text:p>
          </draw:text-box>
        </draw:frame>
        <draw:frame draw:style-name="gr7" draw:text-style-name="P17" xml:id="id17" draw:id="id17" draw:layer="layout" svg:width="12.446cm" svg:height="4.723cm" svg:x="23.293cm" svg:y="13.616cm">
          <draw:text-box>
            <text:p text:style-name="P15"><text:span text:style-name="T15">if</text:span><text:span text:style-name="T16"> x &gt; 2:</text:span><text:span text:style-name="T15"> <text:s text:c="11"/></text:span></text:p>
            <text:p text:style-name="P16"><text:span text:style-name="T16"><text:s text:c="4"/></text:span><text:span text:style-name="T16">print('In if')</text:span></text:p>
            <text:p text:style-name="P16"><text:span text:style-name="T15">else:</text:span></text:p>
            <text:p text:style-name="P16"><text:span text:style-name="T10"><text:s text:c="4"/></text:span><text:span text:style-name="T10">print(</text:span><text:span text:style-name="T16">'In else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4" draw:text-style-name="P14" draw:layer="layout" svg:width="17.271cm" svg:height="12.572cm" svg:x="2.159cm" svg:y="13.271cm" presentation:class="notes">
            <draw:text-box>
              <text:p><text:span text:style-name="T12">Beispiel:</text:span></text:p>
              <text:p><text:span text:style-name="T12"/></text:p>
              <text:p><text:span text:style-name="T12">WENN ich für die Prüfung lerne</text:span></text:p>
              <text:p><text:span text:style-name="T12">DANN bestehe ich die LV</text:span></text:p>
              <text:p><text:span text:style-name="T12">SONST falle ich durch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2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2): if-elif-else Statements</text:span></text:p>
          </draw:text-box>
        </draw:frame>
        <draw:frame draw:name="Inhaltsplatzhalter 4" presentation:style-name="pr5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8" text:id="id18" text:style-name="P3"><text:span text:style-name="T13">Mehrere Verzweigungen für kompliziertere Abfragen</text:span></text:p>
                    <text:list>
                      <text:list-item>
                        <text:p xml:id="id19" text:id="id19" text:style-name="P4"><text:span text:style-name="T13">„</text:span><text:span text:style-name="T13">WENN-DANN-SONSTWENN-DANN-SONSTWENN-…“</text:span></text:p>
                      </text:list-item>
                    </text:list>
                    <text:p xml:id="id20" text:id="id20" text:style-name="P3"><text:span text:style-name="T14"/></text:p>
                  </text:list-item>
                  <text:list-item>
                    <text:p xml:id="id21" text:id="id21" text:style-name="P3"><text:span text:style-name="T14">WENN</text:span><text:span text:style-name="T13"> </text:span><text:span text:style-name="T17">Bedingung1 erfüllt</text:span><text:span text:style-name="T13"> </text:span><text:span text:style-name="T14">DANN</text:span><text:span text:style-name="T13"> </text:span><text:span text:style-name="T17">tu etwas</text:span><text:span text:style-name="T13"> </text:span><text:span text:style-name="T2"><text:s/></text:span></text:p>
                    <text:p xml:id="id22" text:id="id22" text:style-name="P3"><text:span text:style-name="T3">SONST WENN </text:span><text:span text:style-name="T4">Bedingung2 erfüllt</text:span><text:span text:style-name="T3"> DANN </text:span><text:span text:style-name="T4">tu etwas anderes</text:span><text:span text:style-name="T2"> </text:span></text:p>
                    <text:p xml:id="id23" text:id="id23" text:style-name="P3"><text:span text:style-name="T3">SONST WENN </text:span><text:span text:style-name="T4">Bedingung3 erfüllt</text:span><text:span text:style-name="T3"> DANN </text:span><text:span text:style-name="T4">tu wieder etwas anderes </text:span></text:p>
                    <text:p xml:id="id24" text:id="id24" text:style-name="P3"><text:span text:style-name="T3">... </text:span></text:p>
                    <text:p xml:id="id25" text:id="id25" text:style-name="P3"><text:span text:style-name="T3">SONST </text:span><text:span text:style-name="T4">tu etwas völlig anderes</text:span></text:p>
                  </text:list-item>
                </text:list>
              </text:list-item>
            </text:list>
          </draw:text-box>
        </draw:frame>
        <draw:frame draw:name="Foliennummernplatzhalter 4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8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user-transformed="true">
            <draw:text-box>
              <text:p><text:span text:style-name="T12">Wenn ich für die prüfung lerne</text:span></text:p>
              <text:p><text:span text:style-name="T12"><text:s text:c="2"/></text:span><text:span text:style-name="T12">komme ich leicht durch</text:span></text:p>
              <text:p><text:span text:style-name="T12">sonst wenn ich die übung gut absolviere </text:span></text:p>
              <text:p><text:span text:style-name="T12"><text:s text:c="2"/></text:span><text:span text:style-name="T12">schaffe ich die klausur gerade so</text:span></text:p>
              <text:p><text:span text:style-name="T12">sonst falle ich durch</text:span>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2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3): if-elif-else Statements (Syntax)</text:span></text:p>
          </draw:text-box>
        </draw:frame>
        <draw:frame draw:name="Inhaltsplatzhalter 3" presentation:style-name="pr6" draw:text-style-name="P20" draw:layer="layout" svg:width="30.066cm" svg:height="13.234cm" svg:x="2.4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18">if</text:span><text:span text:style-name="T19"> </text:span><text:span text:style-name="T20">condition</text:span><text:span text:style-name="T18">:</text:span></text:p>
                    <text:p text:style-name="P18"><text:span text:style-name="T19"><text:s text:c="4"/></text:span><text:span text:style-name="T19">print('Do something')</text:span></text:p>
                    <text:p text:style-name="P18"><text:span text:style-name="T18">elif</text:span><text:span text:style-name="T19"> </text:span><text:span text:style-name="T20">condition2</text:span><text:span text:style-name="T18">:</text:span></text:p>
                    <text:p text:style-name="P18"><text:span text:style-name="T19"><text:s text:c="4"/></text:span><text:span text:style-name="T19">print('Do something else')</text:span></text:p>
                    <text:p text:style-name="P18"><text:span text:style-name="T18">elif</text:span><text:span text:style-name="T19"> </text:span><text:span text:style-name="T20">condition3</text:span><text:span text:style-name="T18">:</text:span></text:p>
                    <text:p text:style-name="P18"><text:span text:style-name="T19"><text:s text:c="4"/></text:span><text:span text:style-name="T19">print('Do something different')</text:span></text:p>
                    <text:p text:style-name="P18"><text:span text:style-name="T19"><text:s text:c="4"/></text:span><text:span text:style-name="T19"># there could be more elifs below this</text:span></text:p>
                    <text:p text:style-name="P18"><text:span text:style-name="T18">else</text:span><text:span text:style-name="T19">: # optional</text:span></text:p>
                    <text:list>
                      <text:list-header>
                        <text:p text:style-name="P19"><text:span text:style-name="T19">print('Do something completely different'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3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8"><text:page-number>&lt;Foliennummer&gt;</text:page-number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user-transformed="true">
            <draw:text-box>
              <text:p><text:span text:style-name="T12">ich habe 8 euro</text:span></text:p>
              <text:p><text:span text:style-name="T12"/></text:p>
              <text:p><text:span text:style-name="T12">Wenn alter &lt;= 6:</text:span></text:p>
              <text:p><text:span text:style-name="T12"><text:s text:c="2"/></text:span><text:span text:style-name="T12">Gratis, Kinderrabatt</text:span></text:p>
              <text:p><text:span text:style-name="T12">Sonst alter &lt;= 4 euro:</text:span></text:p>
              <text:p><text:span text:style-name="T12"><text:s text:c="2"/></text:span><text:span text:style-name="T12">Kaufe 2 zuckerl</text:span></text:p>
              <text:p><text:span text:style-name="T12">Sonst wenn preis &lt;= 6 euro:</text:span></text:p>
              <text:p><text:span text:style-name="T12"><text:s text:c="2"/></text:span><text:span text:style-name="T12">Kaufe 3 zuckerl</text:span></text:p>
              <text:p><text:span text:style-name="T12">Sonst:</text:span></text:p>
              <text:p><text:span text:style-name="T12"><text:s text:c="2"/></text:span><text:span text:style-name="T12">Rabatt, kaufe 8 / 2 zuckerl</text:span></text:p>
              <text:p><text:span text:style-name="T12"/></text:p>
              <text:p><text:span text:style-name="T12">Validierung von nur EINEM elif</text:span>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4): if-elif-else Statements (Beispiel)</text:span></text:p>
          </draw:text-box>
        </draw:frame>
        <draw:frame draw:name="Inhaltsplatzhalter 7" presentation:style-name="pr7" draw:text-style-name="P22" draw:layer="layout" svg:width="17.366cm" svg:height="11.246cm" svg:x="0.414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1"><text:span text:style-name="T19"># Snippet A</text:span></text:p>
                    <text:p text:style-name="P21"><text:span text:style-name="T18">if</text:span><text:span text:style-name="T19"> x &lt; 5</text:span><text:span text:style-name="T18">:</text:span><text:span text:style-name="T18"><text:line-break/></text:span><text:span text:style-name="T19"> <text:s text:c="3"/>print('Small')</text:span></text:p>
                    <text:p text:style-name="P21"><text:span text:style-name="T18">elif</text:span><text:span text:style-name="T19"> x &lt; 15</text:span><text:span text:style-name="T18">:</text:span><text:span text:style-name="T18"><text:line-break/></text:span><text:span text:style-name="T19"> <text:s text:c="3"/>print('Medium')</text:span></text:p>
                    <text:p text:style-name="P21"><text:span text:style-name="T18">elif</text:span><text:span text:style-name="T19"> x &lt; 20</text:span><text:span text:style-name="T18">:</text:span><text:span text:style-name="T18"><text:line-break/></text:span><text:span text:style-name="T19"> <text:s text:c="3"/>print('Big')</text:span></text:p>
                    <text:p text:style-name="P21"><text:span text:style-name="T18">else:</text:span><text:span text:style-name="T18"><text:line-break/></text:span><text:span text:style-name="T18"> <text:s text:c="3"/></text:span><text:span text:style-name="T19">print('Huge')</text:span></text:p>
                  </text:list-header>
                </text:list>
              </text:list-item>
            </text:list>
          </draw:text-box>
        </draw:frame>
        <draw:frame draw:name="Foliennummernplatzhalter 6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8"><text:page-number>&lt;Foliennummer&gt;</text:page-number></text:span></text:p>
          </draw:text-box>
        </draw:frame>
        <draw:frame draw:name="Inhaltsplatzhalter 9" presentation:style-name="pr8" draw:text-style-name="P22" xml:id="id26" draw:id="id26" draw:layer="layout" svg:width="17.366cm" svg:height="11.246cm" svg:x="18.288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1"><text:span text:style-name="T21"># Snippet B</text:span></text:p>
                    <text:p text:style-name="P21"><text:span text:style-name="T18">if</text:span><text:span text:style-name="T19"> x &lt; 5</text:span><text:span text:style-name="T18">:</text:span><text:span text:style-name="T18"><text:line-break/></text:span><text:span text:style-name="T19"> <text:s text:c="3"/>print('Small')</text:span></text:p>
                    <text:p text:style-name="P21"><text:span text:style-name="T18">if</text:span><text:span text:style-name="T19"> x &lt; 15</text:span><text:span text:style-name="T18">:</text:span><text:span text:style-name="T18"><text:line-break/></text:span><text:span text:style-name="T19"> <text:s text:c="3"/>print('Medium')</text:span></text:p>
                    <text:p text:style-name="P21"><text:span text:style-name="T18">if</text:span><text:span text:style-name="T19"> x &lt; 20</text:span><text:span text:style-name="T18">:</text:span><text:span text:style-name="T18"><text:line-break/></text:span><text:span text:style-name="T19"> <text:s text:c="3"/>print('Big')</text:span></text:p>
                    <text:p text:style-name="P21"><text:span text:style-name="T18">else:</text:span><text:span text:style-name="T18"><text:line-break/></text:span><text:span text:style-name="T18"> <text:s text:c="3"/></text:span><text:span text:style-name="T19">print('Huge')</text:span></text:p>
                  </text:list-header>
                </text:list>
              </text:list-item>
            </text:list>
          </draw:text-box>
        </draw:frame>
        <draw:frame draw:style-name="gr8" draw:text-style-name="P23" draw:layer="layout" svg:width="1.302cm" svg:height="2.143cm" svg:x="17.34cm" svg:y="3.703cm">
          <draw:text-box>
            <text:p xml:id="id27" text:id="id27"><text:span text:style-name="T22">≠</text:span></text:p>
          </draw:text-box>
        </draw:frame>
        <draw:frame draw:style-name="gr8" draw:text-style-name="P23" draw:layer="layout" svg:width="1.302cm" svg:height="2.143cm" svg:x="17.34cm" svg:y="16.704cm">
          <draw:text-box>
            <text:p xml:id="id28" text:id="id28"><text:span text:style-name="T22">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user-transformed="true">
            <draw:text-box>
              <text:p>Bis 11:30 spätestens beginn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und eine </text:span><text:span text:style-name="MT8"><text:line-break/></text:span><text:span text:style-name="MT8">Überschrift hinzufüg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26T12:26:43.917677313</dc:date>
    <meta:editing-cycles>1150</meta:editing-cycles>
    <dc:title>Python Crash Course A</dc:title>
    <meta:editing-duration>P3DT14H38M26S</meta:editing-duration>
    <meta:generator>LibreOffice/24.2.7.2$Linux_X86_64 LibreOffice_project/420$Build-2</meta:generator>
    <meta:print-date>2019-10-08T16:20:18.516837285</meta:print-date>
    <meta:document-statistic meta:object-count="2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