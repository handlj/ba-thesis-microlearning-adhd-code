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1000000000000293000000675A4140C4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40B0000040023B8C212.png" manifest:media-type="image/png"/>
  <manifest:file-entry manifest:full-path="Pictures/10000001000000FA0000014F2A7D06C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5f_1">
      <style:graphic-properties loext:decorative="fals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2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37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9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897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e0e0e0" draw:fill="solid" draw:fill-color="#e0e0e0" draw:textarea-horizontal-align="justify" draw:textarea-vertical-align="middle" draw:auto-grow-height="false" fo:min-height="2.29cm" fo:min-width="25.154cm" style:writing-mode="lr-tb" loext:decorative="false"/>
      <style:paragraph-properties style:writing-mode="lr-tb"/>
    </style:style>
    <style:style style:name="gr12" style:family="graphic" style:parent-style-name="Default_5f_2">
      <style:graphic-properties loext:decorative="false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16" style:family="graphic" style:parent-style-name="Default_20_Drawing_20_Style_5f_2_5f_1_5f_1">
      <style:graphic-properties draw:stroke="none" draw:fill="solid" draw:fill-color="#e0e0e0" fo:min-height="3.355cm" loext:decorative="false"/>
      <style:paragraph-properties style:writing-mode="lr-tb"/>
    </style:style>
    <style:style style:name="gr17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766cm" fo:min-width="1.786cm" loext:decorative="false"/>
    </style:style>
    <style:style style:name="gr18" style:family="graphic" style:parent-style-name="Default_20_Drawing_20_Style_5f_2_5f_1_5f_1">
      <style:graphic-properties draw:stroke="none" draw:fill="none" fo:min-height="1.102cm" loext:decorative="false"/>
      <style:paragraph-properties style:writing-mode="lr-tb"/>
    </style:style>
    <style:style style:name="gr19" style:family="graphic" style:parent-style-name="Object_20_without_20_fill_5f_1_5f_1_5f_1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 loext:decorative="false"/>
    </style:style>
    <style:style style:name="gr20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912cm" fo:min-width="1.786cm" loext:decorative="false"/>
    </style:style>
    <style:style style:name="gr21" style:family="graphic" style:parent-style-name="Default_20_Drawing_20_Style_5f_2_5f_1_5f_1">
      <style:graphic-properties draw:stroke="none" draw:fill="solid" draw:fill-color="#e0e0e0" fo:min-height="4.473cm" loext:decorative="false"/>
      <style:paragraph-properties style:writing-mode="lr-tb"/>
    </style:style>
    <style:style style:name="gr22" style:family="graphic" style:parent-style-name="Default_20_Drawing_20_Style_5f_2_5f_1">
      <style:graphic-properties draw:stroke="none" draw:fill="none" fo:min-height="1.89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788cm" loext:decorative="false"/>
      <style:paragraph-properties style:writing-mode="lr-tb"/>
    </style:style>
    <style:style style:name="gr24" style:family="graphic" style:parent-style-name="Default_5f_1">
      <style:graphic-properties svg:stroke-color="#3465a4" draw:fill="none" draw:textarea-horizontal-align="justify" draw:textarea-vertical-align="middle" draw:auto-grow-height="false" fo:min-height="1.528cm" fo:min-width="30.026cm" loext:decorative="false"/>
    </style:style>
    <style:style style:name="gr25" style:family="graphic" style:parent-style-name="Default_5f_1">
      <style:graphic-properties svg:stroke-color="#ff1a00" draw:fill="none" draw:textarea-horizontal-align="justify" draw:textarea-vertical-align="middle" draw:auto-grow-height="false" fo:min-height="1.16cm" fo:min-width="14.232cm" loext:decorative="false"/>
    </style:style>
    <style:style style:name="gr26" style:family="graphic" style:parent-style-name="Default_5f_1">
      <style:graphic-properties svg:stroke-color="#18b200" draw:fill="none" draw:textarea-horizontal-align="justify" draw:textarea-vertical-align="middle" draw:auto-grow-height="false" fo:min-height="1.184cm" fo:min-width="17.534cm" loext:decorative="false"/>
    </style:style>
    <style:style style:name="gr27" style:family="graphic" style:parent-style-name="Default_5f_1">
      <style:graphic-properties svg:stroke-color="#ff1a00" draw:fill="none" draw:textarea-horizontal-align="justify" draw:textarea-vertical-align="middle" draw:auto-grow-height="false" fo:min-height="0.637cm" fo:min-width="11.66cm" loext:decorative="false"/>
    </style:style>
    <style:style style:name="gr28" style:family="graphic" style:parent-style-name="Default_5f_1">
      <style:graphic-properties svg:stroke-color="#18b200" draw:fill="none" draw:textarea-horizontal-align="justify" draw:textarea-vertical-align="middle" draw:auto-grow-height="false" fo:min-height="0.582cm" fo:min-width="10.297cm" loext:decorative="false"/>
    </style:style>
    <style:style style:name="gr29" style:family="graphic" style:parent-style-name="Default_5f_1">
      <style:graphic-properties svg:stroke-color="#3465a4" draw:fill="none" draw:textarea-horizontal-align="justify" draw:textarea-vertical-align="middle" draw:auto-grow-height="false" fo:min-height="0.512cm" fo:min-width="9.025cm" loext:decorative="false"/>
    </style:style>
    <style:style style:name="gr30" style:family="graphic" style:parent-style-name="Default_5f_1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007cm" fo:min-width="13.455cm" fo:padding-top="0.075cm" fo:padding-bottom="0.075cm" fo:padding-left="0.2cm" fo:padding-right="0.2cm" loext:decorative="false"/>
    </style:style>
    <style:style style:name="gr31" style:family="graphic" style:parent-style-name="Default_20_Drawing_20_Style_5f_2">
      <style:graphic-properties draw:stroke="none" draw:fill="solid" draw:fill-color="#d3d3d3" fo:min-height="1.119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e0e0e0" fo:min-height="5.574cm" loext:decorative="false"/>
      <style:paragraph-properties style:writing-mode="lr-tb"/>
    </style:style>
    <style:style style:name="gr33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763cm" fo:min-width="27.44cm" loext:decorative="false"/>
    </style:style>
    <style:style style:name="gr34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846cm" fo:min-width="28.202cm" loext:decorative="false"/>
    </style:style>
    <style:style style:name="gr35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3_5f_1_5f_1">
      <style:graphic-properties draw:stroke="none" draw:fill="none" fo:min-height="10.667cm" loext:decorative="false"/>
      <style:paragraph-properties style:writing-mode="lr-tb"/>
    </style:style>
    <style:style style:name="gr37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52cm" fo:min-width="0cm" fo:padding-top="0.176cm" fo:padding-bottom="0.176cm" fo:padding-left="0.301cm" fo:padding-right="0.301cm" loext:decorative="false"/>
    </style:style>
    <style:style style:name="gr38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3.742cm" fo:min-width="0cm" fo:padding-top="0.176cm" fo:padding-bottom="0.176cm" fo:padding-left="0.301cm" fo:padding-right="0.301cm" loext:decorative="false"/>
    </style:style>
    <style:style style:name="gr39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88cm" fo:min-width="0cm" fo:padding-top="0.176cm" fo:padding-bottom="0.176cm" fo:padding-left="0.301cm" fo:padding-right="0.301cm" loext:decorative="false"/>
    </style:style>
    <style:style style:name="gr40" style:family="graphic" style:parent-style-name="Default_20_Drawing_20_Style_5f_3_5f_1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41" style:family="graphic" style:parent-style-name="Default_20_Drawing_20_Style_5f_3_5f_1_5f_1">
      <style:graphic-properties draw:stroke="none" draw:fill="solid" draw:fill-color="#e0e0e0" fo:min-height="1.12cm" loext:decorative="false"/>
      <style:paragraph-properties style:writing-mode="lr-tb"/>
    </style:style>
    <style:style style:name="gr42" style:family="graphic" style:parent-style-name="Default_20_Drawing_20_Style_5f_3_5f_1_5f_1">
      <style:graphic-properties draw:stroke="none" draw:fill="solid" draw:fill-color="#ffffff" fo:min-height="1.528cm" loext:decorative="false"/>
      <style:paragraph-properties style:writing-mode="lr-tb"/>
    </style:style>
    <style:style style:name="gr43" style:family="graphic" style:parent-style-name="Default_20_Drawing_20_Style_5f_3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44" style:family="graphic" style:parent-style-name="Default_20_Drawing_20_Style_5f_3_5f_1">
      <style:graphic-properties draw:stroke="none" draw:fill="solid" draw:fill-color="#e0e0e0" fo:min-height="0.962cm" loext:decorative="false"/>
      <style:paragraph-properties style:writing-mode="lr-tb"/>
    </style:style>
    <style:style style:name="gr45" style:family="graphic" style:parent-style-name="Default_20_Drawing_20_Style_5f_3_5f_1">
      <style:graphic-properties draw:stroke="none" draw:fill="solid" draw:fill-color="#ffffff" fo:min-height="2.955cm" loext:decorative="false"/>
      <style:paragraph-properties style:writing-mode="lr-tb"/>
    </style:style>
    <style:style style:name="gr46" style:family="graphic" style:parent-style-name="Default_20_Drawing_20_Style_5f_3_5f_1">
      <style:graphic-properties draw:stroke="none" draw:fill="solid" draw:fill-color="#e0e0e0" draw:textarea-vertical-align="middle" fo:min-height="2.52cm" loext:decorative="false"/>
      <style:paragraph-properties style:writing-mode="lr-tb"/>
    </style:style>
    <style:style style:name="gr47" style:family="graphic" style:parent-style-name="Default_20_Drawing_20_Style_5f_3_5f_1">
      <style:graphic-properties draw:stroke="none" draw:fill="solid" draw:fill-color="#ffffff" fo:min-height="1.528cm" loext:decorative="false"/>
      <style:paragraph-properties style:writing-mode="lr-tb"/>
    </style:style>
    <style:style style:name="gr48" style:family="graphic" style:parent-style-name="Default_20_Drawing_20_Style_5f_3_5f_1">
      <style:graphic-properties draw:stroke="none" draw:fill="solid" draw:fill-color="#e0e0e0" fo:min-height="4.068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e0e0e0" fo:min-height="6.709cm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e0e0e0" fo:min-height="1.119cm" loext:decorative="false"/>
      <style:paragraph-properties style:writing-mode="lr-tb"/>
    </style:style>
    <style:style style:name="gr51" style:family="graphic" style:parent-style-name="Default_5f_1">
      <style:graphic-properties draw:stroke="none" draw:fill="solid" draw:fill-color="#e0e0e0" fo:min-height="4.473cm" loext:decorative="false"/>
      <style:paragraph-properties style:writing-mode="lr-tb"/>
    </style:style>
    <style:style style:name="gr52" style:family="graphic" style:parent-style-name="Default_20_Drawing_20_Style_5f_3_5f_1_5f_1">
      <style:graphic-properties draw:stroke="none" draw:fill="none" fo:min-height="14.55cm" loext:decorative="false"/>
      <style:paragraph-properties style:writing-mode="lr-tb"/>
    </style:style>
    <style:style style:name="gr53" style:family="graphic" style:parent-style-name="Object_20_without_20_fill_5f_1_5f_1">
      <style:graphic-properties svg:stroke-color="#050505" draw:fill="solid" draw:textarea-vertical-align="middle" loext:decorative="false"/>
    </style:style>
    <style:style style:name="gr54" style:family="graphic" style:parent-style-name="standard">
      <style:graphic-properties draw:stroke="none" draw:fill="none" fo:min-height="14.893cm" loext:decorative="false"/>
      <style:paragraph-properties style:writing-mode="lr-tb"/>
    </style:style>
    <style:style style:name="gr55" style:family="graphic" style:parent-style-name="objectwithoutfill">
      <style:graphic-properties svg:stroke-color="#050505" draw:fill="solid" draw:textarea-vertical-align="middle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9.676cm" loext:decorative="false"/>
      <style:paragraph-properties style:writing-mode="lr-tb"/>
    </style:style>
    <style:style style:name="pr7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el_20_und_20_Inhalt_5f_-outline1" style:list-style-name="L2">
      <style:graphic-properties draw:stroke="none" svg:stroke-width="0cm" draw:fill="solid" draw:fill-color="#d3d3d3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0_und_20_Inhalt_5f_-notes">
      <style:graphic-properties draw:fill-color="#ffffff" fo:min-height="12.593cm" loext:decorative="false"/>
      <style:paragraph-properties style:writing-mode="lr-tb"/>
    </style:style>
    <style:style style:name="pr14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Titel_20_und_20_Inhalt_5f_-outline1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el_20_und_20_Inhalt_5f_-notes">
      <style:graphic-properties draw:fill-color="#ffffff" fo:min-height="14.167cm" loext:decorative="false"/>
      <style:paragraph-properties style:writing-mode="lr-tb"/>
    </style:style>
    <style:style style:name="pr19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Titel_20_und_20_Inhalt_5f_-notes" style:list-style-name="L1">
      <style:graphic-properties draw:fill-color="#ffffff" fo:min-height="15.263cm" loext:decorative="false"/>
      <style:paragraph-properties style:writing-mode="lr-tb"/>
    </style:style>
    <style:style style:name="co1" style:family="table-column">
      <style:table-column-properties style:column-width="7.349cm" style:use-optimal-column-width="false"/>
    </style:style>
    <style:style style:name="co2" style:family="table-column">
      <style:table-column-properties style:column-width="9.871cm" style:use-optimal-column-width="false"/>
    </style:style>
    <style:style style:name="co3" style:family="table-column">
      <style:table-column-properties style:column-width="11.637cm" style:use-optimal-column-width="false"/>
    </style:style>
    <style:style style:name="co4" style:family="table-column">
      <style:table-column-properties style:column-width="6.929cm" style:use-optimal-column-width="false"/>
    </style:style>
    <style:style style:name="co5" style:family="table-column">
      <style:table-column-properties style:column-width="9.311cm" style:use-optimal-column-width="false"/>
    </style:style>
    <style:style style:name="co6" style:family="table-column">
      <style:table-column-properties style:column-width="4.239cm" style:use-optimal-column-width="false"/>
    </style:style>
    <style:style style:name="co7" style:family="table-column">
      <style:table-column-properties style:column-width="19.151cm" style:use-optimal-column-width="false"/>
    </style:style>
    <style:style style:name="co8" style:family="table-column">
      <style:table-column-properties style:column-width="5.9cm" style:use-optimal-column-width="false"/>
    </style:style>
    <style:style style:name="co9" style:family="table-column">
      <style:table-column-properties style:column-width="4.312cm" style:use-optimal-column-width="false"/>
    </style:style>
    <style:style style:name="co10" style:family="table-column">
      <style:table-column-properties style:column-width="10.943cm" style:use-optimal-column-width="false"/>
    </style:style>
    <style:style style:name="co11" style:family="table-column">
      <style:table-column-properties style:column-width="8.707cm" style:use-optimal-column-width="false"/>
    </style:style>
    <style:style style:name="co12" style:family="table-column">
      <style:table-column-properties style:column-width="3.624cm" style:use-optimal-column-width="false"/>
    </style:style>
    <style:style style:name="co13" style:family="table-column">
      <style:table-column-properties style:column-width="3.517cm" style:use-optimal-column-width="false"/>
    </style:style>
    <style:style style:name="co14" style:family="table-column">
      <style:table-column-properties style:column-width="3.602cm" style:use-optimal-column-width="false"/>
    </style:style>
    <style:style style:name="co15" style:family="table-column">
      <style:table-column-properties style:column-width="3.282cm" style:use-optimal-column-width="false"/>
    </style:style>
    <style:style style:name="co16" style:family="table-column">
      <style:table-column-properties style:column-width="3.185cm" style:use-optimal-column-width="false"/>
    </style:style>
    <style:style style:name="co17" style:family="table-column">
      <style:table-column-properties style:column-width="3.26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114cm" style:use-optimal-row-height="false"/>
    </style:style>
    <style:style style:name="ro3" style:family="table-row">
      <style:table-row-properties style:row-height="1.962cm" style:use-optimal-row-height="false"/>
    </style:style>
    <style:style style:name="ro4" style:family="table-row">
      <style:table-row-properties style:row-height="1.17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61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1.307cm" style:use-optimal-row-height="false"/>
    </style:style>
    <style:style style:name="ro9" style:family="table-row">
      <style:table-row-properties style:row-height="1.321cm" style:use-optimal-row-height="false"/>
    </style:style>
    <style:style style:name="ro10" style:family="table-row">
      <style:table-row-properties style:row-height="1.328cm" style:use-optimal-row-height="false"/>
    </style:style>
    <style:style style:name="ro11" style:family="table-row">
      <style:table-row-properties style:row-height="1.315cm" style:use-optimal-row-height="false"/>
    </style:style>
    <style:style style:name="ro12" style:family="table-row">
      <style:table-row-properties style:row-height="2.205cm" style:use-optimal-row-height="false"/>
    </style:style>
    <style:style style:name="ro13" style:family="table-row">
      <style:table-row-properties style:row-height="2.234cm" style:use-optimal-row-height="false"/>
    </style:style>
    <style:style style:name="ro14" style:family="table-row">
      <style:table-row-properties style:row-height="1.3cm" style:use-optimal-row-height="false"/>
    </style:style>
    <style:style style:name="ro15" style:family="table-row">
      <style:table-row-properties style:row-height="1.238cm" style:use-optimal-row-height="false"/>
    </style:style>
    <style:style style:name="ro16" style:family="table-row">
      <style:table-row-properties style:row-height="1.24cm" style:use-optimal-row-height="false"/>
    </style:style>
    <style:style style:name="ro17" style:family="table-row">
      <style:table-row-properties style:row-height="1.303cm" style:use-optimal-row-height="false"/>
    </style:style>
    <style:style style:name="ro18" style:family="table-row">
      <style:table-row-properties style:row-height="1.241cm" style:use-optimal-row-height="false"/>
    </style:style>
    <style:style style:name="ro19" style:family="table-row">
      <style:table-row-properties style:row-height="1.242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ourier New" fo:font-size="20pt" style:font-size-asian="20pt" style:font-size-complex="20pt"/>
    </style:style>
    <style:style style:name="ce3" style:family="table-cell">
      <style:text-properties fo:font-size="20pt" style:font-size-asian="20pt" style:font-size-complex="20pt"/>
    </style:style>
    <style:style style:name="ce4" style:family="table-cell">
      <style:text-properties fo:font-weight="bold" style:font-weight-asian="bold" style:font-weight-complex="bold"/>
    </style:style>
    <style:style style:name="ce5" style:family="table-cell"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ce6" style:family="table-cell">
      <style:text-properties style:font-name="Arial1" fo:font-size="25pt" fo:font-weight="bold" style:font-size-asian="25pt" style:font-weight-asian="bold" style:font-size-complex="25pt" style:font-weight-complex="bold"/>
    </style:style>
    <style:style style:name="ce7" style:family="table-cell">
      <style:paragraph-properties fo:text-align="center"/>
      <style:text-properties style:font-name="Courier New" fo:font-size="25pt" style:font-size-asian="25pt" style:font-size-complex="25pt"/>
    </style:style>
    <style:style style:name="ce8" style:family="table-cell">
      <style:text-properties style:font-name="Arial1" fo:font-size="25pt" style:font-size-asian="25pt" style:font-size-complex="25pt"/>
    </style:style>
    <style:style style:name="ce9" style:family="table-cell">
      <style:paragraph-properties fo:text-align="center"/>
      <style:text-properties style:font-name="Courier New" fo:font-size="23pt" style:font-size-asian="23pt" style:font-size-complex="23pt"/>
    </style:style>
    <style:style style:name="ce10" style:family="table-cell">
      <style:text-properties style:font-name="Arial1" fo:font-size="23pt" style:font-size-asian="23pt" style:font-size-complex="23pt"/>
    </style:style>
    <style:style style:name="ce1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3pt" style:language-asian="zh" style:country-asian="CN" style:font-style-asian="normal" style:font-weight-asian="normal" style:font-name-complex="Droid Sans Devanagari2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paragraph-properties fo:text-align="center"/>
      <style:text-properties style:font-name="Arial1" fo:font-size="18pt" fo:font-weight="bold" style:font-size-asian="25pt" style:font-weight-asian="bold" style:font-size-complex="25pt" style:font-weight-complex="bold"/>
    </style:style>
    <style:style style:name="ce13" style:family="table-cell">
      <style:paragraph-properties fo:text-align="center"/>
      <style:text-properties style:font-name="Courier New" fo:font-size="18pt" style:font-size-asian="23pt" style:font-size-complex="23pt"/>
    </style:style>
    <style:style style:name="ce1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3pt" style:language-asian="zh" style:country-asian="CN" style:font-style-asian="normal" style:font-weight-asian="normal" style:font-name-complex="Droid Sans Devanagari2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" fo:font-size="28pt" fo:background-color="transparent" fo:hyphenate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.6cm" fo:margin-right="0cm" fo:text-indent="-0.6cm" style:writing-mode="lr-tb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text-properties style:font-name="Courier New" fo:font-size="20pt" style:font-size-asian="20pt" style:font-size-complex="20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text-properties fo:background-color="#e0e0e0"/>
    </style:style>
    <style:style style:name="P26" style:family="paragraph">
      <style:paragraph-properties fo:margin-top="0.3cm" fo:margin-bottom="0cm" style:punctuation-wrap="hanging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font-name="Courier New" fo:font-size="20pt" style:font-size-asian="20pt" style:font-size-complex="2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e0e0e0" loext:opacity="100%" fo:background-color="#e0e0e0"/>
    </style:style>
    <style:style style:name="P36" style:family="paragraph">
      <loext:graphic-properties draw:fill="solid" draw:fill-color="#e0e0e0"/>
      <style:paragraph-properties fo:margin-left="0cm" fo:margin-right="0cm" fo:margin-top="0cm" fo:margin-bottom="0cm" fo:line-height="100%" fo:text-align="start" fo:text-indent="0cm" style:writing-mode="lr-tb"/>
      <style:text-properties fo:color="#e0e0e0" loext:opacity="100%" fo:background-color="#e0e0e0"/>
    </style:style>
    <style:style style:name="P37" style:family="paragraph"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P38" style:family="paragraph">
      <style:text-properties style:font-name="Arial1" fo:font-size="25pt" fo:font-weight="bold" style:font-size-asian="25pt" style:font-weight-asian="bold" style:font-size-complex="25pt" style:font-weight-complex="bold"/>
    </style:style>
    <style:style style:name="P39" style:family="paragraph">
      <style:paragraph-properties fo:text-align="center"/>
      <style:text-properties style:font-name="Courier New" fo:font-size="25pt" style:font-size-asian="25pt" style:font-size-complex="25pt"/>
    </style:style>
    <style:style style:name="P40" style:family="paragraph">
      <style:text-properties style:font-name="Arial1" fo:font-size="25pt" style:font-size-asian="25pt" style:font-size-complex="25pt"/>
    </style:style>
    <style:style style:name="P41" style:family="paragraph">
      <loext:graphic-properties draw:fill="none" draw:fill-color="#ffffff"/>
      <style:text-properties fo:font-size="15pt" style:font-size-asian="15pt" style:font-size-complex="15pt"/>
    </style:style>
    <style:style style:name="P42" style:family="paragraph">
      <loext:graphic-properties draw:fill="none"/>
      <style:text-properties fo:font-size="26pt" style:font-size-asian="26pt" style:font-size-complex="26pt"/>
    </style:style>
    <style:style style:name="P43" style:family="paragraph">
      <style:paragraph-properties fo:text-align="center" loext:tab-stop-distance="0cm">
        <style:tab-stops/>
      </style:paragraph-properties>
      <style:text-properties style:font-name="Arial1" fo:font-size="25pt" fo:font-weight="bold" style:font-size-asian="25pt" style:font-weight-asian="bold" style:font-size-complex="25pt" style:font-weight-complex="bold"/>
    </style:style>
    <style:style style:name="P44" style:family="paragraph">
      <style:paragraph-properties loext:tab-stop-distance="0cm">
        <style:tab-stops/>
      </style:paragraph-properties>
      <style:text-properties style:font-name="Arial1" fo:font-size="25pt" fo:font-weight="bold" style:font-size-asian="25pt" style:font-weight-asian="bold" style:font-size-complex="25pt" style:font-weight-complex="bold"/>
    </style:style>
    <style:style style:name="P45" style:family="paragraph">
      <style:paragraph-properties fo:text-align="center" loext:tab-stop-distance="0cm">
        <style:tab-stops/>
      </style:paragraph-properties>
      <style:text-properties style:font-name="Courier New" fo:font-size="23pt" style:font-size-asian="23pt" style:font-size-complex="23pt"/>
    </style:style>
    <style:style style:name="P46" style:family="paragraph">
      <style:paragraph-properties loext:tab-stop-distance="0cm">
        <style:tab-stops/>
      </style:paragraph-properties>
      <style:text-properties style:font-name="Arial1" fo:font-size="23pt" style:font-size-asian="23pt" style:font-size-complex="23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Droid Sans Fallback" style:font-size-asian="23pt" style:language-asian="zh" style:country-asian="CN" style:font-style-asian="normal" style:font-weight-asian="normal" style:font-name-complex="Droid Sans Devanagari2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style:paragraph-properties fo:text-align="center"/>
      <style:text-properties style:font-name="Arial1" fo:font-size="18pt" fo:font-weight="bold" style:font-size-asian="25pt" style:font-weight-asian="bold" style:font-size-complex="25pt" style:font-weight-complex="bold"/>
    </style:style>
    <style:style style:name="P49" style:family="paragraph">
      <style:paragraph-properties fo:text-align="center"/>
      <style:text-properties style:font-name="Courier New" fo:font-size="18pt" style:font-size-asian="23pt" style:font-size-complex="23pt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Droid Sans Fallback" style:font-size-asian="23pt" style:language-asian="zh" style:country-asian="CN" style:font-style-asian="normal" style:font-weight-asian="normal" style:font-name-complex="Droid Sans Devanagari2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style:paragraph-properties fo:text-align="center"/>
      <style:text-properties style:font-name="Courier New" fo:font-size="23pt" style:font-size-asian="23pt" style:font-size-complex="23pt"/>
    </style:style>
    <style:style style:name="P52" style:family="paragraph">
      <style:paragraph-properties fo:margin-left="0cm" fo:margin-right="0cm" fo:margin-top="0cm" fo:margin-bottom="0cm" fo:line-height="100%" fo:text-align="start" fo:text-indent="0cm"/>
    </style:style>
    <style:style style:name="P53" style:family="paragraph">
      <loext:graphic-properties draw:fill="solid" draw:fill-color="#e0e0e0"/>
      <style:paragraph-properties fo:text-align="start"/>
      <style:text-properties fo:background-color="#e0e0e0"/>
    </style:style>
    <style:style style:name="P54" style:family="paragraph">
      <loext:graphic-properties draw:fill-color="#fc5c00"/>
      <style:paragraph-properties fo:text-align="center"/>
    </style:style>
    <style:style style:name="P55" style:family="paragraph">
      <loext:graphic-properties draw:fill="none"/>
      <style:text-properties style:font-name="Arial1" fo:background-color="#fc5c00"/>
    </style:style>
    <style:style style:name="P56" style:family="paragraph">
      <loext:graphic-properties draw:fill="solid"/>
      <style:paragraph-properties fo:text-align="center"/>
    </style:style>
    <style:style style:name="P57" style:family="paragraph">
      <style:paragraph-properties fo:text-align="center"/>
    </style:style>
    <style:style style:name="P58" style:family="paragraph">
      <style:paragraph-properties fo:text-align="start"/>
    </style:style>
    <style:style style:name="P59" style:family="paragraph">
      <loext:graphic-properties draw:fill="solid" draw:fill-color="#e0e0e0"/>
      <style:paragraph-properties fo:text-align="center"/>
      <style:text-properties fo:background-color="#e0e0e0"/>
    </style:style>
    <style:style style:name="P60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61" style:family="paragraph">
      <loext:graphic-properties draw:fill="solid" draw:fill-color="#d3d3d3"/>
      <style:paragraph-properties fo:margin-left="0cm" fo:margin-right="0cm" fo:margin-top="0.2cm" fo:margin-bottom="0.1cm" fo:line-height="100%" fo:text-align="start" fo:text-indent="0cm" style:punctuation-wrap="hanging" style:font-independent-line-spacing="true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62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63" style:family="paragraph">
      <loext:graphic-properties draw:fill="solid" draw:fill-color="#e0e0e0"/>
      <style:paragraph-properties fo:margin-left="0cm" fo:margin-right="0cm" fo:text-align="start" fo:text-indent="0cm" style:font-independent-line-spacing="true"/>
      <style:text-properties fo:font-size="28pt" fo:background-color="#e0e0e0"/>
    </style:style>
    <style:style style:name="P64" style:family="paragraph">
      <loext:graphic-properties draw:fill="none"/>
      <style:text-properties fo:font-size="48pt" style:font-size-asian="48pt" style:font-size-complex="48pt"/>
    </style:style>
    <style:style style:name="P65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66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hyphenate="false"/>
    </style:style>
    <style:style style:name="P67" style:family="paragraph">
      <style:paragraph-properties fo:margin-left="0cm" fo:margin-right="0cm" fo:margin-top="0.1cm" fo:margin-bottom="0.1cm" fo:line-height="100%" fo:text-indent="0cm"/>
    </style:style>
    <style:style style:name="P68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3d3d3"/>
      <style:paragraph-properties fo:margin-left="0cm" fo:margin-right="0cm" fo:text-align="start" fo:text-indent="0cm" style:font-independent-line-spacing="true"/>
      <style:text-properties fo:font-size="28pt"/>
    </style:style>
    <style:style style:name="P70" style:family="paragraph">
      <loext:graphic-properties draw:fill="solid" draw:fill-color="#d3d3d3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71" style:family="paragraph">
      <loext:graphic-properties draw:fill="solid" draw:fill-color="#d3d3d3"/>
      <style:text-properties fo:color="#000000" loext:opacity="100%" fo:font-size="18pt" fo:font-weight="bold" fo:background-color="transparent" style:font-weight-asian="bold" style:font-weight-complex="bold"/>
    </style:style>
    <style:style style:name="P72" style:family="paragraph">
      <loext:graphic-properties draw:fill="solid" draw:fill-color="#e0e0e0"/>
    </style:style>
    <style:style style:name="P73" style:family="paragraph">
      <loext:graphic-properties draw:fill="solid" draw:fill-color="#e0e0e0"/>
      <style:paragraph-properties fo:text-align="center"/>
    </style:style>
    <style:style style:name="P74" style:family="paragraph">
      <style:paragraph-properties fo:margin-left="0cm" fo:margin-right="0cm" fo:margin-top="0.198cm" fo:margin-bottom="0cm" fo:text-indent="0cm"/>
    </style:style>
    <style:style style:name="P75" style:family="paragraph">
      <loext:graphic-properties draw:fill="solid" draw:fill-color="#ffffff"/>
    </style:style>
    <style:style style:name="P76" style:family="paragraph">
      <loext:graphic-properties draw:fill="solid" draw:fill-color="#ffffff"/>
      <style:text-properties fo:font-size="36pt" style:font-size-asian="36pt" style:font-size-complex="36pt"/>
    </style:style>
    <style:style style:name="P77" style:family="paragraph">
      <loext:graphic-properties draw:fill="solid" draw:fill-color="#e0e0e0"/>
      <style:paragraph-properties fo:text-align="center"/>
      <style:text-properties fo:font-size="24pt" style:font-size-asian="24pt" style:font-size-complex="24pt"/>
    </style:style>
    <style:style style:name="P78" style:family="paragraph">
      <loext:graphic-properties draw:fill="solid" draw:fill-color="#e0e0e0"/>
      <style:text-properties fo:font-size="18pt"/>
    </style:style>
    <style:style style:name="P79" style:family="paragraph">
      <style:paragraph-properties fo:margin-left="0.6cm" fo:margin-right="0cm" fo:text-indent="-0.6cm"/>
    </style:style>
    <style:style style:name="P80" style:family="paragraph">
      <loext:graphic-properties draw:fill-color="#ffffff"/>
      <style:paragraph-properties fo:margin-left="0cm" fo:margin-right="0cm" fo:margin-top="0.198cm" fo:margin-bottom="0cm" fo:line-height="100%" fo:text-align="start" fo:text-indent="0cm" style:punctuation-wrap="hanging"/>
      <style:text-properties fo:font-size="20pt" fo:hyphenate="false"/>
    </style:style>
    <style:style style:name="P81" style:family="paragraph">
      <loext:graphic-properties draw:fill="none"/>
      <style:paragraph-properties fo:line-height="100%" fo:text-align="start" style:font-independent-line-spacing="true"/>
      <style:text-properties fo:font-size="28pt"/>
    </style:style>
    <style:style style:name="P82" style:family="paragraph">
      <loext:graphic-properties draw:fill="solid" draw:fill-color="#e0e0e0"/>
      <style:text-properties fo:color="#c9211e" loext:opacity="100%"/>
    </style:style>
    <style:style style:name="P83" style:family="paragraph">
      <style:paragraph-properties fo:margin-left="0cm" fo:margin-right="0cm" fo:margin-top="0.098cm" fo:margin-bottom="0cm" fo:line-height="100%" fo:text-align="start" fo:text-indent="0cm" style:punctuation-wrap="hanging" style:writing-mode="lr-tb"/>
      <style:text-properties fo:hyphenate="false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text-properties style:font-name="Courier New" fo:font-size="26pt" style:font-size-asian="26pt" style:font-size-complex="26pt"/>
    </style:style>
    <style:style style:name="P86" style:family="paragraph">
      <style:paragraph-properties fo:margin-left="0cm" fo:margin-right="0cm" fo:margin-top="0.198cm" fo:margin-bottom="0.1cm" fo:line-height="100%" fo:text-align="start" fo:text-indent="0cm" style:punctuation-wrap="hanging" style:writing-mode="lr-tb"/>
      <style:text-properties fo:hyphenate="false"/>
    </style:style>
    <style:style style:name="P87" style:family="paragraph">
      <style:paragraph-properties fo:margin-left="0cm" fo:margin-right="0cm" fo:margin-top="0.4cm" fo:margin-bottom="0.1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6e6e6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New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use-window-font-color="true" loext:opacity="0%" style:font-name="Courier New" fo:font-size="20pt" style:letter-kerning="true" style:font-name-asian="Droid Sans Fallback" style:font-size-asian="20pt" style:font-name-complex="Droid Sans Devanagari2" style:font-size-complex="2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Courier New" fo:background-color="#e0e0e0"/>
    </style:style>
    <style:style style:name="T21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f0f0f" loext:opacity="100%" style:font-name="Courier New" fo:font-size="28pt" fo:language="de" fo:country="AT" style:font-size-asian="28pt" style:language-asian="de" style:country-asian="AT" style:font-size-complex="28pt" style:language-complex="de" style:country-complex="AT"/>
    </style:style>
    <style:style style:name="T30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language="de" fo:country="AT" fo:font-style="normal" style:text-underline-style="none" fo:font-weight="normal" fo:background-color="transparent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/>
    </style:style>
    <style:style style:name="T31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d3d3d3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4pt" fo:letter-spacing="normal" fo:font-style="normal" style:text-underline-style="none" fo:font-weight="normal" fo:background-color="#e0e0e0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34pt" fo:letter-spacing="normal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4pt" fo:letter-spacing="normal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style:style style:name="T40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47" style:family="text">
      <style:text-properties style:font-name="Courier New" fo:font-size="25pt" style:font-size-asian="25pt" style:font-size-complex="25pt"/>
    </style:style>
    <style:style style:name="T48" style:family="text">
      <style:text-properties style:font-name="Arial1" fo:font-size="25pt" style:font-size-asian="25pt" style:font-size-complex="25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26pt" fo:font-weight="bold" style:font-size-asian="26pt" style:font-weight-asian="bold" style:font-size-complex="26pt" style:font-weight-complex="bold"/>
    </style:style>
    <style:style style:name="T51" style:family="text">
      <style:text-properties style:font-name="Courier New" fo:font-size="26pt" fo:font-weight="normal" fo:background-color="#dcdcdc" style:font-size-asian="26pt" style:font-weight-asian="normal" style:font-size-complex="26pt" style:font-weight-complex="normal"/>
    </style:style>
    <style:style style:name="T52" style:family="text">
      <style:text-properties fo:font-size="26pt" fo:font-weight="normal" fo:background-color="#dcdcdc" style:font-size-asian="26pt" style:font-weight-asian="normal" style:font-size-complex="26pt" style:font-weight-complex="normal"/>
    </style:style>
    <style:style style:name="T53" style:family="text">
      <style:text-properties fo:font-variant="normal" fo:text-transform="none" fo:color="#0f0f0f" loext:opacity="100%" style:text-line-through-style="none" style:text-line-through-type="none" style:text-position="0% 100%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="Courier New" fo:font-weight="normal" fo:background-color="#dcdcdc" style:font-weight-asian="normal" style:font-weight-complex="normal"/>
    </style:style>
    <style:style style:name="T56" style:family="text">
      <style:text-properties fo:font-weight="normal" fo:background-color="#dcdcdc" style:font-weight-asian="normal" style:font-weight-complex="normal"/>
    </style:style>
    <style:style style:name="T57" style:family="text">
      <style:text-properties style:font-name="Courier New" fo:font-size="23pt" style:font-size-asian="23pt" style:font-size-complex="23pt"/>
    </style:style>
    <style:style style:name="T58" style:family="text">
      <style:text-properties style:font-name="Arial1" fo:font-size="23pt" style:font-size-asian="23pt" style:font-size-complex="23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3pt" style:language-asian="zh" style:country-asian="CN" style:font-style-asian="normal" style:font-weight-asian="normal" style:font-name-complex="Droid Sans Devanagari2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bold" style:letter-kerning="true" fo:background-color="#e0e0e0" style:font-name-asian="Droid Sans Fallback" style:font-size-asian="28pt" style:font-style-asian="normal" style:font-weight-asian="bold" style:font-name-complex="Droid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fo:background-color="#e0e0e0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fc5c00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fo:background-color="#e0e0e0" style:font-size-asian="28pt" style:font-style-asian="normal" style:font-weight-asian="bold" style:font-size-complex="28pt" style:font-style-complex="normal" style:font-weight-complex="bold"/>
    </style:style>
    <style:style style:name="T7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0pt" style:language-asian="de" style:country-asian="AT" style:font-style-asian="normal" style:font-weight-asian="bold" style:font-name-complex="Droid Sans Devanagari2" style:font-size-complex="20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4pt" fo:letter-spacing="normal" fo:font-style="normal" style:text-underline-style="none" fo:font-weight="normal" fo:background-color="#d3d3d3" style:font-size-asian="34pt" style:font-style-asian="normal" style:font-weight-asian="normal" style:font-size-complex="34pt" style:font-style-complex="normal" style:font-weight-complex="normal"/>
    </style:style>
    <style:style style:name="T81" style:family="text">
      <style:text-properties fo:font-variant="normal" fo:text-transform="none" fo:color="#fc5c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c5c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87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4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4pt" style:language-asian="de" style:country-asian="AT" style:font-style-asian="normal" style:font-weight-asian="normal" style:font-name-complex="Droid Sans Devanagari2" style:font-size-complex="24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0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#ffffff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Courier New" fo:font-weight="bold" fo:background-color="#e0e0e0" style:font-weight-asian="bold" style:font-weight-complex="bold"/>
    </style:style>
    <style:style style:name="T93" style:family="text">
      <style:text-properties style:font-name="Arial1" fo:background-color="transparent"/>
    </style:style>
    <style:style style:name="T94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5" style:family="text">
      <style:text-properties style:font-name="Courier New" fo:font-size="20pt" fo:font-weight="bold" fo:background-color="#e0e0e0" style:font-weight-asian="bold" style:font-weight-complex="bold"/>
    </style:style>
    <style:style style:name="T96" style:family="text">
      <style:text-properties style:font-name="Courier New" fo:font-size="20pt" fo:background-color="#e0e0e0"/>
    </style:style>
    <style:style style:name="T97" style:family="text">
      <style:text-properties style:font-name="Arial1" fo:font-size="20pt" fo:background-color="transparent"/>
    </style:style>
    <style:style style:name="T98" style:family="text">
      <style:text-properties fo:font-variant="normal" fo:text-transform="none" fo:color="#c9211e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bff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bff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bff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8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0080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7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</text:span><text:span text:style-name="T1">blen </text:span><text:span text:style-name="T1">(0)</text:span></text:p>
          </draw:text-box>
        </draw:frame>
        <draw:frame draw:name="Inhaltsplatzhalter 8" presentation:style-name="pr2" draw:text-style-name="P4" draw:layer="layout" svg:width="32.993cm" svg:height="13.897cm" svg:x="2.446cm" svg:y="3.9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Label (Etikett) für Werte oder Berechnungen</text:span></text:p>
                    <text:list>
                      <text:list-item>
                        <text:p xml:id="id2" text:id="id2" text:style-name="P3"><text:span text:style-name="T2">„</text:span><text:span text:style-name="T2">Variable referenziert bestimmten Wert“</text:span></text:p>
                      </text:list-item>
                      <text:list-item>
                        <text:p xml:id="id3" text:id="id3" text:style-name="P3"><text:span text:style-name="T2">„</text:span><text:span text:style-name="T2">Platzhalter“</text:span></text:p>
                      </text:list-item>
                    </text:list>
                  </text:list-item>
                  <text:list-item>
                    <text:p xml:id="id5" text:id="id5" text:style-name="P3"><text:span text:style-name="T2">Zuweisung von Werten mit </text:span><text:span text:style-name="T3">=</text:span></text:p>
                    <text:list>
                      <text:list-item>
                        <text:p xml:id="id6" text:id="id6" text:style-name="P3"><text:span text:style-name="T4">&lt;Variablenname&gt;</text:span><text:span text:style-name="T2"> = &lt;Zugewiesener</text:span><text:span text:style-name="T4"> Wert&gt;</text:span></text:p>
                      </text:list-item>
                    </text:list>
                  </text:list-item>
                  <text:list-item>
                    <text:p xml:id="id7" text:id="id7" text:style-name="P3"><text:span text:style-name="T2">Vorübergehendes Speichern von Werten</text:span></text:p>
                    <text:list>
                      <text:list-item>
                        <text:p xml:id="id8" text:id="id8" text:style-name="P3"><text:span text:style-name="T2">„</text:span><text:span text:style-name="T2">Lebensdauer“ bis Programmende</text:span></text:p>
                      </text:list-item>
                    </text:list>
                  </text:list-item>
                  <text:list-item>
                    <text:p xml:id="id9" text:id="id9" text:style-name="P3"><text:span text:style-name="T2">Startwert notwendig, dann beliebig änderbar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8" presentation:style-name="pr5" draw:text-style-name="P10" xml:id="id4" draw:id="id4" draw:layer="layout" svg:width="17.244cm" svg:height="3.439cm" svg:x="18.642cm" svg:y="15.1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9"><text:span text:style-name="T7"><text:s/></text:span><text:span text:style-name="T7">number <text:s/>= 123 <text:s text:c="12"/></text:span><text:span text:style-name="T7"><text:line-break/></text:span><text:span text:style-name="T7"> message = 'Hello World!'</text:span></text:p>
                    <text:p text:style-name="P9"><text:span text:style-name="T7"><text:s/></text:span><text:span text:style-name="T7">number2 = number <text:s text:c="6"/></text:span></text:p>
                  </text:list-header>
                </text:list>
              </text:list-item>
            </text:list>
          </draw:text-box>
        </draw:frame>
        <draw:frame draw:name="Fußzeilenplatzhalter 4_1" presentation:style-name="pr3" draw:text-style-name="P6" draw:layer="layout" svg:width="32.542cm" svg:height="0.607cm" svg:x="2.438cm" svg:y="18.84cm">
          <draw:text-box>
            <text:p text:style-name="P9"><text:span text:style-name="T8">Informatik </text:span><text:span text:style-name="T8">BW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6" draw:text-style-name="P13" draw:layer="layout" svg:width="17.271cm" svg:height="19.676cm" svg:x="2.159cm" svg:y="13.271cm" presentation:class="notes" presentation:user-transformed="true">
            <draw:text-box>
              <text:p text:style-name="P11"><text:span text:style-name="T9">Analogie: </text:span><text:span text:style-name="T9">Mensch</text:span><text:span text:style-name="T9">en oder </text:span><text:span text:style-name="T9">Person</text:span><text:span text:style-name="T9">en – </text:span><text:span text:style-name="T9">haben </text:span><text:span text:style-name="T9">Namen. </text:span><text:span text:style-name="T9">Die </text:span><text:span text:style-name="T9">Namen </text:span><text:span text:style-name="T9">sind </text:span><text:span text:style-name="T9">nicht </text:span><text:span text:style-name="T9">die </text:span><text:span text:style-name="T9">Mensch</text:span><text:span text:style-name="T9">en! </text:span><text:span text:style-name="T9">aber </text:span><text:span text:style-name="T9">sie </text:span><text:span text:style-name="T9">können </text:span><text:span text:style-name="T9">verwen</text:span><text:span text:style-name="T9">det </text:span><text:span text:style-name="T9">werden </text:span><text:span text:style-name="T9">um auf </text:span><text:span text:style-name="T9">Mensch</text:span><text:span text:style-name="T9">en zu </text:span><text:span text:style-name="T9">verweis</text:span><text:span text:style-name="T9">en. </text:span></text:p>
              <text:p text:style-name="P11"><text:span text:style-name="T9">__</text:span></text:p>
              <text:p text:style-name="P11"><text:span text:style-name="T9">Oft gibt </text:span><text:span text:style-name="T9">es </text:span><text:span text:style-name="T9">mehrer</text:span><text:span text:style-name="T9">e </text:span><text:span text:style-name="T9">Namen </text:span><text:span text:style-name="T9">(z.b. </text:span><text:span text:style-name="T9">Spitzna</text:span><text:span text:style-name="T9">men) </text:span><text:span text:style-name="T9">um auf </text:span><text:span text:style-name="T9">eine </text:span><text:span text:style-name="T9">Person </text:span><text:span text:style-name="T9">zu </text:span><text:span text:style-name="T9">verweis</text:span><text:span text:style-name="T9">en </text:span><text:span text:style-name="T9">(siehe </text:span><text:span text:style-name="T9">zum </text:span><text:span text:style-name="T9">Beispiel </text:span><text:span text:style-name="T9">spitzna</text:span><text:span text:style-name="T9">men). </text:span><text:span text:style-name="T9">Oder </text:span><text:span text:style-name="T9">auch </text:span><text:span text:style-name="T9">andere </text:span><text:span text:style-name="T9">Begriffe </text:span><text:span text:style-name="T9">für </text:span><text:span text:style-name="T9">referen</text:span><text:span text:style-name="T9">zen auf </text:span><text:span text:style-name="T9">Person</text:span><text:span text:style-name="T9">en: </text:span><text:span text:style-name="T9">Z.b.: </text:span><text:span text:style-name="T9">vortrag</text:span><text:span text:style-name="T9">ender = </text:span><text:span text:style-name="T9">‘Ruprec</text:span><text:span text:style-name="T9">hter’, </text:span><text:span text:style-name="T9">my_bes</text:span><text:span text:style-name="T9">t_friend </text:span><text:span text:style-name="T9">= für </text:span><text:span text:style-name="T9">jeden </text:span><text:span text:style-name="T9">untersc</text:span><text:span text:style-name="T9">hiedl.</text:span></text:p>
              <text:p text:style-name="P11"><text:span text:style-name="T9">=&gt; Tafel</text:span></text:p>
              <text:p text:style-name="P12"><text:span text:style-name="T9">__</text:span></text:p>
              <text:p text:style-name="P11"><text:span text:style-name="T9">Namen </text:span><text:span text:style-name="T9">können </text:span><text:span text:style-name="T9">sich </text:span><text:span text:style-name="T9">auch </text:span><text:span text:style-name="T9">ändern </text:span><text:span text:style-name="T9">– eine </text:span><text:span text:style-name="T9">Person </text:span><text:span text:style-name="T9">kann </text:span><text:span text:style-name="T9">einen </text:span><text:span text:style-name="T9">bestim</text:span><text:span text:style-name="T9">mten </text:span><text:span text:style-name="T9">Namen </text:span><text:span text:style-name="T9">oder </text:span><text:span text:style-name="T9">Spitzna</text:span><text:span text:style-name="T9">men </text:span><text:span text:style-name="T9">auch </text:span><text:span text:style-name="T9">nur </text:span><text:span text:style-name="T9">bestim</text:span><text:span text:style-name="T9">mte zeit </text:span><text:span text:style-name="T9">haben.</text:span></text:p>
              <text:p text:style-name="P12"><text:span text:style-name="T9">__</text:span></text:p>
              <text:p text:style-name="P11"><text:span text:style-name="T9">Außerde</text:span><text:span text:style-name="T9">m </text:span><text:span text:style-name="T9">hängt </text:span><text:span text:style-name="T9">die </text:span><text:span text:style-name="T9">Bedeut</text:span><text:span text:style-name="T9">ung </text:span><text:span text:style-name="T9">eines </text:span><text:span text:style-name="T9">Namen</text:span><text:span text:style-name="T9">s je </text:span><text:span text:style-name="T9">nach </text:span><text:span text:style-name="T9">Kontext </text:span><text:span text:style-name="T9">ab: </text:span><text:span text:style-name="T9">Vortrag</text:span><text:span text:style-name="T9">ender = </text:span><text:span text:style-name="T9">Ruprec</text:span><text:span text:style-name="T9">hter, </text:span><text:span text:style-name="T9">Physik </text:span><text:span text:style-name="T9">= ?</text:span></text:p>
              <text:p text:style-name="P11"><text:span text:style-name="T9">___</text:span></text:p>
              <text:p text:style-name="P11"><text:span text:style-name="T9">Anderes </text:span><text:span text:style-name="T9">Beispiel</text:span><text:span text:style-name="T9">:</text:span></text:p>
              <text:p text:style-name="P11"><text:span text:style-name="T9">mein_alte</text:span><text:span text:style-name="T9">r = 13</text:span><text:span text:style-name="T9"><text:line-break/></text:span><text:span text:style-name="T9">(ändert </text:span><text:span text:style-name="T9">sich </text:span><text:span text:style-name="T9">jedes </text:span><text:span text:style-name="T9">Jahr)</text:span></text:p>
              <text:p text:style-name="P11"><text:span text:style-name="T9">____</text:span><text:span text:style-name="T9"><text:line-break/></text:span><text:span text:style-name="T9">Preside</text:span><text:span text:style-name="T9">nt! </text:span><text:span text:style-name="T9">progra</text:span><text:span text:style-name="T9">mming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</text:span><text:span text:style-name="T1">blen </text:span><text:span text:style-name="T1">(1)</text:span></text:p>
          </draw:text-box>
        </draw:frame>
        <draw:frame draw:name="Inhaltsplatzhalter 8" presentation:style-name="pr2" draw:text-style-name="P17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 text:style-name="P14"><text:span text:style-name="T10">Benennungsvorschriften für Variablennamen</text:span></text:p>
                    <text:list>
                      <text:list-item>
                        <text:p xml:id="id11" text:id="id11" text:style-name="P15"><text:span text:style-name="T10">Fixe Regeln (Missachtung führt zu Fehlern)</text:span></text:p>
                        <text:list>
                          <text:list-item>
                            <text:p xml:id="id12" text:id="id12" text:style-name="P15"><text:span text:style-name="T10">Nur Buchstaben, Zahlen, „Underscore“</text:span></text:p>
                          </text:list-item>
                          <text:list-item>
                            <text:p xml:id="id13" text:id="id13" text:style-name="P15"><text:span text:style-name="T10">Keine Zahl am Beginn</text:span></text:p>
                          </text:list-item>
                          <text:list-item>
                            <text:p xml:id="id14" text:id="id14" text:style-name="P15"><text:span text:style-name="T10">Keine Leerzeichen <text:s/></text:span></text:p>
                          </text:list-item>
                        </text:list>
                      </text:list-item>
                      <text:list-item>
                        <text:p xml:id="id15" text:id="id15" text:style-name="P16"><text:span text:style-name="T10">Guidelines (stylistisch)</text:span></text:p>
                        <text:list>
                          <text:list-item>
                            <text:p xml:id="id16" text:id="id16" text:style-name="P15"><text:span text:style-name="T10">Lower case, kurz aber aussagekräftig</text:span></text:p>
                          </text:list-item>
                          <text:list-item>
                            <text:p xml:id="id17" text:id="id17" text:style-name="P15"><text:span text:style-name="T2">Wörter getrennt durch „Underscore“</text:span><text:span text:style-name="T10"> (</text:span><text:span text:style-name="T11">_</text:span><text:span text:style-name="T1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Fußzeilenplatzhalter 4_3" presentation:style-name="pr3" draw:text-style-name="P6" draw:layer="layout" svg:width="32.542cm" svg:height="0.607cm" svg:x="2.438cm" svg:y="18.84cm">
          <draw:text-box>
            <text:p text:style-name="P9"><text:span text:style-name="T8">Informatik </text:span><text:span text:style-name="T8">B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19" draw:layer="layout" svg:width="17.271cm" svg:height="12.572cm" svg:x="2.159cm" svg:y="13.271cm" presentation:class="notes">
            <draw:text-box>
              <text:p>beispiele Tafel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Date</text:span><text:span text:style-name="T1">ntype</text:span><text:span text:style-name="T1">n für </text:span><text:span text:style-name="T1">Varia</text:span><text:span text:style-name="T1">blen </text:span><text:span text:style-name="T1">(Aus</text:span><text:span text:style-name="T1">wahl)</text:span></text:p>
          </draw:text-box>
        </draw:frame>
        <draw:frame draw:name="Datumsplatzhalter 1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oliennummernplatzhalter 1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" draw:layer="layout" svg:width="28.856cm" svg:height="12.881cm" svg:x="3.26cm" svg:y="4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12">Datentyp</text:span></text:p>
              </table:table-cell>
              <table:table-cell>
                <text:p text:style-name="P20"><text:span text:style-name="T12">Funktion</text:span></text:p>
              </table:table-cell>
              <table:table-cell>
                <text:p text:style-name="P20"><text:span text:style-name="T12">Beispiele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int</text:span></text:p>
              </table:table-cell>
              <table:table-cell table:style-name="ce3">
                <text:p text:style-name="P22"><text:span text:style-name="T14">ganze Zahlen</text:span></text:p>
              </table:table-cell>
              <table:table-cell>
                <text:p text:style-name="P21"><text:span text:style-name="T13">x = 3 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float</text:span></text:p>
              </table:table-cell>
              <table:table-cell table:style-name="ce3">
                <text:p text:style-name="P22"><text:span text:style-name="T14">Fließkommazahlen</text:span></text:p>
              </table:table-cell>
              <table:table-cell>
                <text:p text:style-name="P21"><text:span text:style-name="T13">x = 3.0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13">bool</text:span></text:p>
              </table:table-cell>
              <table:table-cell table:style-name="ce3">
                <text:p text:style-name="P22"><text:span text:style-name="T14">Boolesche Werte</text:span></text:p>
              </table:table-cell>
              <table:table-cell>
                <text:p text:style-name="P21"><text:span text:style-name="T13">x = True</text:span></text:p>
                <text:p text:style-name="P21"><text:span text:style-name="T13">x = False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13">str</text:span></text:p>
              </table:table-cell>
              <table:table-cell table:style-name="ce3">
                <text:p text:style-name="P22"><text:span text:style-name="T14">Strings, Zeichenketten</text:span></text:p>
              </table:table-cell>
              <table:table-cell>
                <text:p text:style-name="P21"><text:span text:style-name="T15">x = 'Test</text:span><text:span text:style-name="T13">'</text:span></text:p>
                <text:p text:style-name="P21"><text:span text:style-name="T15">x = "Test"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tuple</text:span></text:p>
              </table:table-cell>
              <table:table-cell table:style-name="ce3">
                <text:p text:style-name="P22"><text:span text:style-name="T14">Tupel</text:span></text:p>
              </table:table-cell>
              <table:table-cell>
                <text:p text:style-name="P21"><text:span text:style-name="T13">x = (1, 2, 3)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list</text:span></text:p>
              </table:table-cell>
              <table:table-cell table:style-name="ce3">
                <text:p text:style-name="P22"><text:span text:style-name="T14">Liste</text:span></text:p>
              </table:table-cell>
              <table:table-cell>
                <text:p text:style-name="P21"><text:span text:style-name="T13">x = [1, 2, 3]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dict</text:span></text:p>
              </table:table-cell>
              <table:table-cell table:style-name="ce3">
                <text:p text:style-name="P22"><text:span text:style-name="T14">Dictionary</text:span></text:p>
              </table:table-cell>
              <table:table-cell>
                <text:p text:style-name="P21"><text:span text:style-name="T16">x = {1: 'blue', 2: 'red</text:span><text:span text:style-name="T13">'}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3">io.TextIOWrapper</text:span></text:p>
              </table:table-cell>
              <table:table-cell table:style-name="ce3">
                <text:p text:style-name="P22"><text:span text:style-name="T14">Dateien</text:span></text:p>
              </table:table-cell>
              <table:table-cell>
                <text:p text:style-name="P21"><text:span text:style-name="T15">x = open('readme.txt</text:span><text:span text:style-name="T16">'</text:span><text:span text:style-name="T13">)</text:span></text:p>
              </table:table-cell>
            </table:table-row>
            <table:table-row table:style-name="ro4" table:default-cell-style-name="ce2">
              <table:table-cell>
                <text:p text:style-name="P21"><text:span text:style-name="T13">...</text:span></text:p>
              </table:table-cell>
              <table:table-cell table:style-name="ce3">
                <text:p text:style-name="P22"><text:span text:style-name="T14">...</text:span></text:p>
              </table:table-cell>
              <table:table-cell>
                <text:p text:style-name="P21"><text:span text:style-name="T1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3" draw:layer="layout" svg:width="28.702cm" svg:height="0.962cm" svg:x="3.202cm" svg:y="17.164cm">
          <draw:text-box>
            <text:p><text:span text:style-name="T17">Tabelle 1: </text:span><text:span text:style-name="T17">Kurze </text:span><text:span text:style-name="T17">Übersicht </text:span><text:span text:style-name="T17">einer </text:span><text:span text:style-name="T17">Auswahl </text:span><text:span text:style-name="T17">von </text:span><text:span text:style-name="T17">Datentype</text:span><text:span text:style-name="T17">n in </text:span><text:span text:style-name="T17">Python. </text:span></text:p>
          </draw:text-box>
        </draw:frame>
        <draw:frame draw:name="Fußzeilenplatzhalter 4_ 2" presentation:style-name="pr3" draw:text-style-name="P6" draw:layer="layout" svg:width="32.542cm" svg:height="0.607cm" svg:x="2.438cm" svg:y="18.84cm">
          <draw:text-box>
            <text:p text:style-name="P9"><text:span text:style-name="T8">Informatik </text:span><text:span text:style-name="T8">B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Heute: </text:span><text:span text:style-name="T9">einfach</text:span><text:span text:style-name="T9">e </text:span><text:span text:style-name="T9">Datenty</text:span><text:span text:style-name="T9">pen </text:span><text:span text:style-name="T9">(vier </text:span><text:span text:style-name="T9">ganz </text:span><text:span text:style-name="T9">oben)</text:span></text:p>
              <text:p text:style-name="P11"><text:span text:style-name="T9">Danach: </text:span><text:span text:style-name="T9">Collecti</text:span><text:span text:style-name="T9">ons : </text:span><text:span text:style-name="T9">Samml</text:span><text:span text:style-name="T9">ungen </text:span><text:span text:style-name="T9">von </text:span><text:span text:style-name="T9">mehrer</text:span><text:span text:style-name="T9">en </text:span><text:span text:style-name="T9">Datenty</text:span><text:span text:style-name="T9">pen</text:span></text:p>
              <text:p text:style-name="P11"><text:span text:style-name="T9"/></text:p>
              <text:p text:style-name="P11"><text:span text:style-name="T9">Daten: </text:span><text:span text:style-name="T9">Temper</text:span><text:span text:style-name="T9">atur im </text:span><text:span text:style-name="T9">Jänner</text:span></text:p>
              <text:p text:style-name="P11"><text:span text:style-name="T9">Sammlun</text:span><text:span text:style-name="T9">g: </text:span><text:span text:style-name="T9">Monatli</text:span><text:span text:style-name="T9">che </text:span><text:span text:style-name="T9">Temper</text:span><text:span text:style-name="T9">aturen </text:span><text:span text:style-name="T9">2020</text:span>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Integ</text:span><text:span text:style-name="T1">er &amp; </text:span><text:span text:style-name="T1">Floati</text:span><text:span text:style-name="T1">ng </text:span><text:span text:style-name="T1">Point </text:span><text:span text:style-name="T1">Num</text:span><text:span text:style-name="T1">bers </text:span><text:span text:style-name="T1">(0):</text:span><text:span text:style-name="T1"><text:line-break/></text:span><text:span text:style-name="T1">Ganz</text:span><text:span text:style-name="T1">zahle</text:span><text:span text:style-name="T1">n und </text:span><text:span text:style-name="T1">Gleitk</text:span><text:span text:style-name="T1">omm</text:span><text:span text:style-name="T1">azahl</text:span></text:p>
          </draw:text-box>
        </draw:frame>
        <draw:frame draw:name="Inhaltsplatzhalter 8" presentation:style-name="pr2" draw:text-style-name="P4" draw:layer="layout" svg:width="33.915cm" svg:height="13.897cm" svg:x="1.524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8" text:id="id18" text:style-name="P14"><text:span text:style-name="T10">Integer (Ganzzahlen): </text:span></text:p>
                    <text:list>
                      <text:list-item>
                        <text:p xml:id="id19" text:id="id19" text:style-name="P24"><text:span text:style-name="T18">1</text:span><text:span text:style-name="T19">, </text:span><text:span text:style-name="T20">-13</text:span><text:span text:style-name="T19">, </text:span><text:span text:style-name="T18">15</text:span><text:span text:style-name="T19">, </text:span><text:span text:style-name="T18">-42</text:span><text:span text:style-name="T19">, </text:span><text:span text:style-name="T18">12345</text:span><text:span text:style-name="T19">, ...</text:span></text:p>
                      </text:list-item>
                    </text:list>
                  </text:list-item>
                  <text:list-item>
                    <text:p xml:id="id20" text:id="id20" text:style-name="P15"><text:span text:style-name="T21">Float (Gleitkommazahl)</text:span></text:p>
                    <text:list>
                      <text:list-item>
                        <text:p xml:id="id21" text:id="id21" text:style-name="P24"><text:span text:style-name="T20">1.3</text:span><text:span text:style-name="T21">, </text:span><text:span text:style-name="T18">3.14159</text:span><text:span text:style-name="T21">, </text:span><text:span text:style-name="T22">-42.123</text:span><text:span text:style-name="T21">, …</text:span></text:p>
                        <text:p text:style-name="P24"><text:span text:style-name="T21"/></text:p>
                      </text:list-item>
                    </text:list>
                  </text:list-item>
                  <text:list-item>
                    <text:p xml:id="id22" text:id="id22" text:style-name="P24"><text:span text:style-name="T21">Operationen</text:span></text:p>
                    <text:list>
                      <text:list-item>
                        <text:p xml:id="id23" text:id="id23" text:style-name="P24"><text:span text:style-name="T23">Addieren </text:span><text:span text:style-name="T24">(</text:span><text:span text:style-name="T25">+</text:span><text:span text:style-name="T23">), Subtrahieren </text:span><text:span text:style-name="T24">(</text:span><text:span text:style-name="T25">-</text:span><text:span text:style-name="T23">), Multiplizieren </text:span><text:span text:style-name="T24">(</text:span><text:span text:style-name="T25">*</text:span><text:span text:style-name="T23">), Dividieren </text:span><text:span text:style-name="T21">(</text:span><text:span text:style-name="T18">/</text:span><text:span text:style-name="T21">)</text:span></text:p>
                      </text:list-item>
                      <text:list-item>
                        <text:p xml:id="id26" text:id="id26" text:style-name="P24"><text:span text:style-name="T21">Exponieren (</text:span><text:span text:style-name="T18">**</text:span><text:span text:style-name="T21">)</text:span></text:p>
                      </text:list-item>
                      <text:list-item>
                        <text:p xml:id="id27" text:id="id27" text:style-name="P24"><text:span text:style-name="T21">Modulo Operator (</text:span><text:span text:style-name="T18">%</text:span><text:span text:style-name="T21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4" draw:text-style-name="P25" draw:layer="layout" svg:width="13.208cm" svg:height="2.487cm" svg:x="22.606cm" svg:y="15.901cm">
          <draw:text-box>
            <text:p xml:id="id24" text:id="id24"><text:span text:style-name="T25">number = 5 + 13 <text:s text:c="5"/></text:span></text:p>
            <text:p xml:id="id25" text:id="id25"><text:span text:style-name="T25">number_2 = number +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 text:style-name="P11">Operatoren</text:p>
              <text:p text:style-name="P11">Tafel: 11 / 2 = 5.5</text:p>
              <text:p text:style-name="P11">11 % 2 = 1</text:p>
            </draw:text-box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Integ</text:span><text:span text:style-name="T26">er &amp; </text:span><text:span text:style-name="T26">Floati</text:span><text:span text:style-name="T26">ng </text:span><text:span text:style-name="T26">Point </text:span><text:span text:style-name="T26">Num</text:span><text:span text:style-name="T26">bers </text:span><text:span text:style-name="T1">(1):</text:span><text:span text:style-name="T1"><text:line-break/></text:span><text:span text:style-name="T1">Erwei</text:span><text:span text:style-name="T1">terte </text:span><text:span text:style-name="T1">Oper</text:span><text:span text:style-name="T1">atore</text:span><text:span text:style-name="T1">n</text:span></text:p>
          </draw:text-box>
        </draw:frame>
        <draw:frame draw:name="Inhaltsplatzhalter 8" presentation:style-name="pr2" draw:text-style-name="P4" draw:layer="layout" svg:width="32.993cm" svg:height="13.135cm" svg:x="1.705cm" svg:y="4.826cm" presentation:class="outline" presentation:user-transformed="true">
          <draw:text-box>
            <text:list text:style-name="L2">
              <text:list-item>
                <text:list>
                  <text:list-item>
                    <text:p xml:id="id28" text:id="id28" text:style-name="P14"><text:span text:style-name="T10">Grundrechnung mit direkter Zuweisung:</text:span></text:p>
                    <text:list>
                      <text:list-item>
                        <text:p xml:id="id29" text:id="id29" text:style-name="P24"><text:span text:style-name="T10">Addition (</text:span><text:span text:style-name="T18">+=</text:span><text:span text:style-name="T10">), Subtraktion (</text:span><text:span text:style-name="T20">-=</text:span><text:span text:style-name="T10">), Multiplikation (</text:span><text:span text:style-name="T20">*=</text:span><text:span text:style-name="T10">), Division (</text:span><text:span text:style-name="T20">/=</text:span><text:span text:style-name="T10">)</text:span></text:p>
                        <text:p text:style-name="P15"><text:span text:style-name="T27"/></text:p>
                        <text:p text:style-name="P15"><text:span text:style-name="T27"/></text:p>
                      </text:list-item>
                    </text:list>
                    <text:p xml:id="id30" text:id="id30" text:style-name="P15"><text:span text:style-name="T27">number = 42</text:span></text:p>
                    <text:p xml:id="id31" text:id="id31" text:style-name="P15"><text:span text:style-name="T28">number += 8</text:span></text:p>
                    <text:p xml:id="id32" text:id="id32" text:style-name="P15"><text:span text:style-name="T28">number -= 10</text:span></text:p>
                    <text:p xml:id="id33" text:id="id33" text:style-name="P15"><text:span text:style-name="T28">number /= 4</text:span></text:p>
                    <text:p xml:id="id34" text:id="id34" text:style-name="P15"><text:span text:style-name="T28">number *= 2</text:span></text:p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" draw:text-style-name="P27" draw:layer="layout" svg:width="5.243cm" svg:height="5.623cm" svg:x="17.363cm" svg:y="12.446cm">
          <draw:text-box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</draw:text-box>
        </draw:frame>
        <draw:frame draw:style-name="gr6" draw:text-style-name="P27" draw:layer="layout" svg:width="12.356cm" svg:height="7.441cm" svg:x="21.024cm" svg:y="11.022cm">
          <draw:text-box>
            <text:p xml:id="id35" text:id="id35" text:style-name="P28"><text:span text:style-name="T30">number = 42</text:span></text:p>
            <text:p xml:id="id36" text:id="id36" text:style-name="P28"><text:span text:style-name="T28">number = number + 8 <text:s/></text:span></text:p>
            <text:p xml:id="id37" text:id="id37" text:style-name="P28"><text:span text:style-name="T28">number = number - 10 </text:span></text:p>
            <text:p xml:id="id38" text:id="id38" text:style-name="P28"><text:span text:style-name="T28">number = number / 4 <text:s/></text:span></text:p>
            <text:p xml:id="id39" text:id="id39" text:style-name="P28"><text:span text:style-name="T28">number = number *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2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Integ</text:span><text:span text:style-name="T26">er &amp; </text:span><text:span text:style-name="T26">Floati</text:span><text:span text:style-name="T26">ng </text:span><text:span text:style-name="T26">Point </text:span><text:span text:style-name="T26">Num</text:span><text:span text:style-name="T26">bers </text:span><text:span text:style-name="T1">(2):</text:span><text:span text:style-name="T1"><text:line-break/></text:span><text:span text:style-name="T1">Detail</text:span><text:span text:style-name="T1">s und </text:span><text:span text:style-name="T1">Beso</text:span><text:span text:style-name="T1">nderh</text:span><text:span text:style-name="T1">eiten</text:span></text:p>
          </draw:text-box>
        </draw:frame>
        <draw:frame draw:name="Inhaltsplatzhalter 14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0" text:id="id40" text:style-name="P14"><text:span text:style-name="T10">Operation mit Integer und Float = Float</text:span></text:p>
                    <text:list>
                      <text:list-item>
                        <text:p xml:id="id41" text:id="id41" text:style-name="P15"><text:span text:style-name="T18">4/2 = 2.0</text:span><text:span text:style-name="T10">, </text:span><text:span text:style-name="T18">2 * 3.0 = 6.0</text:span><text:span text:style-name="T10">, </text:span><text:span text:style-name="T18">3.0 ** 2 = 9.0</text:span></text:p>
                      </text:list-item>
                    </text:list>
                    <text:p xml:id="id42" text:id="id42" text:style-name="P14"><text:span text:style-name="T10"/></text:p>
                  </text:list-item>
                  <text:list-item>
                    <text:p xml:id="id43" text:id="id43" text:style-name="P15"><text:span text:style-name="T21">Underscores in Zahlen möglich zur Formatierung</text:span></text:p>
                    <text:list>
                      <text:list-header>
                        <text:p xml:id="id44" text:id="id44" text:style-name="P15"><text:span text:style-name="T18">universe_age = 14_000_000_000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xml:id="id45" text:id="id45" text:style-name="P15"><text:span text:style-name="T21"><text:s text:c="5"/></text:span><text:span text:style-name="T31">⬄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xml:id="id46" text:id="id46" text:style-name="P15"><text:span text:style-name="T25">universe_age = 14</text:span><text:span text:style-name="T18">000000000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22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20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20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9" draw:layer="layout" svg:width="17.271cm" svg:height="12.572cm" svg:x="2.159cm" svg:y="13.271cm" presentation:class="notes">
            <draw:text-box>
              <text:p>Beispiele – Floating Point Error</text:p>
            </draw:text-box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</text:span><text:span text:style-name="T1">s/</text:span><text:span text:style-name="T1">Zeich</text:span><text:span text:style-name="T1">enket</text:span><text:span text:style-name="T1">ten </text:span><text:span text:style-name="T1">(0)</text:span></text:p>
          </draw:text-box>
        </draw:frame>
        <draw:frame draw:name="Inhaltsplatzhalter 8" presentation:style-name="pr2" draw:text-style-name="P4" draw:layer="layout" svg:width="32.993cm" svg:height="14.74cm" svg:x="2.446cm" svg:y="3.703cm" presentation:class="outline" presentation:user-transformed="true">
          <draw:text-box>
            <text:list text:style-name="L2">
              <text:list-item>
                <text:list>
                  <text:list-item>
                    <text:p xml:id="id47" text:id="id47" text:style-name="P14"><text:span text:style-name="T10">Text = Folge von Zeichen („Characters“)</text:span></text:p>
                  </text:list-item>
                  <text:list-item>
                    <text:p xml:id="id48" text:id="id48" text:style-name="P14"><text:span text:style-name="T2">Start und Ende gekennzeichnet mit Anführungszeichen (</text:span><text:span text:style-name="T25">"</text:span><text:span text:style-name="T10"> oder </text:span><text:span text:style-name="T18">'</text:span><text:span text:style-name="T10">)</text:span></text:p>
                    <text:p text:style-name="P14"><text:span text:style-name="T32"/></text:p>
                    <text:p xml:id="id49" text:id="id49" text:style-name="P15"><text:span text:style-name="T19">string = 'Das ist ein String'</text:span></text:p>
                    <text:p xml:id="id50" text:id="id50" text:style-name="P15"><text:span text:style-name="T19">string = "Das ist auch ein String"</text:span></text:p>
                    <text:p xml:id="id51" text:id="id51" text:style-name="P15"><text:span text:style-name="T19">string = '"Python" ist nach "Monty Python" benannt.'</text:span></text:p>
                    <text:p xml:id="id52" text:id="id52" text:style-name="P15"><text:span text:style-name="T28">string = ''</text:span><text:span text:style-name="T19">'Dies ist ein</text:span></text:p>
                    <text:list>
                      <text:list-header>
                        <text:p xml:id="id53" text:id="id53" text:style-name="P15"><text:span text:style-name="T19"><text:s text:c="3"/></text:span><text:span text:style-name="T19"><text:tab/></text:span><text:span text:style-name="T19"><text:tab/></text:span><text:span text:style-name="T19"><text:tab/></text:span><text:span text:style-name="T19">mehrzeiliger </text:span><text:span text:style-name="T28">String''</text:span><text:span text:style-name="T19">'</text:span></text:p>
                      </text:list-header>
                    </text:list>
                    <text:p xml:id="id54" text:id="id54" text:style-name="P15"><text:span text:style-name="T28">string = ""</text:span><text:span text:style-name="T19">"Dies ist auch ein</text:span></text:p>
                    <text:list>
                      <text:list-header>
                        <text:p xml:id="id55" text:id="id55" text:style-name="P15"><text:span text:style-name="T19"><text:s text:c="3"/></text:span><text:span text:style-name="T19"><text:tab/></text:span><text:span text:style-name="T19"><text:tab/></text:span><text:span text:style-name="T19"><text:tab/></text:span><text:span text:style-name="T19">mehrzeiliger </text:span><text:span text:style-name="T28">String"""</text:span></text:p>
                        <text:p text:style-name="P15"><text:span text:style-name="T10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</text:span><text:span text:style-name="T1">s/</text:span><text:span text:style-name="T1">Zeich</text:span><text:span text:style-name="T1">enket</text:span><text:span text:style-name="T1">ten </text:span><text:span text:style-name="T1">(1)</text:span></text:p>
          </draw:text-box>
        </draw:frame>
        <draw:frame draw:name="Inhaltsplatzhalter 8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56" text:id="id56" text:style-name="P14"><text:span text:style-name="T2">Zugriff auf...</text:span></text:p>
                    <text:list>
                      <text:list-item>
                        <text:p xml:id="id57" text:id="id57" text:style-name="P16"><text:span text:style-name="T2">einzelne Zeichen: </text:span><text:span text:style-name="T25">[]</text:span><text:span text:style-name="T23"> </text:span><text:span text:style-name="T28">und</text:span><text:span text:style-name="T23"> Index (0-basiert!)</text:span></text:p>
                        <text:list>
                          <text:list-item>
                            <text:p xml:id="id58" text:id="id58" text:style-name="P29"><text:span text:style-name="T23">Erstes Zeichen = Index 0</text:span></text:p>
                          </text:list-item>
                          <text:list-item>
                            <text:p xml:id="id59" text:id="id59" text:style-name="P29"><text:span text:style-name="T23">Letztes Zeichen = Länge von String - 1</text:span></text:p>
                          </text:list-item>
                        </text:list>
                      </text:list-item>
                      <text:list-item>
                        <text:p xml:id="id60" text:id="id60" text:style-name="P16"><text:span text:style-name="T23">mehrere Zeichen („Slicing“): </text:span><text:span text:style-name="T25">[]</text:span><text:span text:style-name="T23">, </text:span><text:span text:style-name="T25">:</text:span><text:span text:style-name="T28"> </text:span><text:span text:style-name="T23">und Indices</text:span></text:p>
                      </text:list-item>
                      <text:list-item>
                        <text:p xml:id="id61" text:id="id61" text:style-name="P30"><text:span text:style-name="T23">Länge: </text:span><text:span text:style-name="T25">len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</text:span><text:span text:style-name="T1">s (2): </text:span><text:span text:style-name="T1">Zugrif</text:span><text:span text:style-name="T1">f auf </text:span><text:span text:style-name="T1">Teil-</text:span><text:span text:style-name="T1">String</text:span><text:span text:style-name="T1">s </text:span><text:span text:style-name="T1">(Slici</text:span><text:span text:style-name="T1">ng)</text:span></text:p>
          </draw:text-box>
        </draw:frame>
        <draw:frame draw:name="Inhaltsplatzhalter 8" presentation:style-name="pr2" draw:text-style-name="P4" draw:layer="layout" svg:width="28.03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62" text:id="id62" text:style-name="P14"><text:span text:style-name="T2">Zugriffsarten</text:span></text:p>
                    <text:list>
                      <text:list-item>
                        <text:p xml:id="id63" text:id="id63" text:style-name="P15"><text:span text:style-name="T25">string[n]</text:span></text:p>
                        <text:p xml:id="id64" text:id="id64" text:style-name="P15"><text:span text:style-name="T2">➡️ </text:span><text:span text:style-name="T25">n</text:span><text:span text:style-name="T2">-tes Zeichen (</text:span><text:span text:style-name="T25">n</text:span><text:span text:style-name="T2"> = Zahl)</text:span></text:p>
                      </text:list-item>
                      <text:list-item>
                        <text:p xml:id="id65" text:id="id65" text:style-name="P15"><text:span text:style-name="T25">string[start:ende]</text:span><text:span text:style-name="T28"> </text:span><text:span text:style-name="T2"><text:s text:c="3"/></text:span></text:p>
                        <text:p xml:id="id66" text:id="id66" text:style-name="P15"><text:span text:style-name="T2">➡️ </text:span><text:span text:style-name="T2">Zeichen von </text:span><text:span text:style-name="T25">start</text:span><text:span text:style-name="T2"> (inklusive) bis </text:span><text:span text:style-name="T25">ende</text:span><text:span text:style-name="T2"> (exklusive)</text:span></text:p>
                      </text:list-item>
                      <text:list-item>
                        <text:p xml:id="id67" text:id="id67" text:style-name="P15"><text:span text:style-name="T25">string[start:ende:schrittweite]</text:span></text:p>
                        <text:p xml:id="id68" text:id="id68" text:style-name="P15"><text:span text:style-name="T2">➡️ </text:span><text:span text:style-name="T2">Zeichen von </text:span><text:span text:style-name="T28">start</text:span><text:span text:style-name="T2"> (inklusive) bis </text:span><text:span text:style-name="T28">ende</text:span><text:span text:style-name="T2"> (exklusive) <text:s text:c="7"/>in Intervall (</text:span><text:span text:style-name="T25">schrittweite</text:span><text:span text:style-name="T28">)</text:span></text:p>
                        <text:p text:style-name="P15"><text:span text:style-name="T10"/></text:p>
                        <text:p text:style-name="P15"><text:span text:style-name="T10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 text:style-name="P11">Direkt mit beispiel auf Tafel!</text:p>
            </draw:text-box>
          </draw:frame>
        </presentation:notes>
      </draw:page>
      <draw:page draw:name="page10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</text:span><text:span text:style-name="T1">s (3): </text:span><text:span text:style-name="T1">Zugrif</text:span><text:span text:style-name="T1">f auf </text:span><text:span text:style-name="T1">Teil-</text:span><text:span text:style-name="T1">String</text:span><text:span text:style-name="T1">s </text:span><text:span text:style-name="T1">(Slici</text:span><text:span text:style-name="T1">ng)</text:span></text:p>
          </draw:text-box>
        </draw:frame>
        <draw:frame draw:name="Inhaltsplatzhalter 8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69" text:id="id69" text:style-name="P14"><text:span text:style-name="T2">Zugriffsarten (fortgeschritten)</text:span></text:p>
                    <text:list>
                      <text:list-item>
                        <text:p xml:id="id70" text:id="id70" text:style-name="P15"><text:span text:style-name="T25">string[-n]</text:span></text:p>
                        <text:p xml:id="id71" text:id="id71" text:style-name="P15"><text:span text:style-name="T2">➡️ </text:span><text:span text:style-name="T25">n</text:span><text:span text:style-name="T2">-t letztes Zeichen (</text:span><text:span text:style-name="T25">n</text:span><text:span text:style-name="T2"> = Zahl) <text:s/></text:span></text:p>
                      </text:list-item>
                      <text:list-item>
                        <text:p xml:id="id72" text:id="id72" text:style-name="P16"><text:span text:style-name="T25">string[-n:]</text:span></text:p>
                        <text:p xml:id="id73" text:id="id73" text:style-name="P15"><text:span text:style-name="T2">➡️ </text:span><text:span text:style-name="T2">alles von (inklusive) </text:span><text:span text:style-name="T25">n</text:span><text:span text:style-name="T2">-t letztem Zeichen</text:span></text:p>
                      </text:list-item>
                      <text:list-item>
                        <text:p xml:id="id74" text:id="id74" text:style-name="P15"><text:span text:style-name="T25">string[:-n]</text:span></text:p>
                        <text:p xml:id="id75" text:id="id75" text:style-name="P15"><text:span text:style-name="T2">➡️ </text:span><text:span text:style-name="T2">alles bis (exklusive) </text:span><text:span text:style-name="T25">n</text:span><text:span text:style-name="T2">-t letztem Zeichen</text:span></text:p>
                      </text:list-item>
                      <text:list-item>
                        <text:p xml:id="id76" text:id="id76" text:style-name="P15"><text:span text:style-name="T25">string[::-1]</text:span></text:p>
                        <text:p xml:id="id77" text:id="id77" text:style-name="P15"><text:span text:style-name="T2">➡️ </text:span><text:span text:style-name="T2">String in umgekehrter Reihenfolge</text:span></text:p>
                        <text:p text:style-name="P15"><text:span text:style-name="T10"/></text:p>
                        <text:p text:style-name="P15"><text:span text:style-name="T10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9" draw:layer="layout" svg:width="17.271cm" svg:height="12.572cm" svg:x="2.159cm" svg:y="13.271cm" presentation:class="notes">
            <draw:text-box>
              <text:p text:style-name="P12">Direkt mit beispiel auf Tafel: </text:p>
            </draw:text-box>
          </draw:frame>
        </presentation:notes>
      </draw:page>
      <draw:page draw:name="page11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</text:span><text:span text:style-name="T1">s/</text:span><text:span text:style-name="T1">Zeich</text:span><text:span text:style-name="T1">enket</text:span><text:span text:style-name="T1">ten </text:span><text:span text:style-name="T1">(6): </text:span><text:span text:style-name="T1">Simpl</text:span><text:span text:style-name="T1">e </text:span><text:span text:style-name="T1">Meth</text:span><text:span text:style-name="T1">oden</text:span></text:p>
          </draw:text-box>
        </draw:frame>
        <draw:frame draw:name="Inhaltsplatzhalter 8" presentation:style-name="pr2" draw:text-style-name="P4" draw:layer="layout" svg:width="15.842cm" svg:height="12.7cm" svg:x="2.446cm" svg:y="5.11cm" presentation:class="outline" presentation:user-transformed="true">
          <draw:text-box>
            <text:list text:style-name="L2">
              <text:list-item>
                <text:list>
                  <text:list-item>
                    <text:p xml:id="id78" text:id="id78" text:style-name="P14"><text:span text:style-name="T10">Flexibel, große Menge an fertig eingebauter Funktionalität</text:span><text:span text:style-name="T10"><text:line-break/></text:span><text:span text:style-name="T10"/></text:p>
                  </text:list-item>
                  <text:list-item>
                    <text:p xml:id="id79" text:id="id79" text:style-name="P14"><text:span text:style-name="T10">Methode = Aktion auf Wert (Objekt) in Variable</text:span><text:span text:style-name="T10"><text:line-break/></text:span><text:span text:style-name="T10"/></text:p>
                  </text:list-item>
                  <text:list-item>
                    <text:p xml:id="id80" text:id="id80" text:style-name="P14"><text:span text:style-name="T10">Ausgangsstrings (Tabelle): </text:span></text:p>
                    <text:list>
                      <text:list-header>
                        <text:p xml:id="id81" text:id="id81" text:style-name="P15"><text:span text:style-name="T33">name = 'max muster'</text:span><text:span text:style-name="T33"><text:line-break/></text:span><text:span text:style-name="T33">text = ' Python! ' </text:span><text:span text:style-name="T19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7" xml:id="id82" draw:id="id82" draw:layer="layout" svg:width="16.239cm" svg:height="10.52cm" svg:x="19.199cm" svg:y="5.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4">
              <table:table-cell>
                <text:p text:style-name="P31"><text:span text:style-name="T34">Aufruf</text:span></text:p>
              </table:table-cell>
              <table:table-cell>
                <text:p text:style-name="P31"><text:span text:style-name="T34">Resultat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5">name + </text:span><text:span text:style-name="T16">' , hi!</text:span><text:span text:style-name="T13">'</text:span></text:p>
              </table:table-cell>
              <table:table-cell>
                <text:p text:style-name="P21"><text:span text:style-name="T13">'max muster, hi!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text * 2</text:span></text:p>
              </table:table-cell>
              <table:table-cell>
                <text:p text:style-name="P21"><text:span text:style-name="T16">' Python! <text:s/>Python! </text:span><text:span text:style-name="T13">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name.title()</text:span></text:p>
              </table:table-cell>
              <table:table-cell>
                <text:p text:style-name="P21"><text:span text:style-name="T13">'Max Muster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name.upper()</text:span></text:p>
              </table:table-cell>
              <table:table-cell>
                <text:p text:style-name="P21"><text:span text:style-name="T13">'MAX MUSTER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text.lower()</text:span></text:p>
              </table:table-cell>
              <table:table-cell>
                <text:p text:style-name="P21"><text:span text:style-name="T13">' python! 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text.rstrip()</text:span></text:p>
              </table:table-cell>
              <table:table-cell>
                <text:p text:style-name="P21"><text:span text:style-name="T13">' Python!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text.lstrip()</text:span></text:p>
              </table:table-cell>
              <table:table-cell>
                <text:p text:style-name="P21"><text:span text:style-name="T13">'Python! '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text.strip()</text:span></text:p>
              </table:table-cell>
              <table:table-cell>
                <text:p text:style-name="P21"><text:span text:style-name="T13">'Python!'</text:span></text:p>
              </table:table-cell>
            </table:table-row>
            <table:table-row table:style-name="ro7" table:default-cell-style-name="ce2">
              <table:table-cell>
                <text:p text:style-name="P32"><text:span text:style-name="T16">name.split(' '</text:span><text:span text:style-name="T15">)</text:span></text:p>
              </table:table-cell>
              <table:table-cell>
                <text:p text:style-name="P21"><text:span text:style-name="T16">['max', 'muster'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3" draw:layer="layout" svg:width="16.256cm" svg:height="2.384cm" svg:x="19.304cm" svg:y="16.535cm">
          <draw:text-box>
            <text:p xml:id="id83" text:id="id83"><text:span text:style-name="T17">Tabelle 7: String Funktionalität und Methoden</text:span></text:p>
            <text:p xml:id="id84" text:id="id84"><text:span text:style-name="T36"><text:a xlink:href="https://docs.python.org/3/library/stdtypes.html#string-methods" xlink:type="simple">https://docs.python.org/3/library/stdtypes.html#string-method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12:05 </text:span><text:span text:style-name="T9">DANAC</text:span><text:span text:style-name="T9">H!</text:span></text:p>
              <text:p text:style-name="P11"><text:span text:style-name="T9">Auch mit </text:span><text:span text:style-name="T9">tafelbei</text:span><text:span text:style-name="T9">spiel</text:span></text:p>
            </draw:text-box>
          </draw:frame>
        </presentation:notes>
      </draw:page>
      <draw:page draw:name="page12" draw:style-name="dp1" draw:master-page-name="Titel_20_und_20_Inhalt_5f_">
        <office:forms form:automatic-focus="false" form:apply-design-mode="false"/>
        <draw:frame draw:name="Titel 1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Boole</text:span><text:span text:style-name="T1">sche </text:span><text:span text:style-name="T1">Ausdr</text:span><text:span text:style-name="T1">ücke </text:span><text:span text:style-name="T1">(</text:span><text:span text:style-name="T37">boo</text:span><text:span text:style-name="T37">lean</text:span><text:span text:style-name="T38">,</text:span><text:span text:style-name="T39"> </text:span><text:span text:style-name="T37">bool</text:span><text:span text:style-name="T40">)</text:span></text:p>
          </draw:text-box>
        </draw:frame>
        <draw:frame draw:name="Datumsplatzhalter 1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12" presentation:style-name="pr2" draw:text-style-name="P4" draw:layer="layout" svg:width="32.993cm" svg:height="13.897cm" svg:x="2.447cm" svg:y="4.547cm" presentation:class="outline" presentation:user-transformed="true">
          <draw:text-box>
            <text:list text:style-name="L2">
              <text:list-item>
                <text:list>
                  <text:list-item>
                    <text:p xml:id="id85" text:id="id85" text:style-name="P14"><text:span text:style-name="T10">Benannt nach George Boole</text:span></text:p>
                  </text:list-item>
                  <text:list-item>
                    <text:p xml:id="id88" text:id="id88" text:style-name="P14"><text:span text:style-name="T10">„</text:span><text:span text:style-name="T10">Speichert“ Wahrheitswerte</text:span></text:p>
                    <text:list>
                      <text:list-item>
                        <text:p xml:id="id89" text:id="id89" text:style-name="P15"><text:span text:style-name="T10">Mensch: Wahr oder Falsch</text:span></text:p>
                      </text:list-item>
                      <text:list-item>
                        <text:p xml:id="id90" text:id="id90" text:style-name="P15"><text:span text:style-name="T10">Computer: 1 oder 0</text:span></text:p>
                      </text:list-item>
                      <text:list-item>
                        <text:p xml:id="id91" text:id="id91" text:style-name="P15"><text:span text:style-name="T41">Python:</text:span><text:span text:style-name="T42"> </text:span><text:span text:style-name="T18">True</text:span><text:span text:style-name="T10"> oder </text:span><text:span text:style-name="T18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33" xml:id="id86" draw:id="id86" draw:layer="layout" svg:width="4.947cm" svg:height="6.629cm" svg:x="30.734cm" svg:y="2.286cm">
          <draw:image xlink:href="Pictures/10000001000000FA0000014F2A7D06CF.png" xlink:type="simple" xlink:show="embed" xlink:actuate="onLoad" draw:mime-type="image/png">
            <text:p/>
          </draw:image>
        </draw:frame>
        <draw:frame draw:style-name="gr10" draw:text-style-name="P34" draw:layer="layout" svg:width="5.468cm" svg:height="2.147cm" svg:x="30.471cm" svg:y="8.915cm">
          <draw:text-box>
            <text:p xml:id="id87" text:id="id87"><text:span text:style-name="T43">Bild 1: George Boole. https://upload.wikimedia.org/wikipedia/commons/c/ce/George_Boole_color.jpg</text:span></text:p>
          </draw:text-box>
        </draw:frame>
        <draw:custom-shape draw:style-name="gr11" draw:text-style-name="P36" xml:id="id92" draw:id="id92" draw:layer="layout" svg:width="25.654cm" svg:height="2.54cm" svg:x="2.54cm" svg:y="15.494cm">
          <text:p text:style-name="P35"><text:span text:style-name="T18">value = ((2 + 2) &lt; 4)</text:span></text:p>
          <text:p text:style-name="P35"><text:span text:style-name="T44">print(</text:span><text:span text:style-name="T45">f</text:span><text:span text:style-name="T44">'This is </text:span><text:span text:style-name="T45">{</text:span><text:span text:style-name="T44">value</text:span><text:span text:style-name="T45">}</text:span><text:span text:style-name="T25">'</text:span><text:span text:style-name="T44">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>
        <office:forms form:automatic-focus="false" form:apply-design-mode="false"/>
        <draw:frame draw:name="Titel 1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gl</text:span><text:span text:style-name="T1">eichs</text:span><text:span text:style-name="T1">opera</text:span><text:span text:style-name="T1">toren</text:span></text:p>
          </draw:text-box>
        </draw:frame>
        <draw:frame draw:name="Datumsplatzhalter 16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4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4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12" draw:layer="layout" svg:width="29.289cm" svg:height="11.881cm" svg:x="3.604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8" table:default-cell-style-name="ce5">
              <table:table-cell>
                <text:p text:style-name="P37"><text:span text:style-name="T46">Operator</text:span></text:p>
              </table:table-cell>
              <table:table-cell table:style-name="ce6">
                <text:p text:style-name="P38"><text:span text:style-name="T46">Beschreibung</text:span></text:p>
              </table:table-cell>
              <table:table-cell>
                <text:p text:style-name="P37"><text:span text:style-name="T46">Beispiel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==</text:span></text:p>
              </table:table-cell>
              <table:table-cell table:style-name="ce8">
                <text:p text:style-name="P40"><text:span text:style-name="T48">Ist gleich</text:span></text:p>
              </table:table-cell>
              <table:table-cell>
                <text:p text:style-name="P39"><text:span text:style-name="T47">x ==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!=</text:span></text:p>
              </table:table-cell>
              <table:table-cell table:style-name="ce8">
                <text:p text:style-name="P40"><text:span text:style-name="T48">Nicht gleich</text:span></text:p>
              </table:table-cell>
              <table:table-cell>
                <text:p text:style-name="P39"><text:span text:style-name="T47">x !=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&gt;</text:span></text:p>
              </table:table-cell>
              <table:table-cell table:style-name="ce8">
                <text:p text:style-name="P40"><text:span text:style-name="T48">Größer als</text:span></text:p>
              </table:table-cell>
              <table:table-cell>
                <text:p text:style-name="P39"><text:span text:style-name="T47">x &gt;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&lt;</text:span></text:p>
              </table:table-cell>
              <table:table-cell table:style-name="ce8">
                <text:p text:style-name="P40"><text:span text:style-name="T48">Kleiner als</text:span></text:p>
              </table:table-cell>
              <table:table-cell>
                <text:p text:style-name="P39"><text:span text:style-name="T47">x &lt;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&gt;=</text:span></text:p>
              </table:table-cell>
              <table:table-cell table:style-name="ce8">
                <text:p text:style-name="P40"><text:span text:style-name="T48">Größer gleich</text:span></text:p>
              </table:table-cell>
              <table:table-cell>
                <text:p text:style-name="P39"><text:span text:style-name="T47">x &gt;=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&lt;=</text:span></text:p>
              </table:table-cell>
              <table:table-cell table:style-name="ce8">
                <text:p text:style-name="P40"><text:span text:style-name="T48">Kleiner gleich</text:span></text:p>
              </table:table-cell>
              <table:table-cell>
                <text:p text:style-name="P39"><text:span text:style-name="T47">x &lt;= y</text:span></text:p>
              </table:table-cell>
            </table:table-row>
            <table:table-row table:style-name="ro9" table:default-cell-style-name="ce7">
              <table:table-cell>
                <text:p text:style-name="P39"><text:span text:style-name="T47">is</text:span></text:p>
              </table:table-cell>
              <table:table-cell table:style-name="ce8">
                <text:p text:style-name="P40"><text:span text:style-name="T48">Beide Variablen sind das gleiche Objekt</text:span></text:p>
              </table:table-cell>
              <table:table-cell>
                <text:p text:style-name="P39"><text:span text:style-name="T47">x is y</text:span></text:p>
              </table:table-cell>
            </table:table-row>
            <table:table-row table:style-name="ro10" table:default-cell-style-name="ce7">
              <table:table-cell>
                <text:p text:style-name="P39"><text:span text:style-name="T47">is not</text:span></text:p>
              </table:table-cell>
              <table:table-cell table:style-name="ce8">
                <text:p text:style-name="P40"><text:span text:style-name="T48">Beide Variablen sind nicht das gleiche Objekt</text:span></text:p>
              </table:table-cell>
              <table:table-cell>
                <text:p text:style-name="P39"><text:span text:style-name="T47">x is not 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41" draw:layer="layout" svg:width="29.262cm" svg:height="0.962cm" svg:x="3.531cm" svg:y="15.869cm">
          <draw:text-box>
            <text:p><text:span text:style-name="T49">Tabelle 1: </text:span><text:span text:style-name="T49">Wichtige </text:span><text:span text:style-name="T49">Vergleichsop</text:span><text:span text:style-name="T49">eratoren in </text:span><text:span text:style-name="T49">Python </text:span></text:p>
          </draw:text-box>
        </draw:frame>
        <draw:frame draw:style-name="gr14" draw:text-style-name="P42" draw:layer="layout" svg:width="32.004cm" svg:height="1.356cm" svg:x="3.556cm" svg:y="17.01cm">
          <draw:text-box>
            <text:p xml:id="id93" text:id="id93"><text:span text:style-name="T50">=&gt; Ergebnis Vergleichsoperatoren: Boolean-Wert (</text:span><text:span text:style-name="T51">True</text:span><text:span text:style-name="T50"> oder </text:span><text:span text:style-name="T52">False</text:span><text:span text:style-name="T5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>
        <office:forms form:automatic-focus="false" form:apply-design-mode="false"/>
        <draw:frame draw:name="Titel 1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Logis</text:span><text:span text:style-name="T26">che </text:span><text:span text:style-name="T26">Oper</text:span><text:span text:style-name="T26">atore</text:span><text:span text:style-name="T26">n </text:span><text:span text:style-name="T1">(0)</text:span><text:span text:style-name="T53"> </text:span></text:p>
          </draw:text-box>
        </draw:frame>
        <draw:frame draw:name="Datumsplatzhalter 17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5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15" presentation:style-name="pr8" draw:text-style-name="P4" draw:layer="layout" svg:width="32.993cm" svg:height="13.897cm" svg:x="2.447cm" svg:y="4.547cm" presentation:class="outline" presentation:user-transformed="true">
          <draw:text-box>
            <text:list text:style-name="L2">
              <text:list-item>
                <text:list>
                  <text:list-item>
                    <text:p xml:id="id94" text:id="id94" text:style-name="P14"><text:span text:style-name="T10">OR</text:span></text:p>
                    <text:list>
                      <text:list-item>
                        <text:p xml:id="id95" text:id="id95" text:style-name="P15"><text:span text:style-name="T10">Oder, logische Summe, +, v, ...</text:span></text:p>
                      </text:list-item>
                    </text:list>
                  </text:list-item>
                  <text:list-item>
                    <text:p xml:id="id96" text:id="id96" text:style-name="P14"><text:span text:style-name="T10">AND</text:span></text:p>
                    <text:list>
                      <text:list-item>
                        <text:p xml:id="id97" text:id="id97" text:style-name="P15"><text:span text:style-name="T10">Und, logisches Produkt, *, ∧, ...</text:span></text:p>
                      </text:list-item>
                    </text:list>
                  </text:list-item>
                  <text:list-item>
                    <text:p xml:id="id98" text:id="id98" text:style-name="P14"><text:span text:style-name="T10">NOT</text:span></text:p>
                    <text:list>
                      <text:list-item>
                        <text:p xml:id="id99" text:id="id99" text:style-name="P15"><text:span text:style-name="T10">Verneinung, Komplementierung, ¬, !, …</text:span></text:p>
                      </text:list-item>
                    </text:list>
                    <text:p text:style-name="P15"><text:span text:style-name="T54"/></text:p>
                    <text:p xml:id="id100" text:id="id100" text:style-name="P15"><text:span text:style-name="T54">=&gt; Ergebnis logischer Operatoren: Boolean-Wert (</text:span><text:span text:style-name="T55">True</text:span><text:span text:style-name="T54"> oder </text:span><text:span text:style-name="T56">False</text:span><text:span text:style-name="T54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_20_und_20_Inhalt_5f_">
        <office:forms form:automatic-focus="false" form:apply-design-mode="false"/>
        <draw:frame draw:name="Titel 1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gis</text:span><text:span text:style-name="T1">che </text:span><text:span text:style-name="T1">Oper</text:span><text:span text:style-name="T1">atore</text:span><text:span text:style-name="T1">n (1)</text:span></text:p>
          </draw:text-box>
        </draw:frame>
        <draw:frame draw:name="Datumsplatzhalter 18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6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6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12" draw:layer="layout" svg:width="23.961cm" svg:height="7.958cm" svg:x="5.642cm" svg:y="5.81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1" table:default-cell-style-name="ce5">
              <table:table-cell>
                <text:p text:style-name="P43"><text:span text:style-name="T46">Operator</text:span></text:p>
              </table:table-cell>
              <table:table-cell table:style-name="ce6">
                <text:p text:style-name="P44"><text:span text:style-name="T46">Beschreibung</text:span></text:p>
              </table:table-cell>
              <table:table-cell>
                <text:p text:style-name="P43"><text:span text:style-name="T46">Beispiel</text:span></text:p>
              </table:table-cell>
            </table:table-row>
            <table:table-row table:style-name="ro12" table:default-cell-style-name="ce9">
              <table:table-cell>
                <text:p text:style-name="P45"><text:span text:style-name="T57">and</text:span></text:p>
              </table:table-cell>
              <table:table-cell table:style-name="ce10">
                <text:p text:style-name="P46"><text:span text:style-name="T58">Wahr, wenn beide Statements wahr sind</text:span></text:p>
              </table:table-cell>
              <table:table-cell>
                <text:p text:style-name="P45"><text:span text:style-name="T57">x == y and y &lt; 5</text:span></text:p>
              </table:table-cell>
            </table:table-row>
            <table:table-row table:style-name="ro12" table:default-cell-style-name="ce9">
              <table:table-cell>
                <text:p text:style-name="P45"><text:span text:style-name="T57">or</text:span></text:p>
              </table:table-cell>
              <table:table-cell table:style-name="ce10">
                <text:p text:style-name="P46"><text:span text:style-name="T58">Wahr, wenn eines der Statements wahr ist</text:span></text:p>
              </table:table-cell>
              <table:table-cell>
                <text:p text:style-name="P45"><text:span text:style-name="T57">x &gt; 2 or y &gt; 3</text:span></text:p>
              </table:table-cell>
            </table:table-row>
            <table:table-row table:style-name="ro13">
              <table:table-cell table:style-name="ce11">
                <text:p text:style-name="P47"><text:span text:style-name="T59">not</text:span></text:p>
              </table:table-cell>
              <table:table-cell table:style-name="ce10">
                <text:p text:style-name="P46"><text:span text:style-name="T58">Verneinung des folgenden Vergleichs oder Werts</text:span></text:p>
              </table:table-cell>
              <table:table-cell table:style-name="ce9">
                <text:p text:style-name="P45"><text:span text:style-name="T57">not x == y</text:span></text:p>
                <text:p text:style-name="P45"><text:span text:style-name="T57">not 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3" draw:layer="layout" svg:width="24.076cm" svg:height="0.962cm" svg:x="5.542cm" svg:y="13.77cm">
          <draw:text-box>
            <text:p><text:span text:style-name="T17">Tabelle 2: </text:span><text:span text:style-name="T17">Logik und </text:span><text:span text:style-name="T17">Zugehörig</text:span><text:span text:style-name="T17">keitsoperat</text:span><text:span text:style-name="T17">or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x = 3, y=3</text:p>
              <text:p>=====</text:p>
              <text:p/>
            </draw:text-box>
          </draw:frame>
        </presentation:notes>
      </draw:page>
      <draw:page draw:name="page16" draw:style-name="dp1" draw:master-page-name="Titel_20_und_20_Inhalt_5f_">
        <office:forms form:automatic-focus="false" form:apply-design-mode="false"/>
        <draw:frame draw:name="Titel 1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gis</text:span><text:span text:style-name="T1">che </text:span><text:span text:style-name="T1">Oper</text:span><text:span text:style-name="T1">atore</text:span><text:span text:style-name="T1">n (2): </text:span><text:span text:style-name="T1">Wahr</text:span><text:span text:style-name="T1">heitst</text:span><text:span text:style-name="T1">abell</text:span><text:span text:style-name="T1">e</text:span></text:p>
          </draw:text-box>
        </draw:frame>
        <draw:frame draw:name="Datumsplatzhalter 19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7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7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12" xml:id="id101" draw:id="id101" draw:layer="layout" svg:width="10.742cm" svg:height="6.253cm" svg:x="1.613cm" svg:y="6.959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4" table:default-cell-style-name="ce12">
              <table:table-cell>
                <text:p text:style-name="P48"><text:span text:style-name="T46">x</text:span></text:p>
              </table:table-cell>
              <table:table-cell>
                <text:p text:style-name="P48"><text:span text:style-name="T46">y</text:span></text:p>
              </table:table-cell>
              <table:table-cell>
                <text:p text:style-name="P48"><text:span text:style-name="T46">x and y</text:span></text:p>
              </table:table-cell>
            </table:table-row>
            <table:table-row table:style-name="ro15" table:default-cell-style-name="ce13"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True</text:span></text:p>
              </table:table-cell>
            </table:table-row>
            <table:table-row table:style-name="ro15" table:default-cell-style-name="ce13"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False</text:span></text:p>
              </table:table-cell>
              <table:table-cell>
                <text:p text:style-name="P49"><text:span text:style-name="T57">False</text:span></text:p>
              </table:table-cell>
            </table:table-row>
            <table:table-row table:style-name="ro15">
              <table:table-cell table:style-name="ce14">
                <text:p text:style-name="P50"><text:span text:style-name="T59">False</text:span></text:p>
              </table:table-cell>
              <table:table-cell table:style-name="ce13">
                <text:p text:style-name="P49"><text:span text:style-name="T57">True</text:span></text:p>
              </table:table-cell>
              <table:table-cell table:style-name="ce9">
                <text:p text:style-name="P51"><text:span text:style-name="T57">False</text:span></text:p>
              </table:table-cell>
            </table:table-row>
            <table:table-row table:style-name="ro16" table:default-cell-style-name="ce9">
              <table:table-cell>
                <text:p text:style-name="P51"><text:span text:style-name="T59">False</text:span></text:p>
              </table:table-cell>
              <table:table-cell table:style-name="ce13">
                <text:p text:style-name="P49"><text:span text:style-name="T57">False</text:span></text:p>
              </table:table-cell>
              <table:table-cell>
                <text:p text:style-name="P51"><text:span text:style-name="T57">Fals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23" xml:id="id102" draw:id="id102" draw:layer="layout" svg:width="10.579cm" svg:height="0.962cm" svg:x="1.513cm" svg:y="13.208cm">
          <draw:text-box>
            <text:p><text:span text:style-name="T17">Tabelle 3: AND Wahrheitstabelle</text:span></text:p>
          </draw:text-box>
        </draw:frame>
        <draw:frame draw:style-name="gr12" xml:id="id103" draw:id="id103" draw:layer="layout" svg:width="9.726cm" svg:height="6.253cm" svg:x="14.514cm" svg:y="6.93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4" table:default-cell-style-name="ce12">
              <table:table-cell>
                <text:p text:style-name="P48"><text:span text:style-name="T46">x</text:span></text:p>
              </table:table-cell>
              <table:table-cell>
                <text:p text:style-name="P48"><text:span text:style-name="T46">y</text:span></text:p>
              </table:table-cell>
              <table:table-cell>
                <text:p text:style-name="P48"><text:span text:style-name="T46">x or y</text:span></text:p>
              </table:table-cell>
            </table:table-row>
            <table:table-row table:style-name="ro15" table:default-cell-style-name="ce13"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True</text:span></text:p>
              </table:table-cell>
            </table:table-row>
            <table:table-row table:style-name="ro15" table:default-cell-style-name="ce13"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False</text:span></text:p>
              </table:table-cell>
              <table:table-cell>
                <text:p text:style-name="P49"><text:span text:style-name="T57">True</text:span></text:p>
              </table:table-cell>
            </table:table-row>
            <table:table-row table:style-name="ro15">
              <table:table-cell table:style-name="ce14">
                <text:p text:style-name="P50"><text:span text:style-name="T59">False</text:span></text:p>
              </table:table-cell>
              <table:table-cell table:style-name="ce13">
                <text:p text:style-name="P49"><text:span text:style-name="T57">True</text:span></text:p>
              </table:table-cell>
              <table:table-cell table:style-name="ce9">
                <text:p text:style-name="P51"><text:span text:style-name="T57">True</text:span></text:p>
              </table:table-cell>
            </table:table-row>
            <table:table-row table:style-name="ro16" table:default-cell-style-name="ce9">
              <table:table-cell>
                <text:p text:style-name="P51"><text:span text:style-name="T59">False</text:span></text:p>
              </table:table-cell>
              <table:table-cell table:style-name="ce13">
                <text:p text:style-name="P49"><text:span text:style-name="T57">False</text:span></text:p>
              </table:table-cell>
              <table:table-cell>
                <text:p text:style-name="P51"><text:span text:style-name="T57">Fals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" xml:id="id105" draw:id="id105" draw:layer="layout" svg:width="6.466cm" svg:height="3.785cm" svg:x="26.508cm" svg:y="8.177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7" table:default-cell-style-name="ce12">
              <table:table-cell>
                <text:p text:style-name="P48"><text:span text:style-name="T46">x</text:span></text:p>
              </table:table-cell>
              <table:table-cell>
                <text:p text:style-name="P48"><text:span text:style-name="T46">not x</text:span></text:p>
              </table:table-cell>
            </table:table-row>
            <table:table-row table:style-name="ro18" table:default-cell-style-name="ce13">
              <table:table-cell>
                <text:p text:style-name="P49"><text:span text:style-name="T57">True</text:span></text:p>
              </table:table-cell>
              <table:table-cell>
                <text:p text:style-name="P49"><text:span text:style-name="T57">False</text:span></text:p>
              </table:table-cell>
            </table:table-row>
            <table:table-row table:style-name="ro19" table:default-cell-style-name="ce13">
              <table:table-cell>
                <text:p text:style-name="P49"><text:span text:style-name="T57">False</text:span></text:p>
              </table:table-cell>
              <table:table-cell>
                <text:p text:style-name="P49"><text:span text:style-name="T57">Tru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23" xml:id="id104" draw:id="id104" draw:layer="layout" svg:width="9.652cm" svg:height="0.962cm" svg:x="14.478cm" svg:y="13.262cm">
          <draw:text-box>
            <text:p><text:span text:style-name="T60">Tabelle 4: OR </text:span><text:span text:style-name="T17">Wahrheitstabelle</text:span></text:p>
          </draw:text-box>
        </draw:frame>
        <draw:frame draw:style-name="gr15" draw:text-style-name="P23" xml:id="id106" draw:id="id106" draw:layer="layout" svg:width="9.817cm" svg:height="1.016cm" svg:x="25.4cm" svg:y="11.938cm">
          <draw:text-box>
            <text:p><text:span text:style-name="T60">Tabelle 5: NOT </text:span><text:span text:style-name="T17">Wahrheitstab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Beispiele </text:span><text:span text:style-name="T9">– Tafel </text:span><text:span text:style-name="T9">und </text:span><text:span text:style-name="T9">Code</text:span></text:p>
              <text:p><text:span text:style-name="T9"/></text:p>
              <text:p><text:span text:style-name="T9">Check </text:span><text:span text:style-name="T9">Time! - </text:span><text:span text:style-name="T9">not </text:span><text:span text:style-name="T9">later </text:span><text:span text:style-name="T9">than </text:span><text:span text:style-name="T9">11:05</text:span></text:p>
            </draw:text-box>
          </draw:frame>
        </presentation:notes>
      </draw:page>
      <draw:page draw:name="page17" draw:style-name="dp1" draw:master-page-name="Titel_20_und_20_Inhalt_5f_" presentation:presentation-page-layout-name="AL1T0">
        <office:forms form:automatic-focus="false" form:apply-design-mode="false"/>
        <draw:frame draw:name="Titel 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</text:span><text:span text:style-name="T1">weigu</text:span><text:span text:style-name="T1">ngen </text:span><text:span text:style-name="T1">(0): if </text:span><text:span text:style-name="T1">State</text:span><text:span text:style-name="T1">ment</text:span><text:span text:style-name="T1">s</text:span></text:p>
          </draw:text-box>
        </draw:frame>
        <draw:frame draw:name="Inhaltsplatzhalter 2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7" text:id="id107" text:style-name="P14"><text:span text:style-name="T10">Überprüfen von Bedingungen, </text:span><text:span text:style-name="T10">konditionelles Ausführen von Code</text:span></text:p>
                    <text:list>
                      <text:list-item>
                        <text:p xml:id="id108" text:id="id108" text:style-name="P15"><text:span text:style-name="T10">„</text:span><text:span text:style-name="T10">WENN-Bedingung“ / “WENN-</text:span><text:span text:style-name="T10">DANN-Bedingung“</text:span></text:p>
                      </text:list-item>
                    </text:list>
                    <text:p text:style-name="P14"><text:span text:style-name="T10"/></text:p>
                  </text:list-item>
                  <text:list-item>
                    <text:p xml:id="id109" text:id="id109" text:style-name="P14"><text:span text:style-name="T10">„</text:span><text:span text:style-name="T61">WENN</text:span><text:span text:style-name="T10"> </text:span><text:span text:style-name="T62">Bedingung erfüllt</text:span><text:span text:style-name="T10"> </text:span><text:span text:style-name="T61">DANN</text:span><text:span text:style-name="T10"> </text:span><text:span text:style-name="T62">tu </text:span><text:span text:style-name="T62">etwas</text:span><text:span text:style-name="T10">“</text:span></text:p>
                    <text:p text:style-name="P14"><text:span text:style-name="T10"/></text:p>
                  </text:list-item>
                  <text:list-item>
                    <text:p xml:id="id110" text:id="id110" text:style-name="P14"><text:span text:style-name="T10">Python Syntax:</text:span></text:p>
                    <text:p xml:id="id111" text:id="id111" text:style-name="P15"><text:span text:style-name="T63">if</text:span><text:span text:style-name="T19"> </text:span><text:span text:style-name="T64">condition</text:span><text:span text:style-name="T63">:</text:span><text:span text:style-name="T63"><text:line-break/></text:span><text:span text:style-name="T63"> <text:s text:c="3"/></text:span><text:span text:style-name="T19">print('Do something')</text:span></text:p>
                  </text:list-item>
                </text:list>
              </text:list-item>
            </text:list>
          </draw:text-box>
        </draw:frame>
        <draw:frame draw:name="Datumsplatzhalter 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2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16" draw:text-style-name="P53" xml:id="id115" draw:id="id115" draw:layer="layout" svg:width="11.276cm" svg:height="3.605cm" svg:x="24.384cm" svg:y="14.683cm">
          <draw:text-box>
            <text:p text:style-name="P52"><text:span text:style-name="T65">if</text:span><text:span text:style-name="T66"> x &gt; 2:</text:span><text:span text:style-name="T65"><text:line-break/></text:span><text:span text:style-name="T65"> <text:s text:c="3"/></text:span><text:span text:style-name="T66">print('In if')</text:span></text:p>
            <text:p text:style-name="P52"><text:span text:style-name="T66">print('Not in if')</text:span></text:p>
          </draw:text-box>
        </draw:frame>
        <draw:custom-shape draw:style-name="gr17" draw:text-style-name="P54" xml:id="id112" draw:id="id112" draw:layer="layout" svg:width="2.286cm" svg:height="1.016cm" svg:x="3.556cm" svg:y="14.54cm">
          <text:p/>
          <draw:enhanced-geometry svg:viewBox="0 0 21600 21600" draw:type="rectangle" draw:enhanced-path="M 0 0 L 21600 0 21600 21600 0 21600 0 0 Z N"/>
        </draw:custom-shape>
        <draw:frame draw:style-name="gr18" draw:text-style-name="P55" xml:id="id113" draw:id="id113" draw:layer="layout" svg:width="12.7cm" svg:height="1.352cm" svg:x="3.302cm" svg:y="16.374cm">
          <draw:text-box>
            <text:p><text:span text:style-name="T67">4 Leerzeichen eingerückt</text:span></text:p>
          </draw:text-box>
        </draw:frame>
        <draw:line draw:style-name="gr19" draw:text-style-name="P56" xml:id="id114" draw:id="id114" draw:layer="layout" svg:x1="4.572cm" svg:y1="16.474cm" svg:x2="4.572cm" svg:y2="15.602cm">
          <text:p/>
        </draw:line>
        <draw:custom-shape draw:style-name="gr20" draw:text-style-name="P54" xml:id="id116" draw:id="id116" draw:layer="layout" svg:width="2.286cm" svg:height="1.162cm" svg:x="24.638cm" svg:y="1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12:17 </text:span><text:span text:style-name="T9">spätest</text:span><text:span text:style-name="T9">ens </text:span><text:span text:style-name="T9">beginn</text:span><text:span text:style-name="T9">en</text:span></text:p>
            </draw:text-box>
          </draw:frame>
        </presentation:notes>
      </draw:page>
      <draw:page draw:name="page18" draw:style-name="dp1" draw:master-page-name="Titel_20_und_20_Inhalt_5f_">
        <office:forms form:automatic-focus="false" form:apply-design-mode="false"/>
        <draw:frame draw:name="Titel 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</text:span><text:span text:style-name="T1">weigu</text:span><text:span text:style-name="T1">ngen </text:span><text:span text:style-name="T1">(1): if-</text:span><text:span text:style-name="T1">else </text:span><text:span text:style-name="T1">State</text:span><text:span text:style-name="T1">ment</text:span><text:span text:style-name="T1">s</text:span></text:p>
          </draw:text-box>
        </draw:frame>
        <draw:frame draw:name="Inhaltsplatzhalter 1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17" text:id="id117" text:style-name="P14"><text:span text:style-name="T10">if-Statement mit „Fallback“ falls Bedingung nicht erfüllt</text:span></text:p>
                    <text:list>
                      <text:list-item>
                        <text:p xml:id="id118" text:id="id118" text:style-name="P15"><text:span text:style-name="T10">„</text:span><text:span text:style-name="T10">WENN-DANN-SONST-Bedingung“</text:span></text:p>
                      </text:list-item>
                    </text:list>
                    <text:p text:style-name="P14"><text:span text:style-name="T10"/></text:p>
                  </text:list-item>
                  <text:list-item>
                    <text:p xml:id="id119" text:id="id119" text:style-name="P14"><text:span text:style-name="T2">„</text:span><text:span text:style-name="T68">WENN</text:span><text:span text:style-name="T2"> </text:span><text:span text:style-name="T62">Bedingung erfüllt</text:span><text:span text:style-name="T10"> </text:span><text:span text:style-name="T61">DANN</text:span><text:span text:style-name="T10"> </text:span><text:span text:style-name="T62">tu etwas</text:span><text:span text:style-name="T10"> </text:span><text:span text:style-name="T61">SONST</text:span><text:span text:style-name="T10"> </text:span><text:span text:style-name="T62">tu etwas anderes</text:span><text:span text:style-name="T10">“</text:span></text:p>
                    <text:p text:style-name="P14"><text:span text:style-name="T10"/></text:p>
                  </text:list-item>
                  <text:list-item>
                    <text:p xml:id="id120" text:id="id120" text:style-name="P14"><text:span text:style-name="T10">Python Syntax:</text:span></text:p>
                    <text:p xml:id="id121" text:id="id121" text:style-name="P15"><text:span text:style-name="T63">if</text:span><text:span text:style-name="T19"> </text:span><text:span text:style-name="T64">condition</text:span><text:span text:style-name="T63">:</text:span><text:span text:style-name="T63"><text:line-break/></text:span><text:span text:style-name="T63"> <text:s text:c="3"/></text:span><text:span text:style-name="T19">print('Do something')</text:span></text:p>
                    <text:p xml:id="id122" text:id="id122" text:style-name="P15"><text:span text:style-name="T63">else:</text:span><text:span text:style-name="T63"><text:line-break/></text:span><text:span text:style-name="T63"> <text:s text:c="3"/></text:span><text:span text:style-name="T19">print('Do something else')</text:span></text:p>
                  </text:list-item>
                </text:list>
              </text:list-item>
            </text:list>
          </draw:text-box>
        </draw:frame>
        <draw:frame draw:name="Datumsplatzhalter 1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21" draw:text-style-name="P59" xml:id="id123" draw:id="id123" draw:layer="layout" svg:width="12.446cm" svg:height="4.723cm" svg:x="23.293cm" svg:y="13.616cm">
          <draw:text-box>
            <text:p text:style-name="P57"><text:span text:style-name="T69">if</text:span><text:span text:style-name="T18"> x &gt; 2:</text:span><text:span text:style-name="T69"> <text:s text:c="11"/></text:span></text:p>
            <text:p text:style-name="P58"><text:span text:style-name="T18"><text:s text:c="4"/></text:span><text:span text:style-name="T18">print('In if')</text:span></text:p>
            <text:p text:style-name="P58"><text:span text:style-name="T69">else:</text:span></text:p>
            <text:p text:style-name="P58"><text:span text:style-name="T66"><text:s text:c="4"/></text:span><text:span text:style-name="T66">print(</text:span><text:span text:style-name="T18">'In else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Beispiel:</text:span></text:p>
              <text:p><text:span text:style-name="T9"/></text:p>
              <text:p><text:span text:style-name="T9">WENN </text:span><text:span text:style-name="T9">ich für </text:span><text:span text:style-name="T9">die </text:span><text:span text:style-name="T9">Prüfung </text:span><text:span text:style-name="T9">lerne</text:span></text:p>
              <text:p><text:span text:style-name="T9">DANN </text:span><text:span text:style-name="T9">besteh</text:span><text:span text:style-name="T9">e ich </text:span><text:span text:style-name="T9">die LV</text:span></text:p>
              <text:p><text:span text:style-name="T9">SONST </text:span><text:span text:style-name="T9">falle ich </text:span><text:span text:style-name="T9">durch</text:span></text:p>
            </draw:text-box>
          </draw:frame>
        </presentation:notes>
      </draw:page>
      <draw:page draw:name="page19" draw:style-name="dp1" draw:master-page-name="Titel_20_und_20_Inhalt_5f_">
        <office:forms form:automatic-focus="false" form:apply-design-mode="false"/>
        <draw:frame draw:name="Titel 2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</text:span><text:span text:style-name="T1">weigu</text:span><text:span text:style-name="T1">ngen </text:span><text:span text:style-name="T1">(2): if-</text:span><text:span text:style-name="T1">elif-</text:span><text:span text:style-name="T1">else </text:span><text:span text:style-name="T1">State</text:span><text:span text:style-name="T1">ment</text:span><text:span text:style-name="T1">s</text:span></text:p>
          </draw:text-box>
        </draw:frame>
        <draw:frame draw:name="Inhaltsplatzhalter 4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24" text:id="id124" text:style-name="P14"><text:span text:style-name="T2">Mehrere Verzweigungen für kompliziertere Abfragen</text:span></text:p>
                    <text:list>
                      <text:list-item>
                        <text:p xml:id="id125" text:id="id125" text:style-name="P15"><text:span text:style-name="T2">„</text:span><text:span text:style-name="T2">WENN-DANN-SONSTWENN-DANN-SONSTWENN-…“</text:span></text:p>
                      </text:list-item>
                    </text:list>
                    <text:p xml:id="id126" text:id="id126" text:style-name="P14"><text:span text:style-name="T68"/></text:p>
                  </text:list-item>
                  <text:list-item>
                    <text:p xml:id="id127" text:id="id127" text:style-name="P14"><text:span text:style-name="T68">WENN</text:span><text:span text:style-name="T2"> </text:span><text:span text:style-name="T4">Bedingung1 erfüllt</text:span><text:span text:style-name="T2"> </text:span><text:span text:style-name="T68">DANN</text:span><text:span text:style-name="T2"> </text:span><text:span text:style-name="T4">tu etwas</text:span><text:span text:style-name="T2"> </text:span><text:span text:style-name="T10"><text:s/></text:span></text:p>
                    <text:p xml:id="id128" text:id="id128" text:style-name="P14"><text:span text:style-name="T61">SONST WENN </text:span><text:span text:style-name="T62">Bedingung2 erfüllt</text:span><text:span text:style-name="T61"> DANN </text:span><text:span text:style-name="T62">tu etwas anderes</text:span><text:span text:style-name="T10"> </text:span></text:p>
                    <text:p xml:id="id129" text:id="id129" text:style-name="P14"><text:span text:style-name="T61">SONST WENN </text:span><text:span text:style-name="T62">Bedingung3 erfüllt</text:span><text:span text:style-name="T61"> DANN </text:span><text:span text:style-name="T62">tu wieder etwas anderes </text:span></text:p>
                    <text:p xml:id="id130" text:id="id130" text:style-name="P14"><text:span text:style-name="T61">... </text:span></text:p>
                    <text:p xml:id="id131" text:id="id131" text:style-name="P14"><text:span text:style-name="T61">SONST </text:span><text:span text:style-name="T62">tu etwas völlig anderes</text:span></text:p>
                  </text:list-item>
                </text:list>
              </text:list-item>
            </text:list>
          </draw:text-box>
        </draw:frame>
        <draw:frame draw:name="Datumsplatzhalter 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5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4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<text:span text:style-name="T9">Wenn ich </text:span><text:span text:style-name="T9">für die </text:span><text:span text:style-name="T9">prüfung </text:span><text:span text:style-name="T9">lerne</text:span></text:p>
              <text:p><text:span text:style-name="T9"><text:s text:c="2"/></text:span><text:span text:style-name="T9">komme </text:span><text:span text:style-name="T9">ich </text:span><text:span text:style-name="T9">leicht </text:span><text:span text:style-name="T9">durch</text:span></text:p>
              <text:p><text:span text:style-name="T9">sonst </text:span><text:span text:style-name="T9">wenn </text:span><text:span text:style-name="T9">ich die </text:span><text:span text:style-name="T9">übung </text:span><text:span text:style-name="T9">gut </text:span><text:span text:style-name="T9">absolvi</text:span><text:span text:style-name="T9">ere </text:span></text:p>
              <text:p><text:span text:style-name="T9"><text:s text:c="2"/></text:span><text:span text:style-name="T9">schaffe </text:span><text:span text:style-name="T9">ich die </text:span><text:span text:style-name="T9">klausur </text:span><text:span text:style-name="T9">gerade </text:span><text:span text:style-name="T9">so</text:span></text:p>
              <text:p><text:span text:style-name="T9">sonst </text:span><text:span text:style-name="T9">falle ich </text:span><text:span text:style-name="T9">durch</text:span></text:p>
            </draw:text-box>
          </draw:frame>
        </presentation:notes>
      </draw:page>
      <draw:page draw:name="page20" draw:style-name="dp1" draw:master-page-name="Titel_20_und_20_Inhalt_5f_">
        <office:forms form:automatic-focus="false" form:apply-design-mode="false"/>
        <draw:frame draw:name="Titel 2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</text:span><text:span text:style-name="T1">weigu</text:span><text:span text:style-name="T1">ngen </text:span><text:span text:style-name="T1">(3): if-</text:span><text:span text:style-name="T1">elif-</text:span><text:span text:style-name="T1">else </text:span><text:span text:style-name="T1">State</text:span><text:span text:style-name="T1">ment</text:span><text:span text:style-name="T1">s </text:span><text:span text:style-name="T1">(Synt</text:span><text:span text:style-name="T1">ax)</text:span></text:p>
          </draw:text-box>
        </draw:frame>
        <draw:frame draw:name="Inhaltsplatzhalter 3" presentation:style-name="pr9" draw:text-style-name="P61" draw:layer="layout" svg:width="30.066cm" svg:height="13.234cm" svg:x="2.4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0"><text:span text:style-name="T70">if</text:span><text:span text:style-name="T28"> </text:span><text:span text:style-name="T71">condition</text:span><text:span text:style-name="T70">:</text:span></text:p>
                    <text:p text:style-name="P60"><text:span text:style-name="T28"><text:s text:c="4"/></text:span><text:span text:style-name="T28">print('Do something')</text:span></text:p>
                    <text:p text:style-name="P60"><text:span text:style-name="T70">elif</text:span><text:span text:style-name="T28"> </text:span><text:span text:style-name="T71">condition2</text:span><text:span text:style-name="T70">:</text:span></text:p>
                    <text:p text:style-name="P60"><text:span text:style-name="T28"><text:s text:c="4"/></text:span><text:span text:style-name="T28">print('Do something else')</text:span></text:p>
                    <text:p text:style-name="P60"><text:span text:style-name="T70">elif</text:span><text:span text:style-name="T28"> </text:span><text:span text:style-name="T71">condition3</text:span><text:span text:style-name="T70">:</text:span></text:p>
                    <text:p text:style-name="P60"><text:span text:style-name="T28"><text:s text:c="4"/></text:span><text:span text:style-name="T28">print('Do something different')</text:span></text:p>
                    <text:p text:style-name="P60"><text:span text:style-name="T28"><text:s text:c="4"/></text:span><text:span text:style-name="T28"># there could be more elifs below this</text:span></text:p>
                    <text:p text:style-name="P60"><text:span text:style-name="T70">else</text:span><text:span text:style-name="T28">: # optional</text:span></text:p>
                    <text:list>
                      <text:list-header>
                        <text:p text:style-name="P3"><text:span text:style-name="T28">print('Do something completely different'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Datumsplatzhalter 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<text:span text:style-name="T9">ich habe </text:span><text:span text:style-name="T9">8 euro</text:span></text:p>
              <text:p><text:span text:style-name="T9"/></text:p>
              <text:p><text:span text:style-name="T9">Wenn </text:span><text:span text:style-name="T9">alter &lt;= </text:span><text:span text:style-name="T9">6:</text:span></text:p>
              <text:p><text:span text:style-name="T9"><text:s text:c="2"/></text:span><text:span text:style-name="T9">Gratis, </text:span><text:span text:style-name="T9">Kinderr</text:span><text:span text:style-name="T9">abatt</text:span></text:p>
              <text:p><text:span text:style-name="T9">Sonst </text:span><text:span text:style-name="T9">alter &lt;= </text:span><text:span text:style-name="T9">4 euro:</text:span></text:p>
              <text:p><text:span text:style-name="T9"><text:s text:c="2"/></text:span><text:span text:style-name="T9">Kaufe 2 </text:span><text:span text:style-name="T9">zuckerl</text:span></text:p>
              <text:p><text:span text:style-name="T9">Sonst </text:span><text:span text:style-name="T9">wenn </text:span><text:span text:style-name="T9">preis </text:span><text:span text:style-name="T9">&lt;= 6 </text:span><text:span text:style-name="T9">euro:</text:span></text:p>
              <text:p><text:span text:style-name="T9"><text:s text:c="2"/></text:span><text:span text:style-name="T9">Kaufe 3 </text:span><text:span text:style-name="T9">zuckerl</text:span></text:p>
              <text:p><text:span text:style-name="T9">Sonst:</text:span></text:p>
              <text:p><text:span text:style-name="T9"><text:s text:c="2"/></text:span><text:span text:style-name="T9">Rabatt, </text:span><text:span text:style-name="T9">kaufe 8 </text:span><text:span text:style-name="T9">/ 2 </text:span><text:span text:style-name="T9">zuckerl</text:span></text:p>
              <text:p><text:span text:style-name="T9"/></text:p>
              <text:p><text:span text:style-name="T9">Validierun</text:span><text:span text:style-name="T9">g von </text:span><text:span text:style-name="T9">nur </text:span><text:span text:style-name="T9">EINEM </text:span><text:span text:style-name="T9">elif</text:span></text:p>
            </draw:text-box>
          </draw:frame>
        </presentation:notes>
      </draw:page>
      <draw:page draw:name="page21" draw:style-name="dp1" draw:master-page-name="Titel_20_und_20_Inhalt_5f_">
        <office:forms form:automatic-focus="false" form:apply-design-mode="false"/>
        <draw:frame draw:name="Titel 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</text:span><text:span text:style-name="T1">weigu</text:span><text:span text:style-name="T1">ngen </text:span><text:span text:style-name="T1">(4): if-</text:span><text:span text:style-name="T1">elif-</text:span><text:span text:style-name="T1">else </text:span><text:span text:style-name="T1">State</text:span><text:span text:style-name="T1">ment</text:span><text:span text:style-name="T1">s </text:span><text:span text:style-name="T1">(Beis</text:span><text:span text:style-name="T1">piel)</text:span></text:p>
          </draw:text-box>
        </draw:frame>
        <draw:frame draw:name="Inhaltsplatzhalter 7" presentation:style-name="pr10" draw:text-style-name="P63" draw:layer="layout" svg:width="17.366cm" svg:height="11.246cm" svg:x="0.414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2"><text:span text:style-name="T28"># Snippet A</text:span></text:p>
                    <text:p text:style-name="P62"><text:span text:style-name="T70">if</text:span><text:span text:style-name="T28"> x &lt; 5</text:span><text:span text:style-name="T70">:</text:span><text:span text:style-name="T70"><text:line-break/></text:span><text:span text:style-name="T28"> <text:s text:c="3"/>print('Small')</text:span></text:p>
                    <text:p text:style-name="P62"><text:span text:style-name="T70">elif</text:span><text:span text:style-name="T28"> x &lt; 15</text:span><text:span text:style-name="T70">:</text:span><text:span text:style-name="T70"><text:line-break/></text:span><text:span text:style-name="T28"> <text:s text:c="3"/>print('Medium')</text:span></text:p>
                    <text:p text:style-name="P62"><text:span text:style-name="T70">elif</text:span><text:span text:style-name="T28"> x &lt; 20</text:span><text:span text:style-name="T70">:</text:span><text:span text:style-name="T70"><text:line-break/></text:span><text:span text:style-name="T28"> <text:s text:c="3"/>print('Big')</text:span></text:p>
                    <text:p text:style-name="P62"><text:span text:style-name="T70">else:</text:span><text:span text:style-name="T70"><text:line-break/></text:span><text:span text:style-name="T70"> <text:s text:c="3"/></text:span><text:span text:style-name="T28">print('Huge')</text:span></text:p>
                  </text:list-header>
                </text:list>
              </text:list-item>
            </text:list>
          </draw:text-box>
        </draw:frame>
        <draw:frame draw:name="Datumsplatzhalter 6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6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6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9" presentation:style-name="pr11" draw:text-style-name="P63" xml:id="id132" draw:id="id132" draw:layer="layout" svg:width="17.366cm" svg:height="11.246cm" svg:x="18.288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2"><text:span text:style-name="T72"># Snippet B</text:span></text:p>
                    <text:p text:style-name="P62"><text:span text:style-name="T70">if</text:span><text:span text:style-name="T28"> x &lt; 5</text:span><text:span text:style-name="T70">:</text:span><text:span text:style-name="T70"><text:line-break/></text:span><text:span text:style-name="T28"> <text:s text:c="3"/>print('Small')</text:span></text:p>
                    <text:p text:style-name="P62"><text:span text:style-name="T70">if</text:span><text:span text:style-name="T28"> x &lt; 15</text:span><text:span text:style-name="T70">:</text:span><text:span text:style-name="T70"><text:line-break/></text:span><text:span text:style-name="T28"> <text:s text:c="3"/>print('Medium')</text:span></text:p>
                    <text:p text:style-name="P62"><text:span text:style-name="T70">if</text:span><text:span text:style-name="T28"> x &lt; 20</text:span><text:span text:style-name="T70">:</text:span><text:span text:style-name="T70"><text:line-break/></text:span><text:span text:style-name="T28"> <text:s text:c="3"/>print('Big')</text:span></text:p>
                    <text:p text:style-name="P62"><text:span text:style-name="T70">else:</text:span><text:span text:style-name="T70"><text:line-break/></text:span><text:span text:style-name="T70"> <text:s text:c="3"/></text:span><text:span text:style-name="T28">print('Huge')</text:span></text:p>
                  </text:list-header>
                </text:list>
              </text:list-item>
            </text:list>
          </draw:text-box>
        </draw:frame>
        <draw:frame draw:style-name="gr22" draw:text-style-name="P64" draw:layer="layout" svg:width="1.302cm" svg:height="2.143cm" svg:x="17.34cm" svg:y="3.703cm">
          <draw:text-box>
            <text:p xml:id="id133" text:id="id133"><text:span text:style-name="T73">≠</text:span></text:p>
          </draw:text-box>
        </draw:frame>
        <draw:frame draw:style-name="gr22" draw:text-style-name="P64" draw:layer="layout" svg:width="1.302cm" svg:height="2.143cm" svg:x="17.34cm" svg:y="16.704cm">
          <draw:text-box>
            <text:p xml:id="id134" text:id="id134"><text:span text:style-name="T73">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Bis 11:30 spätestens beginnen</text:p>
            </draw:text-box>
          </draw:frame>
        </presentation:notes>
      </draw:page>
      <draw:page draw:name="page22" draw:style-name="dp1" draw:master-page-name="Titel_20_und_20_Inhalt_5f_">
        <office:forms form:automatic-focus="false" form:apply-design-mode="false"/>
        <draw:frame draw:name="Titel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0): </text:span><text:span text:style-name="T1">Basic</text:span><text:span text:style-name="T1">s von </text:span><text:span text:style-name="T1">for-</text:span><text:span text:style-name="T1">Schle</text:span><text:span text:style-name="T1">ifen</text:span></text:p>
          </draw:text-box>
        </draw:frame>
        <draw:frame draw:name="Inhaltsplatzhalter 10" presentation:style-name="pr8" draw:text-style-name="P4" draw:layer="layout" svg:width="32.993cm" svg:height="13.897cm" svg:x="2.446cm" svg:y="4.246cm" presentation:class="outline" presentation:user-transformed="true">
          <draw:text-box>
            <text:list text:style-name="L2">
              <text:list-item>
                <text:list>
                  <text:list-item>
                    <text:p xml:id="id135" text:id="id135" text:style-name="P14"><text:span text:style-name="T10">Iterieren/Durchlaufen von Sequenzen (z. B. Listen)</text:span></text:p>
                  </text:list-item>
                  <text:list-item>
                    <text:p xml:id="id136" text:id="id136" text:style-name="P14"><text:span text:style-name="T61">FÜR</text:span><text:span text:style-name="T10"> jedes Element </text:span><text:span text:style-name="T61">IN</text:span><text:span text:style-name="T10"> Sequenz</text:span><text:span text:style-name="T61">:</text:span></text:p>
                    <text:p xml:id="id137" text:id="id137" text:style-name="P14"><text:span text:style-name="T10"><text:s text:c="5"/></text:span><text:span text:style-name="T10">Führe Anweisungen aus</text:span></text:p>
                    <text:p text:style-name="P14"><text:span text:style-name="T10"/></text:p>
                  </text:list-item>
                  <text:list-item>
                    <text:p xml:id="id138" text:id="id138" text:style-name="P14"><text:span text:style-name="T61">Python-Syntax für for-Loops (Schleifen):</text:span></text:p>
                    <text:list>
                      <text:list-header>
                        <text:p xml:id="id139" text:id="id139" text:style-name="P15"><text:span text:style-name="T70">for</text:span><text:span text:style-name="T28"> item </text:span><text:span text:style-name="T70">in</text:span><text:span text:style-name="T28"> list_of_items</text:span><text:span text:style-name="T70">:</text:span></text:p>
                        <text:p xml:id="id140" text:id="id140" text:style-name="P15"><text:span text:style-name="T28"><text:s text:c="4"/></text:span><text:span text:style-name="T28">print('This will be repeated.')</text:span></text:p>
                        <text:p text:style-name="P15"><text:span text:style-name="T42"/></text:p>
                      </text:list-header>
                    </text:list>
                  </text:list-item>
                  <text:list-item>
                    <text:p xml:id="id141" text:id="id141" text:style-name="P15"><text:span text:style-name="T10">Laufvariablen können beliebigen Namen haben</text:span></text:p>
                  </text:list-item>
                  <text:list-item>
                    <text:p xml:id="id142" text:id="id142" text:style-name="P15"><text:span text:style-name="T10">Wiederholter Code-Block mit beliebig vielen Anweisungen</text:span></text:p>
                  </text:list-item>
                </text:list>
              </text:list-item>
            </text:list>
          </draw:text-box>
        </draw:frame>
        <draw:frame draw:name="Datumsplatzhalter 9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9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9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>
        <office:forms form:automatic-focus="false" form:apply-design-mode="false"/>
        <draw:frame draw:name="Titel 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1): </text:span><text:span text:style-name="T1">Beisp</text:span><text:span text:style-name="T1">iel</text:span></text:p>
          </draw:text-box>
        </draw:frame>
        <draw:frame draw:name="Inhaltsplatzhalter 11" presentation:style-name="pr12" draw:text-style-name="P65" draw:layer="layout" svg:width="32.993cm" svg:height="6.096cm" svg:x="2.046cm" svg:y="7.1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4"><text:span text:style-name="T28">lectures = ['Maths', 'English', 'Computer Science']</text:span></text:p>
                    <text:p text:style-name="P14"><text:span text:style-name="T28"/></text:p>
                    <text:p text:style-name="P14"><text:span text:style-name="T70">for</text:span><text:span text:style-name="T28"> lecture </text:span><text:span text:style-name="T70">in</text:span><text:span text:style-name="T28"> lectures:</text:span></text:p>
                    <text:p text:style-name="P14"><text:span text:style-name="T28"><text:s text:c="4"/></text:span><text:span text:style-name="T70">print(</text:span><text:span text:style-name="T28">f'I love {lecture}'</text:span><text:span text:style-name="T70">)</text:span></text:p>
                  </text:list-header>
                </text:list>
              </text:list-item>
            </text:list>
          </draw:text-box>
        </draw:frame>
        <draw:frame draw:name="Datumsplatzhalter 10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0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0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ausgabe des aktuellen Werts in Variable lecture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24" draw:style-name="dp1" draw:master-page-name="Titel_20_und_20_Inhalt_5f_">
        <office:forms form:automatic-focus="false" form:apply-design-mode="false"/>
        <draw:frame draw:name="Inhaltsplatzhalter 13" presentation:style-name="pr8" draw:text-style-name="P4" draw:layer="layout" svg:width="32.993cm" svg:height="13.897cm" svg:x="1.6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4"><text:span text:style-name="T74">lectures</text:span><text:span text:style-name="T28"> = ['Maths', 'English', 'Computer Science']</text:span></text:p>
                    <text:p text:style-name="P14"><text:span text:style-name="T28"/></text:p>
                    <text:p text:style-name="P66"><text:span text:style-name="T70">for</text:span><text:span text:style-name="T28"> </text:span><text:span text:style-name="T75">lecture</text:span><text:span text:style-name="T28"> </text:span><text:span text:style-name="T70">in</text:span><text:span text:style-name="T28"> </text:span><text:span text:style-name="T74">lectures</text:span><text:span text:style-name="T28">:</text:span></text:p>
                    <text:p text:style-name="P66"><text:span text:style-name="T28"><text:s text:c="4"/></text:span><text:span text:style-name="T70">print(</text:span><text:span text:style-name="T28">f'I love {</text:span><text:span text:style-name="T75">lecture</text:span><text:span text:style-name="T28">}'</text:span><text:span text:style-name="T70">)</text:span></text:p>
                    <text:p text:style-name="P14"><text:span text:style-name="T10"/></text:p>
                  </text:list-header>
                </text:list>
              </text:list-item>
            </text:list>
          </draw:text-box>
        </draw:frame>
        <draw:frame draw:style-name="gr23" draw:text-style-name="P68" xml:id="id146" draw:id="id146" draw:layer="layout" svg:width="13.716cm" svg:height="6.038cm" svg:x="21.823cm" svg:y="11.976cm">
          <draw:text-box>
            <text:p text:style-name="P67"><text:span text:style-name="T76">Legende</text:span></text:p>
            <text:p text:style-name="P67"><text:span text:style-name="T77">Iterierte Sequenz (z. B. Liste)</text:span></text:p>
            <text:p text:style-name="P67"><text:span text:style-name="T78">Definition der Sequenz</text:span></text:p>
            <text:p text:style-name="P67"><text:span text:style-name="T78">for-Loop Definition (Syntax)</text:span></text:p>
            <text:p text:style-name="P67"><text:span text:style-name="T78">Wiederholter Code-Block</text:span></text:p>
            <text:p text:style-name="P67"><text:span text:style-name="T79">Lauf-/Schleifen-Variable</text:span></text:p>
          </draw:text-box>
        </draw:frame>
        <draw:frame draw:name="Titel 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2): </text:span><text:span text:style-name="T1">Beisp</text:span><text:span text:style-name="T1">iel</text:span></text:p>
          </draw:text-box>
        </draw:frame>
        <draw:frame draw:name="Datumsplatzhalter 11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1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3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custom-shape draw:style-name="gr24" draw:text-style-name="P33" xml:id="id143" draw:id="id143" draw:layer="layout" svg:width="30.526cm" svg:height="1.778cm" svg:x="2.502cm" svg:y="7.5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3" xml:id="id144" draw:id="id144" draw:layer="layout" svg:width="14.732cm" svg:height="1.41cm" svg:x="2.502cm" svg:y="10.6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3" xml:id="id145" draw:id="id145" draw:layer="layout" svg:width="18.034cm" svg:height="1.434cm" svg:x="2.502cm" svg:y="12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xml:id="id147" draw:id="id147" draw:layer="layout" svg:width="12.16cm" svg:height="0.887cm" svg:x="21.93cm" svg:y="14.9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xml:id="id148" draw:id="id148" draw:layer="layout" svg:width="10.797cm" svg:height="0.832cm" svg:x="21.923cm" svg:y="16.0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xml:id="id149" draw:id="id149" draw:layer="layout" svg:width="9.525cm" svg:height="0.762cm" svg:x="21.94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xml:id="id150" draw:id="id150" draw:layer="layout" svg:width="13.855cm" svg:height="6.157cm" svg:x="21.644cm" svg:y="12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13" draw:text-style-name="P19" draw:layer="layout" svg:width="17.271cm" svg:height="12.593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Code-Block, der in jedem durchlauf ausgegeben wird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25" draw:style-name="dp1" draw:master-page-name="Titel_20_und_20_Inhalt_5f_">
        <office:forms form:automatic-focus="false" form:apply-design-mode="false"/>
        <draw:frame draw:name="Titel 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3): </text:span><text:span text:style-name="T1">Iterier</text:span><text:span text:style-name="T1">en </text:span><text:span text:style-name="T1">über </text:span><text:span text:style-name="T1">String</text:span><text:span text:style-name="T1">s </text:span><text:span text:style-name="T1">(„Buc</text:span><text:span text:style-name="T1">hstab</text:span><text:span text:style-name="T1">ieren“</text:span><text:span text:style-name="T1">)</text:span></text:p>
          </draw:text-box>
        </draw:frame>
        <draw:frame draw:name="Inhaltsplatzhalter 16" presentation:style-name="pr14" draw:text-style-name="P69" draw:layer="layout" svg:width="32.993cm" svg:height="5.842cm" svg:x="2.446cm" svg:y="7.239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28">string = 'Informatik BW'</text:span></text:p>
                    <text:p text:style-name="P15"><text:span text:style-name="T28"/></text:p>
                  </text:list-header>
                </text:list>
              </text:list-item>
            </text:list>
            <text:list text:style-name="L4">
              <text:list-header>
                <text:p text:style-name="P14"><text:span text:style-name="T70">for</text:span><text:span text:style-name="T28"> char </text:span><text:span text:style-name="T70">in</text:span><text:span text:style-name="T28"> string:</text:span></text:p>
                <text:p text:style-name="P14"><text:span text:style-name="T28"><text:s text:c="4"/></text:span><text:span text:style-name="T70">print(</text:span><text:span text:style-name="T28">number</text:span><text:span text:style-name="T70">)</text:span></text:p>
              </text:list-header>
            </text:list>
          </draw:text-box>
        </draw:frame>
        <draw:frame draw:name="Datumsplatzhalter 1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2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8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>
        <office:forms form:automatic-focus="false" form:apply-design-mode="false"/>
        <draw:frame draw:name="Titel 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4): </text:span><text:span text:style-name="T1">Zähle</text:span><text:span text:style-name="T1">n mit </text:span><text:span text:style-name="T80">rang</text:span><text:span text:style-name="T80">e()</text:span></text:p>
          </draw:text-box>
        </draw:frame>
        <draw:frame draw:name="Inhaltsplatzhalter 17" presentation:style-name="pr15" draw:text-style-name="P70" draw:layer="layout" svg:width="32.993cm" svg:height="4.318cm" svg:x="2.446cm" svg:y="8.001cm" presentation:class="outline" presentation:user-transformed="true">
          <draw:text-box>
            <text:list text:style-name="L4">
              <text:list-header>
                <text:p text:style-name="P14"><text:span text:style-name="T70">print(</text:span><text:span text:style-name="T28">'Count from one to ten!'</text:span><text:span text:style-name="T70">)</text:span></text:p>
                <text:p text:style-name="P14"><text:span text:style-name="T70">for</text:span><text:span text:style-name="T28"> number </text:span><text:span text:style-name="T70">in</text:span><text:span text:style-name="T28"> </text:span><text:span text:style-name="T70">range</text:span><text:span text:style-name="T81">(</text:span><text:span text:style-name="T82">?,?</text:span><text:span text:style-name="T81">)</text:span><text:span text:style-name="T83">:</text:span></text:p>
                <text:p text:style-name="P14"><text:span text:style-name="T28"><text:s text:c="4"/></text:span><text:span text:style-name="T70">print(</text:span><text:span text:style-name="T28">number</text:span><text:span text:style-name="T70">)</text:span></text:p>
              </text:list-header>
            </text:list>
          </draw:text-box>
        </draw:frame>
        <draw:frame draw:name="Datumsplatzhalter 1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8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19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1" draw:text-style-name="P71" xml:id="id151" draw:id="id151" draw:layer="layout" svg:width="7.874cm" svg:height="1.369cm" svg:x="11.697cm" svg:y="9.615cm">
          <draw:text-box>
            <text:p><text:span text:style-name="T84">range(</text:span><text:span text:style-name="T83">1,11</text:span><text:span text:style-name="T84">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>
        <office:forms form:automatic-focus="false" form:apply-design-mode="false"/>
        <draw:frame draw:name="Titel 1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5): </text:span><text:span text:style-name="T1"><text:line-break/></text:span><text:span text:style-name="T1">Index </text:span><text:span text:style-name="T1">mit </text:span><text:span text:style-name="T1">Elem</text:span><text:span text:style-name="T1">enten </text:span><text:span text:style-name="T1">ausg</text:span><text:span text:style-name="T1">eben </text:span><text:span text:style-name="T1">mit </text:span><text:span text:style-name="T80">enum</text:span><text:span text:style-name="T80">erat</text:span><text:span text:style-name="T80">e</text:span></text:p>
          </draw:text-box>
        </draw:frame>
        <draw:frame draw:name="Inhaltsplatzhalter 18" presentation:style-name="pr16" draw:text-style-name="P70" draw:layer="layout" svg:width="32.993cm" svg:height="6.35cm" svg:x="2.446cm" svg:y="6.98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4"><text:span text:style-name="T28">lectures = ['Maths', 'English', 'Computer Science']</text:span></text:p>
                    <text:p text:style-name="P14"><text:span text:style-name="T28"/></text:p>
                  </text:list-header>
                </text:list>
              </text:list-item>
            </text:list>
            <text:list text:style-name="L4">
              <text:list-header>
                <text:p text:style-name="P14"><text:span text:style-name="T70">for</text:span><text:span text:style-name="T28"> index, lecture </text:span><text:span text:style-name="T70">in</text:span><text:span text:style-name="T28"> </text:span><text:span text:style-name="T70">enumerate</text:span><text:span text:style-name="T28">(lectures):</text:span></text:p>
                <text:p text:style-name="P14"><text:span text:style-name="T28"><text:s text:c="4"/></text:span><text:span text:style-name="T70">print(</text:span><text:span text:style-name="T28">f'Lecture {index}: {lecture}'</text:span><text:span text:style-name="T70">)</text:span></text:p>
              </text:list-header>
            </text:list>
          </draw:text-box>
        </draw:frame>
        <draw:frame draw:name="Datumsplatzhalter 20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19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2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>
        <office:forms form:automatic-focus="false" form:apply-design-mode="false"/>
        <draw:frame draw:name="Titel 1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</text:span><text:span text:style-name="T1">Loop</text:span><text:span text:style-name="T1">s (6): </text:span><text:span text:style-name="T1"><text:line-break/></text:span><text:span text:style-name="T1">Mehr</text:span><text:span text:style-name="T1">ere </text:span><text:span text:style-name="T1">Liste</text:span><text:span text:style-name="T1">n auf </text:span><text:span text:style-name="T1">einm</text:span><text:span text:style-name="T1">al </text:span><text:span text:style-name="T1">durch</text:span><text:span text:style-name="T1">laufe</text:span><text:span text:style-name="T1">n mit </text:span><text:span text:style-name="T80">zip</text:span></text:p>
          </draw:text-box>
        </draw:frame>
        <draw:frame draw:name="Inhaltsplatzhalter 19" presentation:style-name="pr17" draw:text-style-name="P70" draw:layer="layout" svg:width="32.993cm" svg:height="7.239cm" svg:x="2.446cm" svg:y="6.98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4"><text:span text:style-name="T28">lectures = ['Maths', 'English', 'Computer Science']</text:span><text:span text:style-name="T28"><text:line-break/></text:span><text:span text:style-name="T28">teachers = ['Browne', 'Orwell', 'Turing']</text:span></text:p>
                    <text:p text:style-name="P14"><text:span text:style-name="T28"/></text:p>
                  </text:list-header>
                </text:list>
              </text:list-item>
            </text:list>
            <text:list text:style-name="L4">
              <text:list-header>
                <text:p text:style-name="P14"><text:span text:style-name="T70">for</text:span><text:span text:style-name="T28"> lecture, teacher </text:span><text:span text:style-name="T70">in</text:span><text:span text:style-name="T28"> </text:span><text:span text:style-name="T70">zip</text:span><text:span text:style-name="T28">(lectures, teachers):</text:span></text:p>
                <text:p text:style-name="P14"><text:span text:style-name="T28"><text:s text:c="4"/></text:span><text:span text:style-name="T70">print(</text:span><text:span text:style-name="T28">f'Lecture {lecture}held by {teacher}'</text:span><text:span text:style-name="T70">)</text:span></text:p>
              </text:list-header>
            </text:list>
          </draw:text-box>
        </draw:frame>
        <draw:frame draw:name="Datumsplatzhalter 21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2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2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>
        <office:forms form:automatic-focus="false" form:apply-design-mode="false"/>
        <draw:frame draw:name="Titel 3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</text:span><text:span text:style-name="T1">Loop</text:span><text:span text:style-name="T1">s (0): </text:span><text:span text:style-name="T1">Basic</text:span><text:span text:style-name="T1">s</text:span></text:p>
          </draw:text-box>
        </draw:frame>
        <draw:frame draw:name="Inhaltsplatzhalter 31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52" text:id="id152" text:style-name="P9"><text:span text:style-name="T2">Ausführen von Anweisungen bis Bedingung nicht mehr erfüllt</text:span></text:p>
                    <text:list>
                      <text:list-item>
                        <text:p xml:id="id153" text:id="id153" text:style-name="P62"><text:span text:style-name="T2">„</text:span><text:span text:style-name="T2">Solange Bedingung erfüllt, führe Anweisungen aus“</text:span></text:p>
                      </text:list-item>
                    </text:list>
                    <text:p text:style-name="P14"><text:span text:style-name="T10"/></text:p>
                  </text:list-item>
                  <text:list-item>
                    <text:p xml:id="id154" text:id="id154" text:style-name="P3"><text:span text:style-name="T68">SOLANGE</text:span><text:span text:style-name="T2"> </text:span><text:span text:style-name="T4">Bedingung erfüllt</text:span><text:span text:style-name="T68">:</text:span></text:p>
                    <text:p xml:id="id155" text:id="id155" text:style-name="P3"><text:span text:style-name="T2"><text:s text:c="4"/></text:span><text:span text:style-name="T4">Führe Anweisungen aus</text:span></text:p>
                    <text:p text:style-name="P14"><text:span text:style-name="T10"/></text:p>
                  </text:list-item>
                  <text:list-item>
                    <text:p xml:id="id156" text:id="id156" text:style-name="P14"><text:span text:style-name="T61">Python-Syntax:</text:span></text:p>
                    <text:list>
                      <text:list-header>
                        <text:p xml:id="id157" text:id="id157" text:style-name="P9"><text:span text:style-name="T70">while</text:span><text:span text:style-name="T28"> </text:span><text:span text:style-name="T71">condition</text:span><text:span text:style-name="T70">:</text:span></text:p>
                        <text:p xml:id="id158" text:id="id158" text:style-name="P9"><text:span text:style-name="T28"><text:s text:c="4"/></text:span><text:span text:style-name="T28">print('Running')</text:span></text:p>
                        <text:p text:style-name="P15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Datumsplatzhalter 37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6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7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2" draw:text-style-name="P72" xml:id="id159" draw:id="id159" draw:layer="layout" svg:width="8.382cm" svg:height="5.824cm" svg:x="27.178cm" svg:y="12.392cm">
          <draw:text-box>
            <text:p><text:span text:style-name="T10">x = 0</text:span></text:p>
            <text:p><text:span text:style-name="T63">while</text:span><text:span text:style-name="T19"> </text:span><text:span text:style-name="T19">x &lt; </text:span><text:span text:style-name="T19">3</text:span><text:span text:style-name="T63">:</text:span></text:p>
            <text:p><text:span text:style-name="T19"><text:s text:c="4"/></text:span><text:span text:style-name="T19">print</text:span><text:span text:style-name="T19">(x)</text:span></text:p>
            <text:p><text:span text:style-name="T19"><text:s text:c="4"/></text:span><text:span text:style-name="T19">x </text:span><text:span text:style-name="T19">= x + </text:span><text:span text:style-name="T19">1</text:span></text:p>
            <text:p><text:span text:style-name="T19">print</text:span><text:span text:style-name="T19">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7" draw:text-style-name="P19" draw:layer="layout" svg:width="17.271cm" svg:height="12.572cm" svg:x="2.159cm" svg:y="13.271cm" presentation:class="notes">
            <draw:text-box>
              <text:p text:style-name="P11">Tafel danach</text:p>
            </draw:text-box>
          </draw:frame>
        </presentation:notes>
      </draw:page>
      <draw:page draw:name="page30" draw:style-name="dp1" draw:master-page-name="Titel_20_und_20_Inhalt_5f_">
        <office:forms form:automatic-focus="false" form:apply-design-mode="false"/>
        <draw:custom-shape draw:style-name="gr33" draw:text-style-name="P73" xml:id="id166" draw:id="id166" draw:layer="layout" svg:width="27.94cm" svg:height="6.013cm" svg:x="3.202cm" svg:y="11.43cm">
          <text:p/>
          <draw:enhanced-geometry svg:viewBox="0 0 21600 21600" draw:type="rectangle" draw:enhanced-path="M 0 0 L 21600 0 21600 21600 0 21600 0 0 Z N"/>
        </draw:custom-shape>
        <draw:frame draw:name="Titel 3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</text:span><text:span text:style-name="T1">Loop</text:span><text:span text:style-name="T1">s (1): </text:span><text:span text:style-name="T1">Kom</text:span><text:span text:style-name="T1">binat</text:span><text:span text:style-name="T1">ion </text:span><text:span text:style-name="T1">mit </text:span><text:span text:style-name="T1">User</text:span><text:span text:style-name="T1">-</text:span><text:span text:style-name="T1">Input</text:span></text:p>
          </draw:text-box>
        </draw:frame>
        <draw:frame draw:name="Inhaltsplatzhalter 32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60" text:id="id160" text:style-name="P14"><text:span text:style-name="T10">Möglichkeit: Ausführen bis spezieller Input</text:span></text:p>
                    <text:p text:style-name="P14"><text:span text:style-name="T10"/></text:p>
                  </text:list-item>
                  <text:list-item>
                    <text:p xml:id="id161" text:id="id161" text:style-name="P14"><text:span text:style-name="T2">Kontrolle durch </text:span><text:span text:style-name="T10">Bedingungen oder „Flags“ (= Boolean-Variable) </text:span></text:p>
                    <text:p text:style-name="P14"><text:span text:style-name="T10"/></text:p>
                    <text:p xml:id="id162" text:id="id162" text:style-name="P14"><text:span text:style-name="T28">user_input = ''</text:span></text:p>
                    <text:p xml:id="id163" text:id="id163" text:style-name="P14"><text:span text:style-name="T63">while</text:span><text:span text:style-name="T19"> user_input != 'quit':</text:span></text:p>
                    <text:p xml:id="id164" text:id="id164" text:style-name="P14"><text:span text:style-name="T28"><text:s text:c="4"/></text:span><text:span text:style-name="T19">user_input = </text:span><text:span text:style-name="T63">input(</text:span><text:span text:style-name="T19">'What are you saying?'</text:span><text:span text:style-name="T63">) </text:span></text:p>
                    <text:p xml:id="id165" text:id="id165" text:style-name="P14"><text:span text:style-name="T28"><text:s text:c="4"/></text:span><text:span text:style-name="T70">print(</text:span><text:span text:style-name="T28">user_</text:span><text:span text:style-name="T19">input</text:span><text:span text:style-name="T63">)</text:span></text:p>
                  </text:list-item>
                </text:list>
              </text:list-item>
            </text:list>
          </draw:text-box>
        </draw:frame>
        <draw:frame draw:name="Datumsplatzhalter 38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7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8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>Danach: Programmierbeispiel</text:p>
            </draw:text-box>
          </draw:frame>
        </presentation:notes>
      </draw:page>
      <draw:page draw:name="page31" draw:style-name="dp1" draw:master-page-name="Titel_20_und_20_Inhalt_5f_">
        <office:forms form:automatic-focus="false" form:apply-design-mode="false"/>
        <draw:custom-shape draw:style-name="gr34" draw:text-style-name="P73" xml:id="id170" draw:id="id170" draw:layer="layout" svg:width="28.702cm" svg:height="6.096cm" svg:x="3.256cm" svg:y="11.176cm">
          <text:p/>
          <draw:enhanced-geometry svg:viewBox="0 0 21600 21600" draw:type="rectangle" draw:enhanced-path="M 0 0 L 21600 0 21600 21600 0 21600 0 0 Z N"/>
        </draw:custom-shape>
        <draw:frame draw:name="Titel 3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</text:span><text:span text:style-name="T1">Loop</text:span><text:span text:style-name="T1">s (2): </text:span><text:span text:style-name="T1">Endlo</text:span><text:span text:style-name="T1">sschl</text:span><text:span text:style-name="T1">eifen </text:span><text:span text:style-name="T1">(Infini</text:span><text:span text:style-name="T1">te </text:span><text:span text:style-name="T1">Loop</text:span><text:span text:style-name="T1">s)</text:span></text:p>
          </draw:text-box>
        </draw:frame>
        <draw:frame draw:name="Inhaltsplatzhalter 33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67" text:id="id167" text:style-name="P3"><text:span text:style-name="T2">Programm läuft unendlich</text:span></text:p>
                    <text:list>
                      <text:list-item>
                        <text:p xml:id="id168" text:id="id168" text:style-name="P3"><text:span text:style-name="T85">while</text:span><text:span text:style-name="T25"> True</text:span></text:p>
                      </text:list-item>
                    </text:list>
                  </text:list-item>
                  <text:list-item>
                    <text:p xml:id="id169" text:id="id169" text:style-name="P3"><text:span text:style-name="T2">Abbruchbedingung durch </text:span><text:span text:style-name="T25">break</text:span></text:p>
                    <text:p text:style-name="P14"><text:span text:style-name="T10"/></text:p>
                    <text:p xml:id="id171" text:id="id171" text:style-name="P9"><text:span text:style-name="T85">while</text:span><text:span text:style-name="T25"> True:</text:span></text:p>
                    <text:p xml:id="id172" text:id="id172" text:style-name="P9"><text:span text:style-name="T25"><text:s text:c="4"/></text:span><text:span text:style-name="T25">user_input = </text:span><text:span text:style-name="T85">input(</text:span><text:span text:style-name="T25">'What are you saying?'</text:span><text:span text:style-name="T85">)</text:span><text:span text:style-name="T25"> </text:span></text:p>
                    <text:p xml:id="id173" text:id="id173" text:style-name="P9"><text:span text:style-name="T25"><text:s text:c="4"/></text:span><text:span text:style-name="T85">print(</text:span><text:span text:style-name="T25">user_input</text:span><text:span text:style-name="T85">)</text:span></text:p>
                    <text:p xml:id="id174" text:id="id174" text:style-name="P9"><text:span text:style-name="T25"><text:s text:c="4"/></text:span><text:span text:style-name="T85">if</text:span><text:span text:style-name="T25"> user_input == 'quit':</text:span></text:p>
                    <text:p xml:id="id175" text:id="id175" text:style-name="P9"><text:span text:style-name="T25"><text:s text:c="6"/></text:span><text:span text:style-name="T85">break</text:span></text:p>
                  </text:list-item>
                </text:list>
              </text:list-item>
            </text:list>
          </draw:text-box>
        </draw:frame>
        <draw:frame draw:name="Datumsplatzhalter 39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8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9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True =&gt; </text:span><text:span text:style-name="T9">1==1</text:span></text:p>
            </draw:text-box>
          </draw:frame>
        </presentation:notes>
      </draw:page>
      <draw:page draw:name="page32" draw:style-name="dp1" draw:master-page-name="Titel_20_und_20_Inhalt_5f_">
        <office:forms form:automatic-focus="false" form:apply-design-mode="false"/>
        <draw:frame draw:name="Titel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op</text:span><text:span text:style-name="T1">s: </text:span><text:span text:style-name="T1">Keyw</text:span><text:span text:style-name="T1">ords </text:span><text:span text:style-name="T1">zum </text:span><text:span text:style-name="T1">Schle</text:span><text:span text:style-name="T1">ifen- </text:span><text:span text:style-name="T1">und </text:span><text:span text:style-name="T1">Progr</text:span><text:span text:style-name="T1">amm</text:span><text:span text:style-name="T1">ablau</text:span><text:span text:style-name="T1">f</text:span></text:p>
          </draw:text-box>
        </draw:frame>
        <draw:frame draw:name="Inhaltsplatzhalter 5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76" text:id="id176" text:style-name="P14"><text:span text:style-name="T18">pass</text:span></text:p>
                    <text:list>
                      <text:list-item>
                        <text:p xml:id="id177" text:id="id177" text:style-name="P15"><text:span text:style-name="T10">„</text:span><text:span text:style-name="T10">leerer“ Command, tut nichts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 xml:id="id178" text:id="id178" text:style-name="P74"><text:span text:style-name="T20">break</text:span></text:p>
                    <text:list>
                      <text:list-item>
                        <text:p xml:id="id179" text:id="id179" text:style-name="P15"><text:span text:style-name="T10">Schleifenabbruch</text:span></text:p>
                      </text:list-item>
                      <text:list-item>
                        <text:p xml:id="id180" text:id="id180" text:style-name="P15"><text:span text:style-name="T10">Sofortiges Beenden der </text:span><text:span text:style-name="T10">„innersten Schleife“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 xml:id="id181" text:id="id181" text:style-name="P74"><text:span text:style-name="T20">continue</text:span></text:p>
                    <text:list>
                      <text:list-item>
                        <text:p xml:id="id182" text:id="id182" text:style-name="P15"><text:span text:style-name="T10">Sprung zu nächster Iteration</text:span></text:p>
                      </text:list-item>
                      <text:list-item>
                        <text:p xml:id="id183" text:id="id183" text:style-name="P15"><text:span text:style-name="T10">Abbruch aktueller Durchlauf </text:span><text:span text:style-name="T10">„innerster Schleife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7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7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7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">
        <office:forms form:automatic-focus="false" form:apply-design-mode="false"/>
        <draw:frame draw:name="Titel 2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0): </text:span><text:span text:style-name="T1">Grun</text:span><text:span text:style-name="T1">dkon</text:span><text:span text:style-name="T1">zept</text:span></text:p>
          </draw:text-box>
        </draw:frame>
        <draw:frame draw:name="Datumsplatzhalter 3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5" draw:text-style-name="P33" xml:id="id184" draw:id="id184" draw:layer="layout" svg:width="12.214cm" svg:height="12.085cm" svg:x="0.824cm" svg:y="4.895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36" draw:text-style-name="P27" draw:layer="layout" svg:width="21.643cm" svg:height="10.917cm" svg:x="14.163cm" svg:y="5.904cm">
          <draw:text-box>
            <text:p xml:id="id185" text:id="id185"><text:span text:style-name="T10">Input-Parameter/Argumente</text:span></text:p>
            <text:p><text:span text:style-name="T10"/></text:p>
            <text:p><text:span text:style-name="T10"/></text:p>
            <text:p><text:span text:style-name="T10"/></text:p>
            <text:p xml:id="id187" text:id="id187"><text:span text:style-name="T10">Funktions-Logik (Code)</text:span></text:p>
            <text:p><text:span text:style-name="T10"/></text:p>
            <text:p><text:span text:style-name="T86"/></text:p>
            <text:p xml:id="id189" text:id="id189"><text:span text:style-name="T10">Rückgabewert (</text:span><text:span text:style-name="T19">return</text:span><text:span text:style-name="T10"> value), Konsolen-Output, Speichern in Parameter, </text:span><text:span text:style-name="T10">File-Output...</text:span></text:p>
          </draw:text-box>
        </draw:frame>
        <draw:custom-shape draw:style-name="gr37" draw:text-style-name="P33" xml:id="id186" draw:id="id186" draw:layer="layout" svg:width="1.109cm" svg:height="1.27cm" svg:x="13.012cm" svg:y="5.9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33" xml:id="id188" draw:id="id188" draw:layer="layout" svg:width="1.109cm" svg:height="4.318cm" svg:x="13.029cm" svg:y="8.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33" xml:id="id190" draw:id="id190" draw:layer="layout" svg:width="1.109cm" svg:height="1.308cm" svg:x="13.054cm" svg:y="14.6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</text:span><text:span text:style-name="T9">r = </text:span><text:span text:style-name="T9">Name/V</text:span><text:span text:style-name="T9">ariable </text:span><text:span text:style-name="T9">in </text:span><text:span text:style-name="T9">Funktio</text:span><text:span text:style-name="T9">nsdefini</text:span><text:span text:style-name="T9">tion</text:span></text:p>
              <text:p><text:span text:style-name="T9">argument </text:span><text:span text:style-name="T9">= </text:span><text:span text:style-name="T9">informa</text:span><text:span text:style-name="T9">tion </text:span><text:span text:style-name="T9">überge</text:span><text:span text:style-name="T9">ben an </text:span><text:span text:style-name="T9">funktion</text:span></text:p>
              <text:p><text:span text:style-name="T9"/></text:p>
              <text:p><text:span text:style-name="T9">manchma</text:span><text:span text:style-name="T9">l </text:span><text:span text:style-name="T9">vertaus</text:span><text:span text:style-name="T9">cht</text:span></text:p>
            </draw:text-box>
          </draw:frame>
        </presentation:notes>
      </draw:page>
      <draw:page draw:name="page34" draw:style-name="dp1" draw:master-page-name="Titel_20_und_20_Inhalt_5f_">
        <office:forms form:automatic-focus="false" form:apply-design-mode="false"/>
        <draw:frame draw:name="Titel 3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1): </text:span><text:span text:style-name="T26"><text:line-break/></text:span><text:span text:style-name="T26">Beisp</text:span><text:span text:style-name="T26">iel </text:span><text:span text:style-name="T25">print</text:span><text:span text:style-name="T25">('Thi</text:span><text:span text:style-name="T25">s', </text:span><text:span text:style-name="T25">'is', </text:span><text:span text:style-name="T25">'a', </text:span><text:span text:style-name="T25">'Test</text:span><text:span text:style-name="T25">')</text:span></text:p>
          </draw:text-box>
        </draw:frame>
        <draw:frame draw:name="Datumsplatzhalter 3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2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3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5" draw:text-style-name="P33" draw:layer="layout" svg:width="12.214cm" svg:height="12.085cm" svg:x="6.524cm" svg:y="4.4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40" draw:text-style-name="P75" xml:id="id193" draw:id="id193" draw:layer="layout" svg:width="15.494cm" svg:height="1.369cm" svg:x="10.728cm" svg:y="5.404cm">
          <draw:text-box>
            <text:p><text:span text:style-name="T25">'Thi</text:span><text:span text:style-name="T25">s', </text:span><text:span text:style-name="T25">'is'</text:span><text:span text:style-name="T25">, </text:span><text:span text:style-name="T25">'a', </text:span><text:span text:style-name="T25">'Tes</text:span><text:span text:style-name="T25">t'</text:span></text:p>
          </draw:text-box>
        </draw:frame>
        <draw:frame draw:style-name="gr35" draw:text-style-name="P33" xml:id="id195" draw:id="id195" draw:layer="layout" svg:width="11.856cm" svg:height="1.853cm" svg:x="16.156cm" svg:y="14.478cm">
          <draw:image xlink:href="Pictures/1000000000000293000000675A4140C4.png" xlink:type="simple" xlink:show="embed" xlink:actuate="onLoad" draw:mime-type="image/png">
            <text:p/>
          </draw:image>
        </draw:frame>
        <draw:frame draw:style-name="gr41" draw:text-style-name="P73" xml:id="id191" draw:id="id191" draw:layer="layout" svg:width="6.858cm" svg:height="1.37cm" svg:x="8.89cm" svg:y="9.876cm">
          <draw:text-box>
            <text:p text:style-name="P57"><text:span text:style-name="T25">prin</text:span><text:span text:style-name="T25">t</text:span></text:p>
          </draw:text-box>
        </draw:frame>
        <draw:frame draw:style-name="gr42" draw:text-style-name="P76" xml:id="id194" draw:id="id194" draw:layer="layout" svg:width="7.112cm" svg:height="1.778cm" svg:x="9.044cm" svg:y="14.478cm">
          <draw:text-box>
            <text:p><text:span text:style-name="T87">In </text:span><text:span text:style-name="T87">Kon</text:span><text:span text:style-name="T87">sole:</text:span></text:p>
          </draw:text-box>
        </draw:frame>
        <draw:frame draw:style-name="gr42" draw:text-style-name="P76" xml:id="id192" draw:id="id192" draw:layer="layout" svg:width="7.112cm" svg:height="1.778cm" svg:x="3.81cm" svg:y="5.08cm">
          <draw:text-box>
            <text:p><text:span text:style-name="T87">Argu</text:span><text:span text:style-name="T87">men</text:span><text:span text:style-name="T87">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</text:span><text:span text:style-name="T9">r = </text:span><text:span text:style-name="T9">Name/V</text:span><text:span text:style-name="T9">ariable </text:span><text:span text:style-name="T9">in </text:span><text:span text:style-name="T9">Funktio</text:span><text:span text:style-name="T9">nsdefini</text:span><text:span text:style-name="T9">tion</text:span></text:p>
              <text:p><text:span text:style-name="T9">argument </text:span><text:span text:style-name="T9">= </text:span><text:span text:style-name="T9">informa</text:span><text:span text:style-name="T9">tion </text:span><text:span text:style-name="T9">überge</text:span><text:span text:style-name="T9">ben an </text:span><text:span text:style-name="T9">funktion</text:span></text:p>
              <text:p><text:span text:style-name="T9"/></text:p>
              <text:p><text:span text:style-name="T9">manchma</text:span><text:span text:style-name="T9">l </text:span><text:span text:style-name="T9">vertaus</text:span><text:span text:style-name="T9">cht</text:span></text:p>
            </draw:text-box>
          </draw:frame>
        </presentation:notes>
      </draw:page>
      <draw:page draw:name="page35" draw:style-name="dp1" draw:master-page-name="Titel_20_und_20_Inhalt_5f_">
        <office:forms form:automatic-focus="false" form:apply-design-mode="false"/>
        <draw:frame draw:name="Titel 3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2): </text:span><text:span text:style-name="T26"><text:line-break/></text:span><text:span text:style-name="T26">Beisp</text:span><text:span text:style-name="T26">iel </text:span><text:span text:style-name="T25">len([</text:span><text:span text:style-name="T25">4, 8, </text:span><text:span text:style-name="T25">'This</text:span><text:span text:style-name="T25">', </text:span><text:span text:style-name="T25">'Test</text:span><text:span text:style-name="T25">'])</text:span></text:p>
          </draw:text-box>
        </draw:frame>
        <draw:frame draw:name="Datumsplatzhalter 3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4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35" draw:text-style-name="P33" draw:layer="layout" svg:width="12.214cm" svg:height="12.085cm" svg:x="11.024cm" svg:y="4.0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43" draw:text-style-name="P75" xml:id="id197" draw:id="id197" draw:layer="layout" svg:width="15.494cm" svg:height="1.369cm" svg:x="15.228cm" svg:y="4.804cm">
          <draw:text-box>
            <text:p><text:span text:style-name="T25">[4, </text:span><text:span text:style-name="T25">8, </text:span><text:span text:style-name="T25">'Thi</text:span><text:span text:style-name="T25">s', </text:span><text:span text:style-name="T25">'Tes</text:span><text:span text:style-name="T25">t']</text:span></text:p>
          </draw:text-box>
        </draw:frame>
        <draw:frame draw:style-name="gr44" draw:text-style-name="P77" xml:id="id196" draw:id="id196" draw:layer="layout" svg:width="7.62cm" svg:height="1.212cm" svg:x="13.082cm" svg:y="9.476cm">
          <draw:text-box>
            <text:p text:style-name="P57"><text:span text:style-name="T88">len</text:span></text:p>
          </draw:text-box>
        </draw:frame>
        <draw:frame draw:style-name="gr45" draw:text-style-name="P76" xml:id="id199" draw:id="id199" draw:layer="layout" svg:width="10.706cm" svg:height="3.205cm" svg:x="9.652cm" svg:y="13.97cm">
          <draw:text-box>
            <text:p><text:span text:style-name="T87">Rüc</text:span><text:span text:style-name="T87">kgab</text:span><text:span text:style-name="T87">ewer</text:span><text:span text:style-name="T87">t </text:span></text:p>
            <text:p><text:span text:style-name="T87">(</text:span><text:span text:style-name="T89">ret</text:span><text:span text:style-name="T89">urn</text:span><text:span text:style-name="T87">-</text:span><text:span text:style-name="T87">valu</text:span><text:span text:style-name="T87">e)</text:span></text:p>
          </draw:text-box>
        </draw:frame>
        <draw:frame draw:style-name="gr46" draw:text-style-name="P72" xml:id="id200" draw:id="id200" draw:layer="layout" svg:width="2.784cm" svg:height="2.77cm" svg:x="20.256cm" svg:y="13.994cm">
          <draw:text-box>
            <text:p text:style-name="P57"><text:span text:style-name="T25">4</text:span></text:p>
          </draw:text-box>
        </draw:frame>
        <draw:frame draw:style-name="gr47" draw:text-style-name="P76" xml:id="id198" draw:id="id198" draw:layer="layout" svg:width="7.112cm" svg:height="1.778cm" svg:x="8.128cm" svg:y="4.572cm">
          <draw:text-box>
            <text:p><text:span text:style-name="T87">Argu</text:span><text:span text:style-name="T87">men</text:span><text:span text:style-name="T87">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paramete</text:span><text:span text:style-name="T9">r = </text:span><text:span text:style-name="T9">Name/V</text:span><text:span text:style-name="T9">ariable </text:span><text:span text:style-name="T9">in </text:span><text:span text:style-name="T9">Funktio</text:span><text:span text:style-name="T9">nsdefini</text:span><text:span text:style-name="T9">tion</text:span></text:p>
              <text:p><text:span text:style-name="T9">argument </text:span><text:span text:style-name="T9">= </text:span><text:span text:style-name="T9">informa</text:span><text:span text:style-name="T9">tion </text:span><text:span text:style-name="T9">überge</text:span><text:span text:style-name="T9">ben an </text:span><text:span text:style-name="T9">funktion</text:span></text:p>
              <text:p><text:span text:style-name="T9"/></text:p>
              <text:p><text:span text:style-name="T9">manchma</text:span><text:span text:style-name="T9">l </text:span><text:span text:style-name="T9">vertaus</text:span><text:span text:style-name="T9">cht</text:span></text:p>
            </draw:text-box>
          </draw:frame>
        </presentation:notes>
      </draw:page>
      <draw:page draw:name="page36" draw:style-name="dp1" draw:master-page-name="Titel_20_und_20_Inhalt_5f_">
        <office:forms form:automatic-focus="false" form:apply-design-mode="false"/>
        <draw:frame draw:name="Titel 3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kt</text:span><text:span text:style-name="T1">ionen</text:span><text:span text:style-name="T1">/</text:span><text:span text:style-name="T1">Funct</text:span><text:span text:style-name="T1">ions </text:span><text:span text:style-name="T1">(3)</text:span></text:p>
          </draw:text-box>
        </draw:frame>
        <draw:frame draw:name="Inhaltsplatzhalter 28" presentation:style-name="pr2" draw:text-style-name="P4" draw:layer="layout" svg:width="32.993cm" svg:height="14.74cm" svg:x="2.446cm" svg:y="3.403cm" presentation:class="outline" presentation:user-transformed="true">
          <draw:text-box>
            <text:list text:style-name="L2">
              <text:list-item>
                <text:list>
                  <text:list-item>
                    <text:p xml:id="id201" text:id="id201" text:style-name="P3"><text:span text:style-name="T2">„</text:span><text:span text:style-name="T2">Benannter Codeblock“ mit </text:span><text:span text:style-name="T2">spezifischer Aufgabe</text:span></text:p>
                    <text:list>
                      <text:list-item>
                        <text:p xml:id="id203" text:id="id203" text:style-name="P3"><text:span text:style-name="T2">Wiederverwendbar, einfacher </text:span><text:span text:style-name="T2">lesbar, besser wartbar</text:span></text:p>
                      </text:list-item>
                      <text:list-item>
                        <text:p xml:id="id204" text:id="id204" text:style-name="P3"><text:span text:style-name="T2">Beispiele von Python-</text:span><text:span text:style-name="T2">Funktionen: </text:span><text:span text:style-name="T25">len()</text:span><text:span text:style-name="T2">, </text:span><text:span text:style-name="T25">print()</text:span><text:span text:style-name="T2">, </text:span><text:span text:style-name="T44">input()</text:span><text:span text:style-name="T2">, … </text:span></text:p>
                      </text:list-item>
                    </text:list>
                  </text:list-item>
                  <text:list-item>
                    <text:p xml:id="id205" text:id="id205" text:style-name="P3"><text:span text:style-name="T2">Definiert durch Schlüsselwort </text:span><text:span text:style-name="T70">def,</text:span><text:span text:style-name="T2">Name der Funktion, Parameter-</text:span><text:span text:style-name="T2">Liste</text:span></text:p>
                    <text:list>
                      <text:list-item>
                        <text:p xml:id="id206" text:id="id206" text:style-name="P3"><text:span text:style-name="T2">Code-Block in Funktion: </text:span><text:span text:style-name="T2">eingerückt!</text:span></text:p>
                      </text:list-item>
                    </text:list>
                  </text:list-item>
                  <text:list-item>
                    <text:p xml:id="id207" text:id="id207" text:style-name="P3"><text:span text:style-name="T2">Ausführung bei Aufruf (call), danach </text:span><text:span text:style-name="T2">Programm fortgesetzt</text:span></text:p>
                  </text:list-item>
                  <text:list-item>
                    <text:p xml:id="id208" text:id="id208" text:style-name="P60"><text:span text:style-name="T2">Rückgabe von Werten an </text:span><text:span text:style-name="T2">Hauptprogramm möglich (</text:span><text:span text:style-name="T25">return</text:span><text:span text:style-name="T2">)</text:span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name="Datumsplatzhalter 3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48" draw:text-style-name="P78" xml:id="id202" draw:id="id202" draw:layer="layout" svg:width="30.897cm" svg:height="4.318cm" svg:x="2.631cm" svg:y="14.07cm">
          <draw:text-box>
            <text:p><text:span text:style-name="T63">def</text:span><text:span text:style-name="T19"> </text:span><text:span text:style-name="T19">test</text:span><text:span text:style-name="T19">_fun</text:span><text:span text:style-name="T19">ctio</text:span><text:span text:style-name="T19">n(pa</text:span><text:span text:style-name="T19">ram)</text:span><text:span text:style-name="T19">:</text:span></text:p>
            <text:p><text:span text:style-name="T19"><text:s text:c="4"/></text:span><text:span text:style-name="T63">prin</text:span><text:span text:style-name="T63">t</text:span><text:span text:style-name="T19">(f'</text:span><text:span text:style-name="T19">You </text:span><text:span text:style-name="T19">pass</text:span><text:span text:style-name="T19">ed </text:span><text:span text:style-name="T19">"{pa</text:span><text:span text:style-name="T19">ram}</text:span><text:span text:style-name="T19">" to </text:span><text:span text:style-name="T19">this </text:span><text:span text:style-name="T19">func</text:span><text:span text:style-name="T19">tion</text:span><text:span text:style-name="T19">')</text:span></text:p>
            <text:p><text:span text:style-name="T90"/></text:p>
            <text:p><text:span text:style-name="T19">test</text:span><text:span text:style-name="T19">_fun</text:span><text:span text:style-name="T19">ctio</text:span><text:span text:style-name="T19">n(13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18" draw:text-style-name="P13" draw:layer="layout" svg:width="17.271cm" svg:height="14.167cm" svg:x="2.159cm" svg:y="13.271cm" presentation:class="notes" presentation:user-transformed="true">
            <draw:text-box>
              <text:p><text:span text:style-name="T9">Ab hier: </text:span><text:span text:style-name="T9">40 </text:span><text:span text:style-name="T9">Minute</text:span><text:span text:style-name="T9">n!</text:span></text:p>
              <text:p><text:span text:style-name="T9">===</text:span></text:p>
              <text:p><text:span text:style-name="T9"/></text:p>
              <text:p><text:span text:style-name="T9">Code </text:span><text:span text:style-name="T9">einmal </text:span><text:span text:style-name="T9">schreib</text:span><text:span text:style-name="T9">en, so </text:span><text:span text:style-name="T9">oft wie </text:span><text:span text:style-name="T9">nötig </text:span><text:span text:style-name="T9">wiederv</text:span><text:span text:style-name="T9">erwend</text:span><text:span text:style-name="T9">en </text:span><text:span text:style-name="T9">wenn </text:span><text:span text:style-name="T9">selbe </text:span><text:span text:style-name="T9">aufgab</text:span><text:span text:style-name="T9">e </text:span><text:span text:style-name="T9">wieder </text:span><text:span text:style-name="T9">erledigt </text:span><text:span text:style-name="T9">werden </text:span><text:span text:style-name="T9">muss</text:span></text:p>
              <text:p><text:span text:style-name="T9"/></text:p>
              <text:p><text:span text:style-name="T9">Definition </text:span><text:span text:style-name="T9">beginnt </text:span><text:span text:style-name="T9">mit </text:span><text:span text:style-name="T9">Schlüss</text:span><text:span text:style-name="T9">elwort </text:span><text:span text:style-name="T9">def, </text:span><text:span text:style-name="T9">folgt </text:span><text:span text:style-name="T9">der </text:span><text:span text:style-name="T9">Funktio</text:span><text:span text:style-name="T9">nsnam</text:span><text:span text:style-name="T9">e, dann </text:span><text:span text:style-name="T9">parame</text:span><text:span text:style-name="T9">ter</text:span></text:p>
              <text:p><text:span text:style-name="T9"/></text:p>
              <text:p text:style-name="P79"><text:span text:style-name="T9">paramete</text:span><text:span text:style-name="T9">r = </text:span><text:span text:style-name="T9">Name/V</text:span><text:span text:style-name="T9">ariable </text:span><text:span text:style-name="T9">in </text:span><text:span text:style-name="T9">Funktio</text:span><text:span text:style-name="T9">nsdefini</text:span><text:span text:style-name="T9">tion </text:span><text:span text:style-name="T9">(Info</text:span></text:p>
              <text:p><text:span text:style-name="T9">argument </text:span><text:span text:style-name="T9">= </text:span><text:span text:style-name="T9">informa</text:span><text:span text:style-name="T9">tion </text:span><text:span text:style-name="T9">überge</text:span><text:span text:style-name="T9">ben an </text:span><text:span text:style-name="T9">funktion</text:span></text:p>
              <text:p><text:span text:style-name="T9"/></text:p>
              <text:p><text:span text:style-name="T9">Müssen </text:span><text:span text:style-name="T9">definier</text:span><text:span text:style-name="T9">t </text:span><text:span text:style-name="T9">werden</text:span><text:span text:style-name="T9">, bevor </text:span><text:span text:style-name="T9">sie </text:span><text:span text:style-name="T9">verwen</text:span><text:span text:style-name="T9">det </text:span><text:span text:style-name="T9">werden</text:span><text:span text:style-name="T9">. also </text:span><text:span text:style-name="T9">code </text:span><text:span text:style-name="T9">zum </text:span><text:span text:style-name="T9">ausführ</text:span><text:span text:style-name="T9">en </text:span><text:span text:style-name="T9">unter </text:span><text:span text:style-name="T9">Code </text:span><text:span text:style-name="T9">für def</text:span></text:p>
              <text:p><text:span text:style-name="T9"/></text:p>
              <text:p><text:span text:style-name="T9">Nicht </text:span><text:span text:style-name="T9">erlaubt, </text:span><text:span text:style-name="T9">mehrer</text:span><text:span text:style-name="T9">e </text:span><text:span text:style-name="T9">Funktio</text:span><text:span text:style-name="T9">nen mit </text:span><text:span text:style-name="T9">selbem </text:span><text:span text:style-name="T9">Namen </text:span><text:span text:style-name="T9">zu </text:span><text:span text:style-name="T9">haben</text:span></text:p>
            </draw:text-box>
          </draw:frame>
        </presentation:notes>
      </draw:page>
      <draw:page draw:name="page37" draw:style-name="dp1" draw:master-page-name="Titel_20_und_20_Inhalt_5f_">
        <office:forms form:automatic-focus="false" form:apply-design-mode="false"/>
        <draw:frame draw:name="Titel 3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4): </text:span><text:span text:style-name="T1"><text:line-break/></text:span><text:span text:style-name="T1">Einfa</text:span><text:span text:style-name="T1">ches </text:span><text:span text:style-name="T1">Code</text:span><text:span text:style-name="T1">-</text:span><text:span text:style-name="T1">Beisp</text:span><text:span text:style-name="T1">iel für </text:span><text:span text:style-name="T1">Defini</text:span><text:span text:style-name="T1">tion </text:span><text:span text:style-name="T1">und </text:span><text:span text:style-name="T1">Aufru</text:span><text:span text:style-name="T1">f</text:span></text:p>
          </draw:text-box>
        </draw:frame>
        <draw:frame draw:name="Inhaltsplatzhalter 30" presentation:style-name="pr19" draw:text-style-name="P65" draw:layer="layout" svg:width="32.993cm" svg:height="11.938cm" svg:x="1.778cm" svg:y="5.33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4"><text:span text:style-name="T63">def</text:span><text:span text:style-name="T19"> test_simple():</text:span></text:p>
                    <text:p text:style-name="P14"><text:span text:style-name="T19"><text:s text:c="4"/></text:span><text:span text:style-name="T19">print(f'Hi everyone!') </text:span></text:p>
                    <text:p text:style-name="P14"><text:span text:style-name="T19"/></text:p>
                    <text:p text:style-name="P14"><text:span text:style-name="T63">def</text:span><text:span text:style-name="T19"> test_param(param):</text:span></text:p>
                    <text:p text:style-name="P14"><text:span text:style-name="T19"><text:s text:c="4"/></text:span><text:span text:style-name="T19">print(f'You passed "{param}" to this function') </text:span></text:p>
                    <text:p text:style-name="P14"><text:span text:style-name="T19"/></text:p>
                    <text:p text:style-name="P14"><text:span text:style-name="T19">test_simple()</text:span></text:p>
                    <text:p text:style-name="P14"><text:span text:style-name="T28">test_param(</text:span><text:span text:style-name="T19">'Hello!')</text:span></text:p>
                  </text:list-header>
                </text:list>
              </text:list-item>
            </text:list>
          </draw:text-box>
        </draw:frame>
        <draw:frame draw:name="Datumsplatzhalter 36" presentation:style-name="pr3" draw:text-style-name="P18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35" presentation:style-name="pr3" draw:text-style-name="P18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36" presentation:style-name="pr4" draw:text-style-name="P1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7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el_20_und_20_Inhalt_5f_">
        <office:forms form:automatic-focus="false" form:apply-design-mode="false"/>
        <draw:frame draw:name="Titel 1_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5): </text:span><text:span text:style-name="T26">Funkt</text:span><text:span text:style-name="T26">ionen </text:span><text:span text:style-name="T26">vs </text:span><text:span text:style-name="T26">Meth</text:span><text:span text:style-name="T26">oden</text:span></text:p>
          </draw:text-box>
        </draw:frame>
        <draw:frame draw:name="Datumsplatzhalter 3_ 2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3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2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name="Inhaltsplatzhalter 8_ 2" presentation:style-name="pr2" draw:text-style-name="P4" draw:layer="layout" svg:width="32.993cm" svg:height="13.897cm" svg:x="2.447cm" svg:y="4.547cm" presentation:class="outline" presentation:user-transformed="true">
          <draw:text-box>
            <text:list text:style-name="L2">
              <text:list-item>
                <text:list>
                  <text:list-item>
                    <text:p xml:id="id209" text:id="id209" text:style-name="P14"><text:span text:style-name="T10">Funktion</text:span></text:p>
                    <text:list>
                      <text:list-item>
                        <text:p xml:id="id210" text:id="id210" text:style-name="P15"><text:span text:style-name="T10">„</text:span><text:span text:style-name="T10">Eigenständige“ Funktionalität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211" text:id="id211" text:style-name="P15"><text:span text:style-name="T25">print()</text:span><text:span text:style-name="T23">, </text:span><text:span text:style-name="T25">len()</text:span><text:span text:style-name="T91">, </text:span><text:span text:style-name="T25">range()</text:span><text:span text:style-name="T91">, 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212" text:id="id212" text:style-name="P14"><text:span text:style-name="T10">Methode</text:span></text:p>
                    <text:list>
                      <text:list-item>
                        <text:p xml:id="id213" text:id="id213" text:style-name="P15"><text:span text:style-name="T10">Gehört zu Objekt/Variable</text:span></text:p>
                      </text:list-item>
                      <text:list-item>
                        <text:p xml:id="id214" text:id="id214" text:style-name="P15"><text:span text:style-name="T10">Auf Variable aufgerufen („Method call“)</text:span></text:p>
                      </text:list-item>
                      <text:list-item>
                        <text:p xml:id="id215" text:id="id215" text:style-name="P15"><text:span text:style-name="T10">Hat Zugriff auf Daten/Werte in Varia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216" text:id="id216" text:style-name="P24"><text:span text:style-name="T92">string</text:span><text:span text:style-name="T20">.upper()</text:span><text:span text:style-name="T10">,</text:span><text:span text:style-name="T61"> </text:span><text:span text:style-name="T69">item_list</text:span><text:span text:style-name="T20">.append()</text:span><text:span text:style-name="T10">, </text:span><text:span text:style-name="T69">dictionary</text:span><text:span text:style-name="T20">.keys()</text:span><text:span text:style-name="T93">, </text:span><text:span text:style-name="T94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20" draw:text-style-name="P80" draw:layer="layout" svg:width="17.271cm" svg:height="15.263cm" svg:x="2.159cm" svg:y="13.271cm" presentation:class="notes" presentation:user-transformed="true">
            <draw:text-box>
              <text:list text:style-name="L1">
                <text:list-item>
                  <text:p text:style-name="P14"><text:span text:style-name="T10">Funkt</text:span><text:span text:style-name="T10">ion</text:span></text:p>
                  <text:list>
                    <text:list-item>
                      <text:p text:style-name="P16"><text:span text:style-name="T10">„</text:span><text:span text:style-name="T10">eig</text:span><text:span text:style-name="T10">enst</text:span><text:span text:style-name="T10">ändi</text:span><text:span text:style-name="T10">ge“ </text:span><text:span text:style-name="T10">Fun</text:span><text:span text:style-name="T10">ktio</text:span><text:span text:style-name="T10">nalit</text:span><text:span text:style-name="T10">ät </text:span></text:p>
                    </text:list-item>
                    <text:list-item>
                      <text:p text:style-name="P16"><text:span text:style-name="T25">pri</text:span><text:span text:style-name="T25">nt(</text:span><text:span text:style-name="T25">)</text:span><text:span text:style-name="T23">, </text:span><text:span text:style-name="T25">len</text:span><text:span text:style-name="T25">()</text:span><text:span text:style-name="T91">, </text:span><text:span text:style-name="T25">ran</text:span><text:span text:style-name="T25">dom</text:span><text:span text:style-name="T25">.ra</text:span><text:span text:style-name="T25">ndi</text:span><text:span text:style-name="T25">nt(</text:span><text:span text:style-name="T25">)</text:span><text:span text:style-name="T91">, ..</text:span><text:span text:style-name="T91">.</text:span></text:p>
                    </text:list-item>
                  </text:list>
                </text:list-item>
                <text:list-item>
                  <text:p text:style-name="P14"><text:span text:style-name="T10">Meth</text:span><text:span text:style-name="T10">ode</text:span></text:p>
                  <text:list>
                    <text:list-item>
                      <text:p text:style-name="P16"><text:span text:style-name="T10">Geh</text:span><text:span text:style-name="T10">ört </text:span><text:span text:style-name="T10">zu </text:span><text:span text:style-name="T10">Obj</text:span><text:span text:style-name="T10">ekt/</text:span><text:span text:style-name="T10">Vari</text:span><text:span text:style-name="T10">able</text:span></text:p>
                    </text:list-item>
                    <text:list-item>
                      <text:p text:style-name="P16"><text:span text:style-name="T10">Auf </text:span><text:span text:style-name="T10">Vari</text:span><text:span text:style-name="T10">able </text:span><text:span text:style-name="T10">aufg</text:span><text:span text:style-name="T10">eruf</text:span><text:span text:style-name="T10">en </text:span><text:span text:style-name="T10">(„m</text:span><text:span text:style-name="T10">etho</text:span><text:span text:style-name="T10">d </text:span><text:span text:style-name="T10">call“</text:span><text:span text:style-name="T10">)</text:span></text:p>
                    </text:list-item>
                    <text:list-item>
                      <text:p text:style-name="P16"><text:span text:style-name="T10">Hat </text:span><text:span text:style-name="T10">Zug</text:span><text:span text:style-name="T10">riff </text:span><text:span text:style-name="T10">auf </text:span><text:span text:style-name="T10">Dat</text:span><text:span text:style-name="T10">en/</text:span><text:span text:style-name="T10">Wer</text:span><text:span text:style-name="T10">te in </text:span><text:span text:style-name="T10">Vari</text:span><text:span text:style-name="T10">able</text:span></text:p>
                    </text:list-item>
                    <text:list-item>
                      <text:p><text:span text:style-name="T95">stri</text:span><text:span text:style-name="T95">ng</text:span><text:span text:style-name="T96">.</text:span><text:span text:style-name="T96">upp</text:span><text:span text:style-name="T96">er(</text:span><text:span text:style-name="T96">)</text:span><text:span text:style-name="T10">,</text:span><text:span text:style-name="T61"> </text:span><text:span text:style-name="T69">it</text:span><text:span text:style-name="T69">em</text:span><text:span text:style-name="T69">_l</text:span><text:span text:style-name="T69">is</text:span><text:span text:style-name="T69">t</text:span><text:span text:style-name="T96">.</text:span><text:span text:style-name="T96">app</text:span><text:span text:style-name="T96">end</text:span><text:span text:style-name="T96">()</text:span><text:span text:style-name="T10">, </text:span><text:span text:style-name="T69">di</text:span><text:span text:style-name="T69">ct</text:span><text:span text:style-name="T69">io</text:span><text:span text:style-name="T69">na</text:span><text:span text:style-name="T69">ry</text:span><text:span text:style-name="T96">.ke</text:span><text:span text:style-name="T96">ys(</text:span><text:span text:style-name="T96">)</text:span><text:span text:style-name="T97">, </text:span><text:span text:style-name="T94">.</text:span><text:span text:style-name="T94">.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9" draw:style-name="dp1" draw:master-page-name="Titel_20_und_20_Inhalt_5f_">
        <office:forms form:automatic-focus="false" form:apply-design-mode="false"/>
        <draw:frame draw:style-name="gr49" draw:text-style-name="P72" xml:id="id221" draw:id="id221" draw:layer="layout" svg:width="28.194cm" svg:height="6.959cm" svg:x="3.048cm" svg:y="11.43cm">
          <draw:text-box>
            <text:p><text:span text:style-name="T63">def</text:span><text:span text:style-name="T19"> </text:span><text:span text:style-name="T19">form</text:span><text:span text:style-name="T19">at_n</text:span><text:span text:style-name="T19">ame(</text:span><text:span text:style-name="T19">firs</text:span><text:span text:style-name="T19">t, </text:span><text:span text:style-name="T19">last</text:span><text:span text:style-name="T19">):</text:span></text:p>
            <text:p><text:span text:style-name="T19"><text:s text:c="4"/></text:span><text:span text:style-name="T19">full</text:span><text:span text:style-name="T19">_nam</text:span><text:span text:style-name="T19">e = </text:span><text:span text:style-name="T19">f'{f</text:span><text:span text:style-name="T19">irst</text:span><text:span text:style-name="T19">} </text:span><text:span text:style-name="T19">{las</text:span><text:span text:style-name="T19">t}'</text:span></text:p>
            <text:p><text:span text:style-name="T19"><text:s text:c="4"/></text:span><text:span text:style-name="T19">full</text:span><text:span text:style-name="T19">_nam</text:span><text:span text:style-name="T19">e = </text:span><text:span text:style-name="T19">full</text:span><text:span text:style-name="T19">_nam</text:span><text:span text:style-name="T19">e.ti</text:span><text:span text:style-name="T19">tle(</text:span><text:span text:style-name="T19">)</text:span></text:p>
            <text:p><text:span text:style-name="T19"><text:s text:c="4"/></text:span><text:span text:style-name="T63">retu</text:span><text:span text:style-name="T63">rn</text:span><text:span text:style-name="T19"> </text:span><text:span text:style-name="T19">full</text:span><text:span text:style-name="T19">_nam</text:span><text:span text:style-name="T19">e</text:span></text:p>
            <text:p><text:span text:style-name="T19"/></text:p>
            <text:p><text:span text:style-name="T19">name </text:span><text:span text:style-name="T19">= </text:span><text:span text:style-name="T19">form</text:span><text:span text:style-name="T19">at_n</text:span><text:span text:style-name="T19">ame(</text:span><text:span text:style-name="T19">'aRn</text:span><text:span text:style-name="T19">OlD'</text:span><text:span text:style-name="T19">, </text:span><text:span text:style-name="T19">'sCh</text:span><text:span text:style-name="T19">WaRz</text:span><text:span text:style-name="T19">EnEg</text:span><text:span text:style-name="T19">GeR'</text:span><text:span text:style-name="T19">)</text:span></text:p>
          </draw:text-box>
        </draw:frame>
        <draw:frame draw:name="Titel 1_ 1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6a): </text:span><text:span text:style-name="T26">Rück</text:span><text:span text:style-name="T26">gabe</text:span><text:span text:style-name="T26">werte </text:span><text:span text:style-name="T26">(</text:span><text:span text:style-name="T37">ret</text:span><text:span text:style-name="T37">urn</text:span><text:span text:style-name="T1"> </text:span><text:span text:style-name="T1">value</text:span><text:span text:style-name="T1">s)</text:span></text:p>
          </draw:text-box>
        </draw:frame>
        <draw:frame draw:name="Inhaltsplatzhalter 8_ 1" presentation:style-name="pr2" draw:text-style-name="P4" draw:layer="layout" svg:width="30.32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17" text:id="id217" text:style-name="P3"><text:span text:style-name="T23">„</text:span><text:span text:style-name="T23">Berechnungen“ in Funktionen, Rückgabe an Hauptprogramm</text:span></text:p>
                  </text:list-item>
                  <text:list-item>
                    <text:p xml:id="id218" text:id="id218" text:style-name="P3"><text:span text:style-name="T2">Rückgabe von Werten aus Funktionen</text:span></text:p>
                    <text:list>
                      <text:list-item>
                        <text:p xml:id="id219" text:id="id219" text:style-name="P3"><text:span text:style-name="T23">Keyword:</text:span><text:span text:style-name="T28"> </text:span><text:span text:style-name="T25">return</text:span></text:p>
                      </text:list-item>
                      <text:list-item>
                        <text:p xml:id="id220" text:id="id220" text:style-name="P3"><text:span text:style-name="T91">Sofortige Rückkehr zum Hauptprogramm (auch ohne Wert möglich)</text:span></text:p>
                      </text:list-item>
                    </text:list>
                    <text:p text:style-name="P3"><text:span text:style-name="T23"/></text:p>
                    <text:p text:style-name="P3"><text:span text:style-name="T23"/></text:p>
                    <text:p text:style-name="P3"><text:span text:style-name="T23"/></text:p>
                  </text:list-item>
                </text:list>
              </text:list-item>
            </text:list>
          </draw:text-box>
        </draw:frame>
        <draw:frame draw:name="Datumsplatzhalter 3_ 1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1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1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In der </text:span><text:span text:style-name="T9">Realität</text:span><text:span text:style-name="T9">: </text:span><text:span text:style-name="T9">Funktio</text:span><text:span text:style-name="T9">n gibt </text:span><text:span text:style-name="T9">output </text:span><text:span text:style-name="T9">nicht </text:span><text:span text:style-name="T9">selbst </text:span><text:span text:style-name="T9">aus, </text:span><text:span text:style-name="T9">sonder</text:span><text:span text:style-name="T9">n </text:span><text:span text:style-name="T9">retourni</text:span><text:span text:style-name="T9">ert </text:span><text:span text:style-name="T9">einen </text:span><text:span text:style-name="T9">oder </text:span><text:span text:style-name="T9">mehrer</text:span><text:span text:style-name="T9">e Werte </text:span><text:span text:style-name="T9">an </text:span><text:span text:style-name="T9">hauptpr</text:span><text:span text:style-name="T9">ogram</text:span><text:span text:style-name="T9">m</text:span></text:p>
              <text:p><text:span text:style-name="T9">-</text:span></text:p>
              <text:p><text:span text:style-name="T9">=&gt; </text:span><text:span text:style-name="T9">Rückga</text:span><text:span text:style-name="T9">bewert </text:span><text:span text:style-name="T9">oder </text:span><text:span text:style-name="T9">return </text:span><text:span text:style-name="T9">value</text:span></text:p>
              <text:p><text:span text:style-name="T9">-</text:span></text:p>
              <text:p><text:span text:style-name="T9">das </text:span><text:span text:style-name="T9">return </text:span><text:span text:style-name="T9">statem</text:span><text:span text:style-name="T9">ent </text:span><text:span text:style-name="T9">nimmt </text:span><text:span text:style-name="T9">den </text:span><text:span text:style-name="T9">wert </text:span><text:span text:style-name="T9">der </text:span><text:span text:style-name="T9">“returne</text:span><text:span text:style-name="T9">d” wird </text:span><text:span text:style-name="T9">und </text:span><text:span text:style-name="T9">liefert </text:span><text:span text:style-name="T9">ihn an </text:span><text:span text:style-name="T9">die </text:span><text:span text:style-name="T9">zeile </text:span><text:span text:style-name="T9">des </text:span><text:span text:style-name="T9">method</text:span><text:span text:style-name="T9">enaufru</text:span><text:span text:style-name="T9">fs </text:span><text:span text:style-name="T9">zurück</text:span></text:p>
              <text:p><text:span text:style-name="T9"/></text:p>
            </draw:text-box>
          </draw:frame>
        </presentation:notes>
      </draw:page>
      <draw:page draw:name="page40" draw:style-name="dp1" draw:master-page-name="Titel_20_und_20_Inhalt_5f_">
        <office:forms form:automatic-focus="false" form:apply-design-mode="false"/>
        <draw:frame draw:style-name="gr49" draw:text-style-name="P72" draw:layer="layout" svg:width="28.194cm" svg:height="6.959cm" svg:x="3.048cm" svg:y="11.43cm">
          <draw:text-box>
            <text:p><text:span text:style-name="T63">def</text:span><text:span text:style-name="T19"> </text:span><text:span text:style-name="T19">forma</text:span><text:span text:style-name="T19">t_nam</text:span><text:span text:style-name="T19">e(fir</text:span><text:span text:style-name="T19">st, </text:span><text:span text:style-name="T19">last)</text:span><text:span text:style-name="T19">:</text:span></text:p>
            <text:p><text:span text:style-name="T19"><text:s text:c="4"/></text:span><text:span text:style-name="T19">full_</text:span><text:span text:style-name="T19">name </text:span><text:span text:style-name="T19">= </text:span><text:span text:style-name="T19">f'{fi</text:span><text:span text:style-name="T19">rst} </text:span><text:span text:style-name="T19">{last</text:span><text:span text:style-name="T19">}'</text:span></text:p>
            <text:p><text:span text:style-name="T19"><text:s text:c="4"/></text:span><text:span text:style-name="T19">full_</text:span><text:span text:style-name="T19">name </text:span><text:span text:style-name="T19">= </text:span><text:span text:style-name="T19">full_</text:span><text:span text:style-name="T19">name.</text:span><text:span text:style-name="T19">title</text:span><text:span text:style-name="T19">()</text:span></text:p>
            <text:p><text:span text:style-name="T19"><text:s text:c="4"/></text:span><text:span text:style-name="T63">retur</text:span><text:span text:style-name="T63">n</text:span><text:span text:style-name="T19"> </text:span><text:span text:style-name="T19">full_</text:span><text:span text:style-name="T19">name</text:span></text:p>
            <text:p><text:span text:style-name="T19"/></text:p>
            <text:p><text:span text:style-name="T19">name </text:span><text:span text:style-name="T19">= </text:span><text:span text:style-name="T19">forma</text:span><text:span text:style-name="T19">t_nam</text:span><text:span text:style-name="T19">e(</text:span><text:span text:style-name="T98">'aR</text:span><text:span text:style-name="T98">nOlD'</text:span><text:span text:style-name="T98">, </text:span><text:span text:style-name="T98">'sChW</text:span><text:span text:style-name="T98">aRzEn</text:span><text:span text:style-name="T98">EgGeR</text:span><text:span text:style-name="T98">'</text:span><text:span text:style-name="T19">)</text:span></text:p>
          </draw:text-box>
        </draw:frame>
        <draw:frame draw:name="Titel 1_ 1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6b): </text:span><text:span text:style-name="T26">Rück</text:span><text:span text:style-name="T26">gabe</text:span><text:span text:style-name="T26">werte </text:span><text:span text:style-name="T26">(</text:span><text:span text:style-name="T37">ret</text:span><text:span text:style-name="T37">urn</text:span><text:span text:style-name="T1"> </text:span><text:span text:style-name="T1">value</text:span><text:span text:style-name="T1">s)</text:span></text:p>
          </draw:text-box>
        </draw:frame>
        <draw:frame draw:name="Inhaltsplatzhalter 8_ 4" presentation:style-name="pr2" draw:text-style-name="P81" draw:layer="layout" svg:width="30.57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3">„</text:span><text:span text:style-name="T23">Berechnungen“ in Funktionen, Rückgabe an Hauptprogramm</text:span></text:p>
                  </text:list-item>
                  <text:list-item>
                    <text:p text:style-name="P3"><text:span text:style-name="T2">Rückgabe von Werten aus Funktionen</text:span></text:p>
                    <text:list>
                      <text:list-item>
                        <text:p text:style-name="P3"><text:span text:style-name="T23">Keyword:</text:span><text:span text:style-name="T28"> </text:span><text:span text:style-name="T25">return</text:span></text:p>
                      </text:list-item>
                      <text:list-item>
                        <text:p text:style-name="P3"><text:span text:style-name="T91">Sofortige Rückkehr zum Hauptprogramm (auch ohne Wert möglich)</text:span></text:p>
                      </text:list-item>
                    </text:list>
                    <text:p text:style-name="P60"><text:span text:style-name="T23"/></text:p>
                    <text:p text:style-name="P60"><text:span text:style-name="T23"/></text:p>
                    <text:p text:style-name="P3"><text:span text:style-name="T23"/></text:p>
                  </text:list-item>
                </text:list>
              </text:list-item>
            </text:list>
          </draw:text-box>
        </draw:frame>
        <draw:frame draw:name="Datumsplatzhalter 3_ 4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4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4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0" draw:text-style-name="P82" xml:id="id222" draw:id="id222" draw:layer="layout" svg:width="14.224cm" svg:height="1.369cm" svg:x="12.138cm" svg:y="12.546cm">
          <draw:text-box>
            <text:p><text:span text:style-name="T99">'a</text:span><text:span text:style-name="T99">Rn</text:span><text:span text:style-name="T99">Ol</text:span><text:span text:style-name="T99">D </text:span><text:span text:style-name="T98">sC</text:span><text:span text:style-name="T98">hW</text:span><text:span text:style-name="T98">aR</text:span><text:span text:style-name="T98">zE</text:span><text:span text:style-name="T98">nE</text:span><text:span text:style-name="T98">gG</text:span><text:span text:style-name="T98">eR</text:span><text:span text:style-name="T98">'</text:span></text:p>
          </draw:text-box>
        </draw:frame>
        <draw:frame draw:style-name="gr50" draw:text-style-name="P82" xml:id="id223" draw:id="id223" draw:layer="layout" svg:width="14.224cm" svg:height="1.369cm" svg:x="12.138cm" svg:y="13.647cm">
          <draw:text-box>
            <text:p><text:span text:style-name="T99">'Arnold Schwarzenegger</text:span><text:span text:style-name="T98">'</text:span></text:p>
          </draw:text-box>
        </draw:frame>
        <draw:frame draw:style-name="gr50" draw:text-style-name="P82" xml:id="id224" draw:id="id224" draw:layer="layout" svg:width="14.224cm" svg:height="1.369cm" svg:x="9.304cm" svg:y="14.732cm">
          <draw:text-box>
            <text:p><text:span text:style-name="T99">'Arnold Schwarzenegger</text:span><text:span text:style-name="T98">'</text:span></text:p>
          </draw:text-box>
        </draw:frame>
        <draw:frame draw:style-name="gr50" draw:text-style-name="P82" xml:id="id225" draw:id="id225" draw:layer="layout" svg:width="23.622cm" svg:height="1.369cm" svg:x="6.858cm" svg:y="17.018cm">
          <draw:text-box>
            <text:p><text:span text:style-name="T99">'Arnold Schwarzenegger</text:span><text:span text:style-name="T98">'</text:span></text:p>
          </draw:text-box>
        </draw:frame>
        <draw:frame draw:style-name="gr50" draw:text-style-name="P82" draw:layer="layout" svg:width="18.542cm" svg:height="1.369cm" svg:x="12.6cm" svg:y="11.43cm">
          <draw:text-box>
            <text:p><text:span text:style-name="T99">'aRnO</text:span><text:span text:style-name="T99">lD'</text:span><text:span text:style-name="T100">,</text:span><text:span text:style-name="T99"> </text:span><text:span text:style-name="T99">' </text:span><text:span text:style-name="T98">sChWa</text:span><text:span text:style-name="T98">RzEnE</text:span><text:span text:style-name="T98">gGeR'</text:span><text:span text:style-name="T10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><text:span text:style-name="T9">In der </text:span><text:span text:style-name="T9">Realität</text:span><text:span text:style-name="T9">: </text:span><text:span text:style-name="T9">Funktio</text:span><text:span text:style-name="T9">n gibt </text:span><text:span text:style-name="T9">output </text:span><text:span text:style-name="T9">nicht </text:span><text:span text:style-name="T9">selbst </text:span><text:span text:style-name="T9">aus, </text:span><text:span text:style-name="T9">sonder</text:span><text:span text:style-name="T9">n </text:span><text:span text:style-name="T9">retourni</text:span><text:span text:style-name="T9">ert </text:span><text:span text:style-name="T9">einen </text:span><text:span text:style-name="T9">oder </text:span><text:span text:style-name="T9">mehrer</text:span><text:span text:style-name="T9">e Werte </text:span><text:span text:style-name="T9">an </text:span><text:span text:style-name="T9">hauptpr</text:span><text:span text:style-name="T9">ogram</text:span><text:span text:style-name="T9">m</text:span></text:p>
              <text:p><text:span text:style-name="T9">-</text:span></text:p>
              <text:p><text:span text:style-name="T9">=&gt; </text:span><text:span text:style-name="T9">Rückga</text:span><text:span text:style-name="T9">bewert </text:span><text:span text:style-name="T9">oder </text:span><text:span text:style-name="T9">return </text:span><text:span text:style-name="T9">value</text:span></text:p>
              <text:p><text:span text:style-name="T9">-</text:span></text:p>
              <text:p><text:span text:style-name="T9">das </text:span><text:span text:style-name="T9">return </text:span><text:span text:style-name="T9">statem</text:span><text:span text:style-name="T9">ent </text:span><text:span text:style-name="T9">nimmt </text:span><text:span text:style-name="T9">den </text:span><text:span text:style-name="T9">wert </text:span><text:span text:style-name="T9">der </text:span><text:span text:style-name="T9">“returne</text:span><text:span text:style-name="T9">d” wird </text:span><text:span text:style-name="T9">und </text:span><text:span text:style-name="T9">liefert </text:span><text:span text:style-name="T9">ihn an </text:span><text:span text:style-name="T9">die </text:span><text:span text:style-name="T9">zeile </text:span><text:span text:style-name="T9">des </text:span><text:span text:style-name="T9">method</text:span><text:span text:style-name="T9">enaufru</text:span><text:span text:style-name="T9">fs </text:span><text:span text:style-name="T9">zurück</text:span></text:p>
              <text:p><text:span text:style-name="T9"/></text:p>
            </draw:text-box>
          </draw:frame>
        </presentation:notes>
      </draw:page>
      <draw:page draw:name="page41" draw:style-name="dp1" draw:master-page-name="Titel_20_und_20_Inhalt_5f_">
        <office:forms form:automatic-focus="false" form:apply-design-mode="false"/>
        <draw:frame draw:name="Titel 1_ 1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6">Funct</text:span><text:span text:style-name="T26">ions </text:span><text:span text:style-name="T26">(7): </text:span><text:span text:style-name="T26">Mehr </text:span><text:span text:style-name="T26">zu </text:span><text:span text:style-name="T37">retu</text:span><text:span text:style-name="T37">rn</text:span><text:span text:style-name="T1"> </text:span><text:span text:style-name="T1">value</text:span><text:span text:style-name="T1">s</text:span></text:p>
          </draw:text-box>
        </draw:frame>
        <draw:frame draw:name="Inhaltsplatzhalter 8_ 3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26" text:id="id226" text:style-name="P14"><text:span text:style-name="T10">„</text:span><text:span text:style-name="T10">Kompliziertere“ Rückgabewerte möglich</text:span></text:p>
                    <text:list>
                      <text:list-item>
                        <text:p xml:id="id227" text:id="id227" text:style-name="P15"><text:span text:style-name="T10">Listen, Tuples, Dictionaries, etc.</text:span></text:p>
                        <text:p text:style-name="P15"><text:span text:style-name="T10"/></text:p>
                      </text:list-item>
                    </text:list>
                  </text:list-item>
                  <text:list-item>
                    <text:p xml:id="id228" text:id="id228" text:style-name="P15"><text:span text:style-name="T94">Rückgabe von mehreren Variablen gleichzeitig möglich</text:span></text:p>
                    <text:list>
                      <text:list-item>
                        <text:p xml:id="id229" text:id="id229" text:style-name="P15"><text:span text:style-name="T18">return x, y, z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_ 3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5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3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11"><text:span text:style-name="T9">Check if </text:span><text:span text:style-name="T9">time &gt; </text:span><text:span text:style-name="T9">15 </text:span><text:span text:style-name="T9">minutes</text:span><text:span text:style-name="T9">!</text:span></text:p>
            </draw:text-box>
          </draw:frame>
        </presentation:notes>
      </draw:page>
      <draw:page draw:name="page42" draw:style-name="dp1" draw:master-page-name="Titel_20_und_20_Inhalt_5f_">
        <office:forms form:automatic-focus="false" form:apply-design-mode="false"/>
        <draw:frame draw:name="Titel 1_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6): </text:span><text:span text:style-name="T1">Argu</text:span><text:span text:style-name="T1">ment</text:span><text:span text:style-name="T1">s</text:span></text:p>
          </draw:text-box>
        </draw:frame>
        <draw:frame draw:name="Inhaltsplatzhalter 8_ 5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31" text:id="id231" text:style-name="P83"><text:span text:style-name="T2">Argument-Typen bei Übergabe von Werten:</text:span></text:p>
                    <text:list>
                      <text:list-item>
                        <text:p xml:id="id232" text:id="id232" text:style-name="P29"><text:span text:style-name="T102">Positional Arguments</text:span></text:p>
                        <text:list>
                          <text:list-item>
                            <text:p xml:id="id233" text:id="id233" text:style-name="P62"><text:span text:style-name="T2">Identifiziert durch Position</text:span></text:p>
                          </text:list-item>
                        </text:list>
                      </text:list-item>
                      <text:list-item>
                        <text:p xml:id="id234" text:id="id234" text:style-name="P29"><text:span text:style-name="T103">Keyword Arguments</text:span></text:p>
                        <text:list>
                          <text:list-item>
                            <text:p xml:id="id235" text:id="id235" text:style-name="P62"><text:span text:style-name="T2">Identifiziert durch 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_ 5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6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5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1" draw:text-style-name="P72" xml:id="id230" draw:id="id230" draw:layer="layout" svg:width="32.591cm" svg:height="4.723cm" svg:x="1.699cm" svg:y="13.716cm">
          <draw:text-box>
            <text:p><text:span text:style-name="T63">def</text:span><text:span text:style-name="T19"> say_name(first, last):</text:span></text:p>
            <text:p><text:span text:style-name="T19"><text:s text:c="4"/></text:span><text:span text:style-name="T19">print(f'Firstname is {first}, surname is {last}.')</text:span></text:p>
            <text:p><text:span text:style-name="T19"><text:s text:c="4"/></text:span><text:span text:style-name="T19">print(f'I live in Austria.')</text:span></text:p>
            <text:p text:style-name="P84"><text:span text:style-name="T104">say_name(</text:span><text:span text:style-name="T105">'Martina'</text:span><text:span text:style-name="T104">, </text:span><text:span text:style-name="T106">last='Musterfrau</text:span><text:span text:style-name="T107">'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el_20_und_20_Inhalt_5f_">
        <office:forms form:automatic-focus="false" form:apply-design-mode="false"/>
        <draw:frame draw:name="Titel 1_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6): </text:span><text:span text:style-name="T1">Argu</text:span><text:span text:style-name="T1">ment</text:span><text:span text:style-name="T1">s</text:span></text:p>
          </draw:text-box>
        </draw:frame>
        <draw:frame draw:name="Inhaltsplatzhalter 8_ 6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36" text:id="id236" text:style-name="P83"><text:span text:style-name="T2">Argument-Typen bei Übergabe von Werten:</text:span></text:p>
                    <text:list>
                      <text:list-item>
                        <text:p xml:id="id237" text:id="id237" text:style-name="P29"><text:span text:style-name="T102">Positional Arguments</text:span></text:p>
                        <text:list>
                          <text:list-item>
                            <text:p xml:id="id238" text:id="id238" text:style-name="P62"><text:span text:style-name="T2">Identifiziert durch Position</text:span></text:p>
                          </text:list-item>
                        </text:list>
                      </text:list-item>
                      <text:list-item>
                        <text:p xml:id="id239" text:id="id239" text:style-name="P29"><text:span text:style-name="T103">Keyword Arguments</text:span></text:p>
                        <text:list>
                          <text:list-item>
                            <text:p xml:id="id240" text:id="id240" text:style-name="P62"><text:span text:style-name="T2">Identifiziert durch Name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241" text:id="id241" text:style-name="P16"><text:span text:style-name="T108">Default-Parameter: </text:span><text:span text:style-name="T109">Setzen von Werten für leergelassene Argumente</text:span></text:p>
                  </text:list-item>
                </text:list>
              </text:list-item>
            </text:list>
          </draw:text-box>
        </draw:frame>
        <draw:frame draw:name="Datumsplatzhalter 3_ 6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7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6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1" draw:text-style-name="P72" xml:id="id242" draw:id="id242" draw:layer="layout" svg:width="32.591cm" svg:height="4.723cm" svg:x="1.699cm" svg:y="13.716cm">
          <draw:text-box>
            <text:p><text:span text:style-name="T63">def</text:span><text:span text:style-name="T19"> say_name(first, last, </text:span><text:span text:style-name="T110">country='Austria'</text:span><text:span text:style-name="T19">):</text:span></text:p>
            <text:p><text:span text:style-name="T19"><text:s text:c="4"/></text:span><text:span text:style-name="T19">print(f'Firstname is {first}, surname is {last}.')</text:span></text:p>
            <text:p><text:span text:style-name="T19"><text:s text:c="4"/></text:span><text:span text:style-name="T19">print(f'I live in {country}.')</text:span></text:p>
            <text:p text:style-name="P84"><text:span text:style-name="T104">say_name(</text:span><text:span text:style-name="T105">'Martina'</text:span><text:span text:style-name="T104">, </text:span><text:span text:style-name="T106">last='Musterfrau</text:span><text:span text:style-name="T107">'</text:span><text:span text:style-name="T19">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el_20_und_20_Inhalt_5f_">
        <office:forms form:automatic-focus="false" form:apply-design-mode="false"/>
        <draw:frame draw:name="Titel 1_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7): </text:span><text:span text:style-name="T1">Beisp</text:span><text:span text:style-name="T1">iele </text:span><text:span text:style-name="T1">für </text:span><text:span text:style-name="T1">valide </text:span><text:span text:style-name="T1">Aufru</text:span><text:span text:style-name="T1">fe</text:span></text:p>
          </draw:text-box>
        </draw:frame>
        <draw:frame draw:name="Datumsplatzhalter 3_ 7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8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7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2" draw:text-style-name="P85" draw:layer="layout" svg:width="33.353cm" svg:height="14.8cm" svg:x="2.008cm" svg:y="3.302cm">
          <draw:text-box>
            <text:p xml:id="id244" text:id="id244"><text:span text:style-name="T111">def</text:span><text:span text:style-name="T112"> say_name(first, last, country='Austria')</text:span><text:span text:style-name="T111">:</text:span></text:p>
            <text:p xml:id="id245" text:id="id245" text:style-name="P84"><text:span text:style-name="T112"><text:s text:c="4"/></text:span><text:span text:style-name="T112">print(f'Firstname is {first}, surname is {last}.')</text:span></text:p>
            <text:p xml:id="id246" text:id="id246"><text:span text:style-name="T112"><text:s text:c="4"/></text:span><text:span text:style-name="T112">print(f'I live in {country}.')</text:span></text:p>
            <text:p><text:span text:style-name="T113"/></text:p>
            <text:p xml:id="id247" text:id="id247"><text:span text:style-name="T112"># Passing arguments by position</text:span></text:p>
            <text:p xml:id="id248" text:id="id248"><text:span text:style-name="T112">say_name('Max', 'Muster') <text:s text:c="11"/></text:span></text:p>
            <text:p xml:id="id249" text:id="id249"><text:span text:style-name="T112">say_name('Maria', 'Muster', 'Germany')</text:span></text:p>
            <text:p><text:span text:style-name="T112"/></text:p>
            <text:p xml:id="id250" text:id="id250"><text:span text:style-name="T112"># Passing arguments using keyword specification</text:span></text:p>
            <text:p xml:id="id251" text:id="id251"><text:span text:style-name="T112">say_name(first='Max', last='Muster')</text:span></text:p>
            <text:p xml:id="id252" text:id="id252" text:style-name="P84"><text:span text:style-name="T112">say_name(country='Germany', first='Maria', last='Muster')</text:span></text:p>
            <text:p text:style-name="P84"><text:span text:style-name="T112"/></text:p>
            <text:p xml:id="id253" text:id="id253" text:style-name="P84"><text:span text:style-name="T112"># Mix of both</text:span></text:p>
            <text:p xml:id="id254" text:id="id254" text:style-name="P84"><text:span text:style-name="T112">say_name('Maria', country='Germany', last='Muster')</text:span></text:p>
          </draw:text-box>
        </draw:frame>
        <draw:line draw:style-name="gr53" draw:text-style-name="P56" xml:id="id243" draw:id="id243" draw:layer="layout" svg:x1="2.54cm" svg:y1="6.828cm" svg:x2="32.004cm" svg:y2="6.82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el_20_und_20_Inhalt_5f_">
        <office:forms form:automatic-focus="false" form:apply-design-mode="false"/>
        <draw:frame draw:name="Titel 1_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8): </text:span><text:span text:style-name="T1">Argu</text:span><text:span text:style-name="T1">ment </text:span><text:span text:style-name="T1">Error</text:span><text:span text:style-name="T1">s</text:span></text:p>
          </draw:text-box>
        </draw:frame>
        <draw:frame draw:name="Inhaltsplatzhalter 8_ 7" presentation:style-name="pr8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255" text:id="id255" text:style-name="P86"><text:span text:style-name="T2">Verwechseln von Argument-Reihenfolge</text:span></text:p>
                  </text:list-item>
                  <text:list-item>
                    <text:p xml:id="id256" text:id="id256" text:style-name="P87"><text:span text:style-name="T2">Typo (Tippfehler) in Zuweisung der Keyword-Arguments</text:span></text:p>
                  </text:list-item>
                  <text:list-item>
                    <text:p xml:id="id257" text:id="id257" text:style-name="P87"><text:span text:style-name="T2">Falsche Anzahl an Argumenten (</text:span><text:span text:style-name="T25">TypeError</text:span><text:span text:style-name="T2">)</text:span></text:p>
                  </text:list-item>
                  <text:list-item>
                    <text:p xml:id="id258" text:id="id258" text:style-name="P87"><text:span text:style-name="T2">Positional Argument nach Keyword Argument</text:span></text:p>
                  </text:list-item>
                  <text:list-item>
                    <text:p xml:id="id259" text:id="id259" text:style-name="P87"><text:span text:style-name="T2">Falscher Datentyp für Argument</text:span></text:p>
                  </text:list-item>
                  <text:list-item>
                    <text:p xml:id="id260" text:id="id260" text:style-name="P87"><text:span text:style-name="T2">...</text:span></text:p>
                  </text:list-item>
                </text:list>
              </text:list-item>
            </text:list>
          </draw:text-box>
        </draw:frame>
        <draw:frame draw:name="Datumsplatzhalter 3_ 8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9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8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7" draw:text-style-name="P13" draw:layer="layout" svg:width="17.271cm" svg:height="12.572cm" svg:x="2.159cm" svg:y="13.271cm" presentation:class="notes">
            <draw:text-box>
              <text:p text:style-name="P86"><text:span text:style-name="T2">Verwe</text:span><text:span text:style-name="T2">chseln </text:span><text:span text:style-name="T2">von </text:span><text:span text:style-name="T2">Argum</text:span><text:span text:style-name="T2">ent-</text:span><text:span text:style-name="T2">Reihen</text:span><text:span text:style-name="T2">folge</text:span></text:p>
              <text:p text:style-name="P87"><text:span text:style-name="T2">Typo </text:span><text:span text:style-name="T2">in </text:span><text:span text:style-name="T2">Keywo</text:span><text:span text:style-name="T2">rd-</text:span><text:span text:style-name="T2">Argum</text:span><text:span text:style-name="T2">ents</text:span></text:p>
              <text:p text:style-name="P87"><text:span text:style-name="T2">Falsch</text:span><text:span text:style-name="T2">e </text:span><text:span text:style-name="T2">Anzahl </text:span><text:span text:style-name="T2">an </text:span><text:span text:style-name="T2">Argum</text:span><text:span text:style-name="T2">enten </text:span><text:span text:style-name="T2">(</text:span><text:span text:style-name="T25">Type</text:span><text:span text:style-name="T25">Error</text:span><text:span text:style-name="T2">)</text:span></text:p>
              <text:p text:style-name="P87"><text:span text:style-name="T2">Positio</text:span><text:span text:style-name="T2">nal </text:span><text:span text:style-name="T2">Argum</text:span><text:span text:style-name="T2">ent </text:span><text:span text:style-name="T2">nach </text:span><text:span text:style-name="T2">Keywo</text:span><text:span text:style-name="T2">rd </text:span><text:span text:style-name="T2">Argum</text:span><text:span text:style-name="T2">ent</text:span></text:p>
              <text:p text:style-name="P87"><text:span text:style-name="T2">Falsch</text:span><text:span text:style-name="T2">er </text:span><text:span text:style-name="T2">Datent</text:span><text:span text:style-name="T2">yp für </text:span><text:span text:style-name="T2">Argum</text:span><text:span text:style-name="T2">ent</text:span></text:p>
              <text:p><text:span text:style-name="T2">...</text:span></text:p>
            </draw:text-box>
          </draw:frame>
        </presentation:notes>
      </draw:page>
      <draw:page draw:name="page46" draw:style-name="dp1" draw:master-page-name="Titel_20_und_20_Inhalt_5f_">
        <office:forms form:automatic-focus="false" form:apply-design-mode="false"/>
        <draw:frame draw:name="Titel 1_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</text:span><text:span text:style-name="T1">ions </text:span><text:span text:style-name="T1">(9): </text:span><text:span text:style-name="T1">Argu</text:span><text:span text:style-name="T1">ment </text:span><text:span text:style-name="T1">Error</text:span><text:span text:style-name="T1">s </text:span><text:span text:style-name="T1">(Beis</text:span><text:span text:style-name="T1">piele)</text:span></text:p>
          </draw:text-box>
        </draw:frame>
        <draw:frame draw:name="Datumsplatzhalter 3_ 9" presentation:style-name="pr3" draw:text-style-name="P6" draw:layer="layout" svg:width="32.542cm" svg:height="0.607cm" svg:x="2.446cm" svg:y="19.474cm" presentation:class="date-time" presentation:user-transformed="true">
          <draw:text-box>
            <text:p text:style-name="P5"><text:span text:style-name="T5">Thorsten </text:span><text:span text:style-name="T5">Ruprechter</text:span></text:p>
          </draw:text-box>
        </draw:frame>
        <draw:frame draw:name="Fußzeilenplatzhalter 4_ 10" presentation:style-name="pr3" draw:text-style-name="P6" draw:layer="layout" svg:width="32.542cm" svg:height="0.607cm" svg:x="2.446cm" svg:y="18.839cm" presentation:class="footer" presentation:user-transformed="true">
          <draw:text-box>
            <text:p text:style-name="P5"><text:span text:style-name="T8">Informatik </text:span><text:span text:style-name="T8">BW</text:span></text:p>
          </draw:text-box>
        </draw:frame>
        <draw:frame draw:name="Foliennummernplatzhalter 5_ 9" presentation:style-name="pr4" draw:text-style-name="P8" draw:layer="layout" svg:width="1.696cm" svg:height="1.705cm" svg:x="-0.025cm" svg:y="1.174cm" presentation:class="page-number" presentation:user-transformed="true">
          <draw:text-box>
            <text:p text:style-name="P7"><text:span text:style-name="T6"><text:page-number>&lt;Foliennummer&gt;</text:page-number></text:span></text:p>
          </draw:text-box>
        </draw:frame>
        <draw:frame draw:style-name="gr54" draw:text-style-name="P85" draw:layer="layout" svg:width="33.353cm" svg:height="15.143cm" svg:x="2.007cm" svg:y="4.318cm">
          <draw:text-box>
            <text:p xml:id="id262" text:id="id262"><text:span text:style-name="T111">def</text:span><text:span text:style-name="T112"> say_name(first, last, country='Austria')</text:span><text:span text:style-name="T111">:</text:span></text:p>
            <text:p xml:id="id263" text:id="id263" text:style-name="P84"><text:span text:style-name="T112"><text:s text:c="4"/></text:span><text:span text:style-name="T112">print(f'Firstname is {first}, surname is {last}.')</text:span></text:p>
            <text:p xml:id="id264" text:id="id264"><text:span text:style-name="T112"><text:s text:c="4"/></text:span><text:span text:style-name="T112">print(f'I live in {country}.')</text:span></text:p>
            <text:p><text:span text:style-name="T112"/></text:p>
            <text:p xml:id="id265" text:id="id265"><text:span text:style-name="T112">say_name('Max')</text:span></text:p>
            <text:p xml:id="id266" text:id="id266"><text:span text:style-name="T112"><text:s text:c="2"/></text:span><text:span text:style-name="T113"># </text:span><text:span text:style-name="T114">TypeError: say_name() missing 1 required positional argument: 'last_name'</text:span></text:p>
            <text:p xml:id="id267" text:id="id267"><text:span text:style-name="T112">say_name('Austria', 'Muster', 'Max</text:span><text:span text:style-name="T115">')</text:span></text:p>
            <text:p xml:id="id268" text:id="id268"><text:span text:style-name="T115"><text:s text:c="2"/></text:span><text:span text:style-name="T116"># </text:span><text:span text:style-name="T117">Kein Fehler in Ausführung, aber: “Logischer Fehler”</text:span></text:p>
            <text:p xml:id="id269" text:id="id269"><text:span text:style-name="T112">say_name(fs='Max', last='Muster')</text:span></text:p>
            <text:p xml:id="id270" text:id="id270"><text:span text:style-name="T112"><text:s text:c="2"/></text:span><text:span text:style-name="T118"># </text:span><text:span text:style-name="T119">TypeError: say_name() got an unexpected keyword argument 'fs'</text:span></text:p>
            <text:p xml:id="id271" text:id="id271" text:style-name="P84"><text:span text:style-name="T112">say_name(first='Max', 'Muster')</text:span></text:p>
            <text:p xml:id="id272" text:id="id272"><text:span text:style-name="T112"><text:s text:c="2"/></text:span><text:span text:style-name="T118"># </text:span><text:span text:style-name="T119">SyntaxError: positional argument follows keyword argument</text:span></text:p>
            <text:p><text:span text:style-name="T118"/></text:p>
            <text:p xml:id="id273" text:id="id273"><text:span text:style-name="T118"># There are many more possibilities for errors :-)</text:span></text:p>
          </draw:text-box>
        </draw:frame>
        <draw:line draw:style-name="gr55" draw:text-style-name="P56" xml:id="id261" draw:id="id261" draw:layer="layout" svg:x1="2.54cm" svg:y1="8.128cm" svg:x2="32.004cm" svg:y2="8.12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</text:span><text:span text:style-name="MT2">EN</text:span></text:p>
        <text:p text:style-name="MP8"><text:span text:style-name="MT2">TECH</text:span><text:span text:style-name="MT2">NIK</text:span></text:p>
        <text:p text:style-name="MP8"><text:span text:style-name="MT2">LEID</text:span><text:span text:style-name="MT2">ENSC</text:span><text:span text:style-name="MT2">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</text:span><text:span text:style-name="MT3">ertite</text:span><text:span text:style-name="MT3">lform</text:span><text:span text:style-name="MT3">at </text:span><text:span text:style-name="MT3">bear</text:span><text:span text:style-name="MT3">beite</text:span><text:span text:style-name="MT3">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</text:span><text:span text:style-name="MT5">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</text:span><text:span text:style-name="MT6">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</text:span><text:span text:style-name="MT8">cke</text:span><text:span text:style-name="MT8">n </text:span><text:span text:style-name="MT8">un</text:span><text:span text:style-name="MT8">d </text:span><text:span text:style-name="MT8">ein</text:span><text:span text:style-name="MT8">e </text:span><text:span text:style-name="MT8"><text:line-break/></text:span><text:span text:style-name="MT8">Üb</text:span><text:span text:style-name="MT8">ers</text:span><text:span text:style-name="MT8">chr</text:span><text:span text:style-name="MT8">ift </text:span><text:span text:style-name="MT8">hin</text:span><text:span text:style-name="MT8">zuf</text:span><text:span text:style-name="MT8">üg</text:span><text:span text:style-name="MT8">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</text:span><text:span text:style-name="MT9">n </text:span><text:span text:style-name="MT9">Ruprec</text:span><text:span text:style-name="MT9">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</text:span><text:span text:style-name="MT10">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</text:span><text:span text:style-name="MT3">ertite</text:span><text:span text:style-name="MT3">lform</text:span><text:span text:style-name="MT3">at </text:span><text:span text:style-name="MT3">bear</text:span><text:span text:style-name="MT3">beite</text:span><text:span text:style-name="MT3">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</text:span><text:span text:style-name="MT5">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</text:span><text:span text:style-name="MT6">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</text:span><text:span text:style-name="MT3">ertite</text:span><text:span text:style-name="MT3">lform</text:span><text:span text:style-name="MT3">at </text:span><text:span text:style-name="MT3">bear</text:span><text:span text:style-name="MT3">beite</text:span><text:span text:style-name="MT3">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</text:span><text:span text:style-name="MT5">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</text:span><text:span text:style-name="MT6">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02T14:26:36.851207541</dc:date>
    <meta:editing-cycles>1146</meta:editing-cycles>
    <dc:title>Python Crash Course A</dc:title>
    <meta:editing-duration>P3DT14H23M59S</meta:editing-duration>
    <meta:generator>LibreOffice/24.2.7.2$Linux_X86_64 LibreOffice_project/420$Build-2</meta:generator>
    <meta:print-date>2019-10-08T16:20:18.516837285</meta:print-date>
    <meta:document-statistic meta:object-count="5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