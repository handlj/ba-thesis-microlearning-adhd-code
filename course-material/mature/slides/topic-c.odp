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draw:fill="none" fo:min-height="5.788cm" loext:decorative="false"/>
      <style:paragraph-properties style:writing-mode="lr-tb"/>
    </style:style>
    <style:style style:name="gr3" style:family="graphic" style:parent-style-name="Default_5f_1">
      <style:graphic-properties svg:stroke-color="#3465a4" draw:fill="none" draw:textarea-horizontal-align="justify" draw:textarea-vertical-align="middle" draw:auto-grow-height="false" fo:min-height="1.528cm" fo:min-width="30.026cm" loext:decorative="false"/>
    </style:style>
    <style:style style:name="gr4" style:family="graphic" style:parent-style-name="Default_5f_1">
      <style:graphic-properties svg:stroke-color="#ff1a00" draw:fill="none" draw:textarea-horizontal-align="justify" draw:textarea-vertical-align="middle" draw:auto-grow-height="false" fo:min-height="1.16cm" fo:min-width="14.232cm" loext:decorative="false"/>
    </style:style>
    <style:style style:name="gr5" style:family="graphic" style:parent-style-name="Default_5f_1">
      <style:graphic-properties svg:stroke-color="#18b200" draw:fill="none" draw:textarea-horizontal-align="justify" draw:textarea-vertical-align="middle" draw:auto-grow-height="false" fo:min-height="1.184cm" fo:min-width="17.534cm" loext:decorative="false"/>
    </style:style>
    <style:style style:name="gr6" style:family="graphic" style:parent-style-name="Default_5f_1">
      <style:graphic-properties svg:stroke-color="#ff1a00" draw:fill="none" draw:textarea-horizontal-align="justify" draw:textarea-vertical-align="middle" draw:auto-grow-height="false" fo:min-height="0.637cm" fo:min-width="11.66cm" loext:decorative="false"/>
    </style:style>
    <style:style style:name="gr7" style:family="graphic" style:parent-style-name="Default_5f_1">
      <style:graphic-properties svg:stroke-color="#18b200" draw:fill="none" draw:textarea-horizontal-align="justify" draw:textarea-vertical-align="middle" draw:auto-grow-height="false" fo:min-height="0.582cm" fo:min-width="10.297cm" loext:decorative="false"/>
    </style:style>
    <style:style style:name="gr8" style:family="graphic" style:parent-style-name="Default_5f_1">
      <style:graphic-properties svg:stroke-color="#3465a4" draw:fill="none" draw:textarea-horizontal-align="justify" draw:textarea-vertical-align="middle" draw:auto-grow-height="false" fo:min-height="0.512cm" fo:min-width="9.025cm" loext:decorative="false"/>
    </style:style>
    <style:style style:name="gr9" style:family="graphic" style:parent-style-name="Default_5f_1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007cm" fo:min-width="13.455cm" fo:padding-top="0.075cm" fo:padding-bottom="0.075cm" fo:padding-left="0.2cm" fo:padding-right="0.2cm" loext:decorative="false"/>
    </style:style>
    <style:style style:name="gr10" style:family="graphic" style:parent-style-name="standard">
      <style:graphic-properties draw:stroke="none" draw:fill="solid" draw:fill-color="#e0e0e0" fo:min-height="5.574cm" loext:decorative="false"/>
      <style:paragraph-properties style:writing-mode="lr-tb"/>
    </style:style>
    <style:style style:name="gr11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763cm" fo:min-width="27.44cm" loext:decorative="false"/>
    </style:style>
    <style:style style:name="gr12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846cm" fo:min-width="28.202cm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2.593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10" style:family="paragraph">
      <style:paragraph-properties fo:margin-left="0cm" fo:margin-right="0cm" fo:margin-top="0.398cm" fo:margin-bottom="0.2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e0e0e0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e0e0e0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198cm" fo:margin-bottom="0cm" fo:text-indent="0cm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0pt" style:language-asian="de" style:country-asian="AT" style:font-style-asian="normal" style:font-weight-asian="bold" style:font-name-complex="Droid Sans Devanagari2" style:font-size-complex="20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#e0e0e0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/>
    </style:style>
    <style:style style:name="T2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style:font-name="Courier New" fo:background-color="#e0e0e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0): Basics von for-Schleifen</text:span></text:p>
          </draw:text-box>
        </draw:frame>
        <draw:frame draw:name="Inhaltsplatzhalter 10" presentation:style-name="pr2" draw:text-style-name="P5" draw:layer="layout" svg:width="32.993cm" svg:height="13.897cm" svg:x="2.446cm" svg:y="4.2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Iterieren/Durchlaufen von Sequenzen (z. B. Listen)</text:span></text:p>
                  </text:list-item>
                  <text:list-item>
                    <text:p xml:id="id2" text:id="id2" text:style-name="P3"><text:span text:style-name="T3">FÜR</text:span><text:span text:style-name="T2"> jedes Element </text:span><text:span text:style-name="T3">IN</text:span><text:span text:style-name="T2"> Sequenz</text:span><text:span text:style-name="T3">:</text:span></text:p>
                    <text:p xml:id="id3" text:id="id3" text:style-name="P3"><text:span text:style-name="T2"><text:s text:c="5"/></text:span><text:span text:style-name="T2">Führe Anweisungen aus</text:span></text:p>
                    <text:p text:style-name="P3"><text:span text:style-name="T2"/></text:p>
                  </text:list-item>
                  <text:list-item>
                    <text:p xml:id="id4" text:id="id4" text:style-name="P3"><text:span text:style-name="T3">Python-Syntax für for-Loops (Schleifen):</text:span></text:p>
                    <text:list>
                      <text:list-header>
                        <text:p xml:id="id5" text:id="id5" text:style-name="P4"><text:span text:style-name="T4">for</text:span><text:span text:style-name="T5"> item </text:span><text:span text:style-name="T4">in</text:span><text:span text:style-name="T5"> list_of_items</text:span><text:span text:style-name="T4">:</text:span></text:p>
                        <text:p xml:id="id6" text:id="id6" text:style-name="P4"><text:span text:style-name="T5"><text:s text:c="4"/></text:span><text:span text:style-name="T5">print('This will be repeated.')</text:span></text:p>
                        <text:p text:style-name="P4"><text:span text:style-name="T6"/></text:p>
                      </text:list-header>
                    </text:list>
                  </text:list-item>
                  <text:list-item>
                    <text:p xml:id="id7" text:id="id7" text:style-name="P4"><text:span text:style-name="T2">Laufvariablen können beliebigen Namen haben</text:span></text:p>
                  </text:list-item>
                  <text:list-item>
                    <text:p xml:id="id8" text:id="id8" text:style-name="P4"><text:span text:style-name="T2">Wiederholter Code-Block mit beliebig vielen Anweisungen</text:span></text:p>
                  </text:list-item>
                </text:list>
              </text:list-item>
            </text:list>
          </draw:text-box>
        </draw:frame>
        <draw:frame draw:name="Foliennummernplatzhalter 9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1): Beispiel</text:span></text:p>
          </draw:text-box>
        </draw:frame>
        <draw:frame draw:name="Inhaltsplatzhalter 11" presentation:style-name="pr5" draw:text-style-name="P9" draw:layer="layout" svg:width="32.993cm" svg:height="6.096cm" svg:x="2.046cm" svg:y="7.11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5">lectures = ['Maths', 'English', 'Computer Science']</text:span></text:p>
                    <text:p text:style-name="P3"><text:span text:style-name="T5"/></text:p>
                    <text:p text:style-name="P3"><text:span text:style-name="T4">for</text:span><text:span text:style-name="T5"> lecture </text:span><text:span text:style-name="T4">in</text:span><text:span text:style-name="T5"> lectures:</text:span></text:p>
                    <text:p text:style-name="P3"><text:span text:style-name="T5"><text:s text:c="4"/></text:span><text:span text:style-name="T4">print(</text:span><text:span text:style-name="T5">f'I love {lecture}'</text:span><text:span text:style-name="T4">)</text:span></text:p>
                  </text:list-header>
                </text:list>
              </text:list-item>
            </text:list>
          </draw:text-box>
        </draw:frame>
        <draw:frame draw:name="Foliennummernplatzhalter 10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ausgabe des aktuellen Werts in Variable lecture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Inhaltsplatzhalter 13" presentation:style-name="pr2" draw:text-style-name="P5" draw:layer="layout" svg:width="32.993cm" svg:height="13.897cm" svg:x="1.6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8">lectures</text:span><text:span text:style-name="T5"> = ['Maths', 'English', 'Computer Science']</text:span></text:p>
                    <text:p text:style-name="P3"><text:span text:style-name="T5"/></text:p>
                    <text:p text:style-name="P10"><text:span text:style-name="T4">for</text:span><text:span text:style-name="T5"> </text:span><text:span text:style-name="T9">lecture</text:span><text:span text:style-name="T5"> </text:span><text:span text:style-name="T4">in</text:span><text:span text:style-name="T5"> </text:span><text:span text:style-name="T8">lectures</text:span><text:span text:style-name="T5">:</text:span></text:p>
                    <text:p text:style-name="P10"><text:span text:style-name="T5"><text:s text:c="4"/></text:span><text:span text:style-name="T4">print(</text:span><text:span text:style-name="T5">f'I love {</text:span><text:span text:style-name="T9">lecture</text:span><text:span text:style-name="T5">}'</text:span><text:span text:style-name="T4">)</text:span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12" xml:id="id12" draw:id="id12" draw:layer="layout" svg:width="13.716cm" svg:height="6.038cm" svg:x="21.823cm" svg:y="11.976cm">
          <draw:text-box>
            <text:p text:style-name="P11"><text:span text:style-name="T10">Legende</text:span></text:p>
            <text:p text:style-name="P11"><text:span text:style-name="T11">Iterierte Sequenz (z. B. Liste)</text:span></text:p>
            <text:p text:style-name="P11"><text:span text:style-name="T12">Definition der Sequenz</text:span></text:p>
            <text:p text:style-name="P11"><text:span text:style-name="T12">for-Loop Definition (Syntax)</text:span></text:p>
            <text:p text:style-name="P11"><text:span text:style-name="T12">Wiederholter Code-Block</text:span></text:p>
            <text:p text:style-name="P11"><text:span text:style-name="T13">Lauf-/Schleifen-Variable</text:span></text:p>
          </draw:text-box>
        </draw:frame>
        <draw:frame draw:name="Titel 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2): Beispiel</text:span></text:p>
          </draw:text-box>
        </draw:frame>
        <draw:frame draw:name="Foliennummernplatzhalter 13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draw:custom-shape draw:style-name="gr3" draw:text-style-name="P13" xml:id="id9" draw:id="id9" draw:layer="layout" svg:width="30.526cm" svg:height="1.778cm" svg:x="2.502cm" svg:y="7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xml:id="id10" draw:id="id10" draw:layer="layout" svg:width="14.732cm" svg:height="1.41cm" svg:x="2.502cm" svg:y="10.6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xml:id="id11" draw:id="id11" draw:layer="layout" svg:width="18.034cm" svg:height="1.434cm" svg:x="2.502cm" svg:y="12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13" draw:id="id13" draw:layer="layout" svg:width="12.16cm" svg:height="0.887cm" svg:x="21.93cm" svg:y="14.9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14" draw:id="id14" draw:layer="layout" svg:width="10.797cm" svg:height="0.832cm" svg:x="21.923cm" svg:y="16.0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5" draw:id="id15" draw:layer="layout" svg:width="9.525cm" svg:height="0.762cm" svg:x="21.94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16" draw:id="id16" draw:layer="layout" svg:width="13.855cm" svg:height="6.157cm" svg:x="21.644cm" svg:y="12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93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Code-Block, der in jedem durchlauf ausgegeben wird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3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0): Basics</text:span></text:p>
          </draw:text-box>
        </draw:frame>
        <draw:frame draw:name="Inhaltsplatzhalter 31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7" text:id="id17" text:style-name="P14"><text:span text:style-name="T14">Ausführen von Anweisungen bis Bedingung nicht mehr erfüllt</text:span></text:p>
                    <text:list>
                      <text:list-item>
                        <text:p xml:id="id18" text:id="id18" text:style-name="P15"><text:span text:style-name="T14">„</text:span><text:span text:style-name="T14">Solange Bedingung erfüllt, führe Anweisungen aus“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xml:id="id19" text:id="id19" text:style-name="P16"><text:span text:style-name="T15">SOLANGE</text:span><text:span text:style-name="T14"> </text:span><text:span text:style-name="T16">Bedingung erfüllt</text:span><text:span text:style-name="T15">:</text:span></text:p>
                    <text:p xml:id="id20" text:id="id20" text:style-name="P16"><text:span text:style-name="T14"><text:s text:c="4"/></text:span><text:span text:style-name="T16">Führe Anweisungen aus</text:span></text:p>
                    <text:p text:style-name="P3"><text:span text:style-name="T2"/></text:p>
                  </text:list-item>
                  <text:list-item>
                    <text:p xml:id="id21" text:id="id21" text:style-name="P3"><text:span text:style-name="T3">Python-Syntax:</text:span></text:p>
                    <text:list>
                      <text:list-header>
                        <text:p xml:id="id22" text:id="id22" text:style-name="P14"><text:span text:style-name="T4">while</text:span><text:span text:style-name="T5"> </text:span><text:span text:style-name="T17">condition</text:span><text:span text:style-name="T4">:</text:span></text:p>
                        <text:p xml:id="id23" text:id="id23" text:style-name="P14"><text:span text:style-name="T5"><text:s text:c="4"/></text:span><text:span text:style-name="T5">print('Running')</text:span></text:p>
                        <text:p text:style-name="P4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37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draw:frame draw:style-name="gr10" draw:text-style-name="P17" xml:id="id24" draw:id="id24" draw:layer="layout" svg:width="8.382cm" svg:height="5.824cm" svg:x="27.178cm" svg:y="12.392cm">
          <draw:text-box>
            <text:p><text:span text:style-name="T2">x = 0</text:span></text:p>
            <text:p><text:span text:style-name="T18">while</text:span><text:span text:style-name="T19"> x &lt; 3</text:span><text:span text:style-name="T18">:</text:span></text:p>
            <text:p><text:span text:style-name="T19"><text:s text:c="4"/></text:span><text:span text:style-name="T19">print(x)</text:span></text:p>
            <text:p><text:span text:style-name="T19"><text:s text:c="4"/></text:span><text:span text:style-name="T19">x = x + 1</text:span></text:p>
            <text:p><text:span text:style-name="T19">print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>
            <draw:text-box>
              <text:p text:style-name="P18">Tafel danach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custom-shape draw:style-name="gr11" draw:text-style-name="P19" xml:id="id31" draw:id="id31" draw:layer="layout" svg:width="27.94cm" svg:height="6.013cm" svg:x="3.202cm" svg:y="11.43cm">
          <text:p/>
          <draw:enhanced-geometry svg:viewBox="0 0 21600 21600" draw:type="rectangle" draw:enhanced-path="M 0 0 L 21600 0 21600 21600 0 21600 0 0 Z N"/>
        </draw:custom-shape>
        <draw:frame draw:name="Titel 3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1): Kombination mit User-Input</text:span></text:p>
          </draw:text-box>
        </draw:frame>
        <draw:frame draw:name="Inhaltsplatzhalter 32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5" text:id="id25" text:style-name="P3"><text:span text:style-name="T2">Möglichkeit: Ausführen bis spezieller Input</text:span></text:p>
                    <text:p text:style-name="P3"><text:span text:style-name="T2"/></text:p>
                  </text:list-item>
                  <text:list-item>
                    <text:p xml:id="id26" text:id="id26" text:style-name="P3"><text:span text:style-name="T14">Kontrolle durch </text:span><text:span text:style-name="T2">Bedingungen oder „Flags“ (= Boolean-Variable) </text:span></text:p>
                    <text:p text:style-name="P3"><text:span text:style-name="T2"/></text:p>
                    <text:p xml:id="id27" text:id="id27" text:style-name="P3"><text:span text:style-name="T5">user_input = ''</text:span></text:p>
                    <text:p xml:id="id28" text:id="id28" text:style-name="P3"><text:span text:style-name="T18">while</text:span><text:span text:style-name="T19"> user_input != 'quit':</text:span></text:p>
                    <text:p xml:id="id29" text:id="id29" text:style-name="P3"><text:span text:style-name="T5"><text:s text:c="4"/></text:span><text:span text:style-name="T19">user_input = </text:span><text:span text:style-name="T18">input(</text:span><text:span text:style-name="T19">'What are you saying?'</text:span><text:span text:style-name="T18">) </text:span></text:p>
                    <text:p xml:id="id30" text:id="id30" text:style-name="P3"><text:span text:style-name="T5"><text:s text:c="4"/></text:span><text:span text:style-name="T4">print(</text:span><text:span text:style-name="T5">user_</text:span><text:span text:style-name="T19">input</text:span><text:span text:style-name="T18">)</text:span></text:p>
                  </text:list-item>
                </text:list>
              </text:list-item>
            </text:list>
          </draw:text-box>
        </draw:frame>
        <draw:frame draw:name="Foliennummernplatzhalter 38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Danach: Programmierbeispiel</text:p>
            </draw:text-box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custom-shape draw:style-name="gr12" draw:text-style-name="P19" xml:id="id35" draw:id="id35" draw:layer="layout" svg:width="28.702cm" svg:height="6.096cm" svg:x="3.256cm" svg:y="11.176cm">
          <text:p/>
          <draw:enhanced-geometry svg:viewBox="0 0 21600 21600" draw:type="rectangle" draw:enhanced-path="M 0 0 L 21600 0 21600 21600 0 21600 0 0 Z N"/>
        </draw:custom-shape>
        <draw:frame draw:name="Titel 3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2): Endlosschleifen (Infinite Loops)</text:span></text:p>
          </draw:text-box>
        </draw:frame>
        <draw:frame draw:name="Inhaltsplatzhalter 33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6"><text:span text:style-name="T14">Programm läuft unendlich</text:span></text:p>
                    <text:list>
                      <text:list-item>
                        <text:p xml:id="id33" text:id="id33" text:style-name="P16"><text:span text:style-name="T20">while</text:span><text:span text:style-name="T21"> True</text:span></text:p>
                      </text:list-item>
                    </text:list>
                  </text:list-item>
                  <text:list-item>
                    <text:p xml:id="id34" text:id="id34" text:style-name="P16"><text:span text:style-name="T14">Abbruchbedingung durch </text:span><text:span text:style-name="T21">break</text:span></text:p>
                    <text:p text:style-name="P3"><text:span text:style-name="T2"/></text:p>
                    <text:p xml:id="id36" text:id="id36" text:style-name="P14"><text:span text:style-name="T20">while</text:span><text:span text:style-name="T21"> True:</text:span></text:p>
                    <text:p xml:id="id37" text:id="id37" text:style-name="P14"><text:span text:style-name="T21"><text:s text:c="4"/></text:span><text:span text:style-name="T21">user_input = </text:span><text:span text:style-name="T20">input(</text:span><text:span text:style-name="T21">'What are you saying?'</text:span><text:span text:style-name="T20">)</text:span><text:span text:style-name="T21"> </text:span></text:p>
                    <text:p xml:id="id38" text:id="id38" text:style-name="P14"><text:span text:style-name="T21"><text:s text:c="4"/></text:span><text:span text:style-name="T20">print(</text:span><text:span text:style-name="T21">user_input</text:span><text:span text:style-name="T20">)</text:span></text:p>
                    <text:p xml:id="id39" text:id="id39" text:style-name="P14"><text:span text:style-name="T21"><text:s text:c="4"/></text:span><text:span text:style-name="T20">if</text:span><text:span text:style-name="T21"> user_input == 'quit':</text:span></text:p>
                    <text:p xml:id="id40" text:id="id40" text:style-name="P14"><text:span text:style-name="T21"><text:s text:c="6"/></text:span><text:span text:style-name="T20">break</text:span></text:p>
                  </text:list-item>
                </text:list>
              </text:list-item>
            </text:list>
          </draw:text-box>
        </draw:frame>
        <draw:frame draw:name="Foliennummernplatzhalter 39" presentation:style-name="pr3" draw:text-style-name="P20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1" draw:layer="layout" svg:width="17.271cm" svg:height="12.572cm" svg:x="2.159cm" svg:y="13.271cm" presentation:class="notes">
            <draw:text-box>
              <text:p text:style-name="P18"><text:span text:style-name="T22">True =&gt; 1==1</text:span></text:p>
            </draw:text-box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ops: Keywords zum Schleifen- und Programmablauf</text:span></text:p>
          </draw:text-box>
        </draw:frame>
        <draw:frame draw:name="Inhaltsplatzhalter 5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 text:style-name="P3"><text:span text:style-name="T23">pass</text:span></text:p>
                    <text:list>
                      <text:list-item>
                        <text:p xml:id="id42" text:id="id42" text:style-name="P4"><text:span text:style-name="T2">„</text:span><text:span text:style-name="T2">leerer“ Command, tut nichts</text:span><text:span text:style-name="T2"><text:line-break/></text:span><text:span text:style-name="T2"/></text:p>
                      </text:list-item>
                    </text:list>
                  </text:list-item>
                  <text:list-item>
                    <text:p xml:id="id43" text:id="id43" text:style-name="P22"><text:span text:style-name="T24">break</text:span></text:p>
                    <text:list>
                      <text:list-item>
                        <text:p xml:id="id44" text:id="id44" text:style-name="P4"><text:span text:style-name="T2">Schleifenabbruch</text:span></text:p>
                      </text:list-item>
                      <text:list-item>
                        <text:p xml:id="id45" text:id="id45" text:style-name="P4"><text:span text:style-name="T2">Sofortiges Beenden der „innersten Schleife“</text:span><text:span text:style-name="T2"><text:line-break/></text:span><text:span text:style-name="T2"/></text:p>
                      </text:list-item>
                    </text:list>
                  </text:list-item>
                  <text:list-item>
                    <text:p xml:id="id46" text:id="id46" text:style-name="P22"><text:span text:style-name="T24">continue</text:span></text:p>
                    <text:list>
                      <text:list-item>
                        <text:p xml:id="id47" text:id="id47" text:style-name="P4"><text:span text:style-name="T2">Sprung zu nächster Iteration</text:span></text:p>
                      </text:list-item>
                      <text:list-item>
                        <text:p xml:id="id48" text:id="id48" text:style-name="P4"><text:span text:style-name="T2">Abbruch aktueller Durchlauf „innerster Schleife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7" presentation:style-name="pr3" draw:text-style-name="P7" draw:layer="layout" svg:width="1.696cm" svg:height="1.705cm" svg:x="-0.025cm" svg:y="1.174cm" presentation:class="page-number" presentation:user-transformed="true">
          <draw:text-box>
            <text:p text:style-name="P6"><text:span text:style-name="T7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und eine </text:span><text:span text:style-name="MT8"><text:line-break/></text:span><text:span text:style-name="MT8">Überschrift hinzufüg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26T12:27:20.666352198</dc:date>
    <meta:editing-cycles>1150</meta:editing-cycles>
    <dc:title>Python Crash Course A</dc:title>
    <meta:editing-duration>P3DT14H38M33S</meta:editing-duration>
    <meta:generator>LibreOffice/24.2.7.2$Linux_X86_64 LibreOffice_project/420$Build-2</meta:generator>
    <meta:print-date>2019-10-08T16:20:18.516837285</meta:print-date>
    <meta:document-statistic meta:object-count="2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