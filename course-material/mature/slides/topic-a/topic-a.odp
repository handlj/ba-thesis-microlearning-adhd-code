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5f_1">
      <style:graphic-properties loext:decorative="fals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23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5.37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191cm" loext:decorative="false"/>
      <style:paragraph-properties style:writing-mode="lr-tb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4" style:family="presentation" style:parent-style-name="Titel_20_und_20_Inhalt_5f_-outline1" style:list-style-name="L2">
      <style:graphic-properties draw:stroke="none" svg:stroke-width="0cm" draw:fill="solid" draw:fill-color="#d3d3d3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el_20_und_20_Inhalt_5f_-notes">
      <style:graphic-properties draw:fill-color="#ffffff" fo:min-height="19.676cm" loext:decorative="false"/>
      <style:paragraph-properties style:writing-mode="lr-tb"/>
    </style:style>
    <style:style style:name="pr6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7.349cm" style:use-optimal-column-width="false"/>
    </style:style>
    <style:style style:name="co2" style:family="table-column">
      <style:table-column-properties style:column-width="9.871cm" style:use-optimal-column-width="false"/>
    </style:style>
    <style:style style:name="co3" style:family="table-column">
      <style:table-column-properties style:column-width="11.637cm" style:use-optimal-column-width="false"/>
    </style:style>
    <style:style style:name="ro1" style:family="table-row">
      <style:table-row-properties style:row-height="1.1cm" style:use-optimal-row-height="false"/>
    </style:style>
    <style:style style:name="ro2" style:family="table-row">
      <style:table-row-properties style:row-height="1.114cm" style:use-optimal-row-height="false"/>
    </style:style>
    <style:style style:name="ro3" style:family="table-row">
      <style:table-row-properties style:row-height="1.962cm" style:use-optimal-row-height="false"/>
    </style:style>
    <style:style style:name="ro4" style:family="table-row">
      <style:table-row-properties style:row-height="1.174cm" style:use-optimal-row-height="false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style:font-name="Courier New" fo:font-size="20pt" style:font-size-asian="20pt" style:font-size-complex="20pt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d3d3d3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Courier New" fo:font-size="28pt" fo:background-color="transparent" fo:hyphenate="false"/>
    </style:style>
    <style:style style:name="P9" style:family="paragraph">
      <style:paragraph-properties style:writing-mode="lr-tb"/>
    </style:style>
    <style:style style:name="P10" style:family="paragraph">
      <style:paragraph-properties fo:margin-left="0.6cm" fo:margin-right="0cm" fo:text-indent="-0.6cm" style:writing-mode="lr-tb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style:font-name="Courier New" fo:font-size="20pt" style:font-size-asian="20pt" style:font-size-complex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loext:graphic-properties draw:fill="none"/>
      <style:text-properties fo:background-color="#e0e0e0"/>
    </style:style>
    <style:style style:name="P21" style:family="paragraph">
      <loext:graphic-properties draw:fill-color="#ffffff"/>
    </style:style>
    <style:style style:name="P22" style:family="paragraph">
      <style:paragraph-properties fo:margin-top="0.3cm" fo:margin-bottom="0cm" style:punctuation-wrap="hanging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3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ejaVu Sans" style:font-size-asian="28pt" style:language-asian="de" style:country-asian="AT" style:font-style-asian="normal" style:font-weight-asian="normal" style:font-name-complex="DejaVu Sans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ejaVu Sans" style:font-size-asian="28pt" style:language-asian="de" style:country-asian="AT" style:font-style-asian="normal" style:font-weight-asian="normal" style:font-name-complex="DejaVu Sans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Courier New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use-window-font-color="true" loext:opacity="0%" style:font-name="Courier New" fo:font-size="20pt" style:letter-kerning="true" style:font-name-asian="Droid Sans Fallback" style:font-size-asian="20pt" style:font-name-complex="Droid Sans Devanagari2" style:font-size-complex="2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Courier New" fo:background-color="#e0e0e0"/>
    </style:style>
    <style:style style:name="T18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3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size-asian="34pt" style:language-asian="de" style:country-asian="DE" style:font-style-asian="normal" style:font-weight-asian="normal" style:font-name-complex="Droid Sans Devanagari2" style:font-size-complex="3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f0f0f" loext:opacity="100%" style:font-name="Courier New" fo:font-size="28pt" fo:language="de" fo:country="AT" style:font-size-asian="28pt" style:language-asian="de" style:country-asian="AT" style:font-size-complex="28pt" style:language-complex="de" style:country-complex="AT"/>
    </style:style>
    <style:style style:name="T2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language="de" fo:country="AT" fo:font-style="normal" style:text-underline-style="none" fo:font-weight="normal" fo:background-color="transparent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/>
    </style:style>
    <style:style style:name="T28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 presentation:presentation-page-layout-name="AL1T0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ariablen (0)</text:span></text:p>
          </draw:text-box>
        </draw:frame>
        <draw:frame draw:name="Inhaltsplatzhalter 8" presentation:style-name="pr2" draw:text-style-name="P4" draw:layer="layout" svg:width="32.993cm" svg:height="13.897cm" svg:x="2.446cm" svg:y="3.946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 text:style-name="P3"><text:span text:style-name="T2">Label (Etikett) für Werte oder Berechnungen</text:span></text:p>
                    <text:list>
                      <text:list-item>
                        <text:p xml:id="id2" text:id="id2" text:style-name="P3"><text:span text:style-name="T2">„</text:span><text:span text:style-name="T2">Variable referenziert bestimmten Wert“</text:span></text:p>
                      </text:list-item>
                      <text:list-item>
                        <text:p xml:id="id3" text:id="id3" text:style-name="P3"><text:span text:style-name="T2">„</text:span><text:span text:style-name="T2">Platzhalter“</text:span></text:p>
                      </text:list-item>
                    </text:list>
                  </text:list-item>
                  <text:list-item>
                    <text:p xml:id="id5" text:id="id5" text:style-name="P3"><text:span text:style-name="T2">Zuweisung von Werten mit </text:span><text:span text:style-name="T3">=</text:span></text:p>
                    <text:list>
                      <text:list-item>
                        <text:p xml:id="id6" text:id="id6" text:style-name="P3"><text:span text:style-name="T4">&lt;Variablenname&gt;</text:span><text:span text:style-name="T2"> = &lt;Zugewiesener</text:span><text:span text:style-name="T4"> Wert&gt;</text:span></text:p>
                      </text:list-item>
                    </text:list>
                  </text:list-item>
                  <text:list-item>
                    <text:p xml:id="id7" text:id="id7" text:style-name="P3"><text:span text:style-name="T2">Vorübergehendes Speichern von Werten</text:span></text:p>
                    <text:list>
                      <text:list-item>
                        <text:p xml:id="id8" text:id="id8" text:style-name="P3"><text:span text:style-name="T2">„</text:span><text:span text:style-name="T2">Lebensdauer“ bis Programmende</text:span></text:p>
                      </text:list-item>
                    </text:list>
                  </text:list-item>
                  <text:list-item>
                    <text:p xml:id="id9" text:id="id9" text:style-name="P3"><text:span text:style-name="T2">Startwert notwendig, dann beliebig änderbar</text:span></text:p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name="Inhaltsplatzhalter 8" presentation:style-name="pr4" draw:text-style-name="P8" xml:id="id4" draw:id="id4" draw:layer="layout" svg:width="17.244cm" svg:height="3.439cm" svg:x="18.642cm" svg:y="15.11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7"><text:span text:style-name="T6"><text:s/></text:span><text:span text:style-name="T6">number <text:s/>= 123 <text:s text:c="12"/></text:span><text:span text:style-name="T6"><text:line-break/></text:span><text:span text:style-name="T6"> message = 'Hello World!'</text:span></text:p>
                    <text:p text:style-name="P7"><text:span text:style-name="T6"><text:s/></text:span><text:span text:style-name="T6">number2 = number <text:s text:c="6"/>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11" draw:layer="layout" svg:width="17.271cm" svg:height="19.676cm" svg:x="2.159cm" svg:y="13.271cm" presentation:class="notes" presentation:user-transformed="true">
            <draw:text-box>
              <text:p text:style-name="P9"><text:span text:style-name="T7">Analogie: Menschen oder Personen – haben Namen. Die Namen sind nicht die Menschen! aber sie können verwendet werden um auf Menschen zu verweisen. </text:span></text:p>
              <text:p text:style-name="P9"><text:span text:style-name="T7">__</text:span></text:p>
              <text:p text:style-name="P9"><text:span text:style-name="T7">Oft gibt es mehrere Namen (z.b. Spitznamen) um auf eine Person zu verweisen (siehe zum Beispiel spitznamen). Oder auch andere Begriffe für referenzen auf Personen: Z.b.: vortragender = ‘Ruprechter’, my_best_friend = für jeden unterschiedl.</text:span></text:p>
              <text:p text:style-name="P9"><text:span text:style-name="T7">=&gt; Tafel</text:span></text:p>
              <text:p text:style-name="P10"><text:span text:style-name="T7">__</text:span></text:p>
              <text:p text:style-name="P9"><text:span text:style-name="T7">Namen können sich auch ändern – eine Person kann einen bestimmten Namen oder Spitznamen auch nur bestimmte zeit haben.</text:span></text:p>
              <text:p text:style-name="P10"><text:span text:style-name="T7">__</text:span></text:p>
              <text:p text:style-name="P9"><text:span text:style-name="T7">Außerdem hängt die Bedeutung eines Namens je nach Kontext ab: Vortragender = Ruprechter, Physik = ?</text:span></text:p>
              <text:p text:style-name="P9"><text:span text:style-name="T7">___</text:span></text:p>
              <text:p text:style-name="P9"><text:span text:style-name="T7">Anderes Beispiel:</text:span></text:p>
              <text:p text:style-name="P9"><text:span text:style-name="T7">mein_alter = 13</text:span><text:span text:style-name="T7"><text:line-break/></text:span><text:span text:style-name="T7">(ändert sich jedes Jahr)</text:span></text:p>
              <text:p text:style-name="P9"><text:span text:style-name="T7">____</text:span><text:span text:style-name="T7"><text:line-break/></text:span><text:span text:style-name="T7">President! programming</text:span></text:p>
            </draw:text-box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1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Datentypen für Variablen (Auswahl)</text:span></text:p>
          </draw:text-box>
        </draw:frame>
        <draw:frame draw:name="Foliennummernplatzhalter 11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2" draw:layer="layout" svg:width="28.856cm" svg:height="12.881cm" svg:x="3.26cm" svg:y="4.3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8">Datentyp</text:span></text:p>
              </table:table-cell>
              <table:table-cell>
                <text:p text:style-name="P12"><text:span text:style-name="T8">Funktion</text:span></text:p>
              </table:table-cell>
              <table:table-cell>
                <text:p text:style-name="P12"><text:span text:style-name="T8">Beispiele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int</text:span></text:p>
              </table:table-cell>
              <table:table-cell table:style-name="ce3">
                <text:p text:style-name="P14"><text:span text:style-name="T10">ganze Zahlen</text:span></text:p>
              </table:table-cell>
              <table:table-cell>
                <text:p text:style-name="P13"><text:span text:style-name="T9">x = 3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float</text:span></text:p>
              </table:table-cell>
              <table:table-cell table:style-name="ce3">
                <text:p text:style-name="P14"><text:span text:style-name="T10">Fließkommazahlen</text:span></text:p>
              </table:table-cell>
              <table:table-cell>
                <text:p text:style-name="P13"><text:span text:style-name="T9">x = 3.0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bool</text:span></text:p>
              </table:table-cell>
              <table:table-cell table:style-name="ce3">
                <text:p text:style-name="P14"><text:span text:style-name="T10">Boolesche Werte</text:span></text:p>
              </table:table-cell>
              <table:table-cell>
                <text:p text:style-name="P13"><text:span text:style-name="T9">x = True</text:span></text:p>
                <text:p text:style-name="P13"><text:span text:style-name="T9">x = False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str</text:span></text:p>
              </table:table-cell>
              <table:table-cell table:style-name="ce3">
                <text:p text:style-name="P14"><text:span text:style-name="T10">Strings, Zeichenketten</text:span></text:p>
              </table:table-cell>
              <table:table-cell>
                <text:p text:style-name="P13"><text:span text:style-name="T11">x = 'Test</text:span><text:span text:style-name="T9">'</text:span></text:p>
                <text:p text:style-name="P13"><text:span text:style-name="T11">x = "Test"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tuple</text:span></text:p>
              </table:table-cell>
              <table:table-cell table:style-name="ce3">
                <text:p text:style-name="P14"><text:span text:style-name="T10">Tupel</text:span></text:p>
              </table:table-cell>
              <table:table-cell>
                <text:p text:style-name="P13"><text:span text:style-name="T9">x = (1, 2, 3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list</text:span></text:p>
              </table:table-cell>
              <table:table-cell table:style-name="ce3">
                <text:p text:style-name="P14"><text:span text:style-name="T10">Liste</text:span></text:p>
              </table:table-cell>
              <table:table-cell>
                <text:p text:style-name="P13"><text:span text:style-name="T9">x = [1, 2, 3]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dict</text:span></text:p>
              </table:table-cell>
              <table:table-cell table:style-name="ce3">
                <text:p text:style-name="P14"><text:span text:style-name="T10">Dictionary</text:span></text:p>
              </table:table-cell>
              <table:table-cell>
                <text:p text:style-name="P13"><text:span text:style-name="T12">x = {1: 'blue', 2: 'red</text:span><text:span text:style-name="T9">'}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io.TextIOWrapper</text:span></text:p>
              </table:table-cell>
              <table:table-cell table:style-name="ce3">
                <text:p text:style-name="P14"><text:span text:style-name="T10">Dateien</text:span></text:p>
              </table:table-cell>
              <table:table-cell>
                <text:p text:style-name="P13"><text:span text:style-name="T11">x = open('readme.txt</text:span><text:span text:style-name="T12">'</text:span><text:span text:style-name="T9">)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9">...</text:span></text:p>
              </table:table-cell>
              <table:table-cell table:style-name="ce3">
                <text:p text:style-name="P14"><text:span text:style-name="T10">...</text:span></text:p>
              </table:table-cell>
              <table:table-cell>
                <text:p text:style-name="P13"><text:span text:style-name="T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5" draw:layer="layout" svg:width="28.702cm" svg:height="0.962cm" svg:x="3.202cm" svg:y="17.164cm">
          <draw:text-box>
            <text:p><text:span text:style-name="T13">Tabelle 1: Kurze Übersicht einer Auswahl von Datentypen in Python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 text:style-name="P9"><text:span text:style-name="T7">Heute: einfache Datentypen (vier ganz oben)</text:span></text:p>
              <text:p text:style-name="P9"><text:span text:style-name="T7">Danach: Collections : Sammlungen von mehreren Datentypen</text:span></text:p>
              <text:p text:style-name="P9"><text:span text:style-name="T7"/></text:p>
              <text:p text:style-name="P9"><text:span text:style-name="T7">Daten: Temperatur im Jänner</text:span></text:p>
              <text:p text:style-name="P9"><text:span text:style-name="T7">Sammlung: Monatliche Temperaturen 2020</text:span></text:p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Integer &amp; Floating Point Numbers (0):</text:span><text:span text:style-name="T1"><text:line-break/></text:span><text:span text:style-name="T1">Ganzzahlen und Gleitkommazahl</text:span></text:p>
          </draw:text-box>
        </draw:frame>
        <draw:frame draw:name="Inhaltsplatzhalter 8" presentation:style-name="pr2" draw:text-style-name="P4" draw:layer="layout" svg:width="33.915cm" svg:height="13.897cm" svg:x="1.524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 text:style-name="P16"><text:span text:style-name="T14">Integer (Ganzzahlen): </text:span></text:p>
                    <text:list>
                      <text:list-item>
                        <text:p xml:id="id11" text:id="id11" text:style-name="P17"><text:span text:style-name="T15">1</text:span><text:span text:style-name="T16">, </text:span><text:span text:style-name="T17">-13</text:span><text:span text:style-name="T16">, </text:span><text:span text:style-name="T15">15</text:span><text:span text:style-name="T16">, </text:span><text:span text:style-name="T15">-42</text:span><text:span text:style-name="T16">, </text:span><text:span text:style-name="T15">12345</text:span><text:span text:style-name="T16">, ...</text:span></text:p>
                      </text:list-item>
                    </text:list>
                  </text:list-item>
                  <text:list-item>
                    <text:p xml:id="id12" text:id="id12" text:style-name="P18"><text:span text:style-name="T18">Float (Gleitkommazahl)</text:span></text:p>
                    <text:list>
                      <text:list-item>
                        <text:p xml:id="id13" text:id="id13" text:style-name="P17"><text:span text:style-name="T17">1.3</text:span><text:span text:style-name="T18">, </text:span><text:span text:style-name="T15">3.14159</text:span><text:span text:style-name="T18">, </text:span><text:span text:style-name="T19">-42.123</text:span><text:span text:style-name="T18">, …</text:span></text:p>
                        <text:p text:style-name="P17"><text:span text:style-name="T18"/></text:p>
                      </text:list-item>
                    </text:list>
                  </text:list-item>
                  <text:list-item>
                    <text:p xml:id="id14" text:id="id14" text:style-name="P17"><text:span text:style-name="T18">Operationen</text:span></text:p>
                    <text:list>
                      <text:list-item>
                        <text:p xml:id="id15" text:id="id15" text:style-name="P17"><text:span text:style-name="T20">Addieren </text:span><text:span text:style-name="T21">(</text:span><text:span text:style-name="T22">+</text:span><text:span text:style-name="T20">), Subtrahieren </text:span><text:span text:style-name="T21">(</text:span><text:span text:style-name="T22">-</text:span><text:span text:style-name="T20">), Multiplizieren </text:span><text:span text:style-name="T21">(</text:span><text:span text:style-name="T22">*</text:span><text:span text:style-name="T20">), Dividieren </text:span><text:span text:style-name="T18">(</text:span><text:span text:style-name="T15">/</text:span><text:span text:style-name="T18">)</text:span></text:p>
                      </text:list-item>
                      <text:list-item>
                        <text:p xml:id="id18" text:id="id18" text:style-name="P17"><text:span text:style-name="T18">Exponieren (</text:span><text:span text:style-name="T15">**</text:span><text:span text:style-name="T18">)</text:span></text:p>
                      </text:list-item>
                      <text:list-item>
                        <text:p xml:id="id19" text:id="id19" text:style-name="P17"><text:span text:style-name="T18">Modulo Operator (</text:span><text:span text:style-name="T15">%</text:span><text:span text:style-name="T18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4" draw:text-style-name="P20" draw:layer="layout" svg:width="13.208cm" svg:height="2.487cm" svg:x="22.606cm" svg:y="15.901cm">
          <draw:text-box>
            <text:p xml:id="id16" text:id="id16"><text:span text:style-name="T22">number = 5 + 13 <text:s text:c="5"/></text:span></text:p>
            <text:p xml:id="id17" text:id="id17"><text:span text:style-name="T22">number_2 = number +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21" draw:layer="layout" svg:width="17.271cm" svg:height="12.572cm" svg:x="2.159cm" svg:y="13.271cm" presentation:class="notes" presentation:user-transformed="true">
            <draw:text-box>
              <text:p text:style-name="P9">Operatoren</text:p>
              <text:p text:style-name="P9">Tafel: 11 / 2 = 5.5</text:p>
              <text:p text:style-name="P9">11 % 2 = 1</text:p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3">Integer &amp; Floating Point Numbers </text:span><text:span text:style-name="T1">(1):</text:span><text:span text:style-name="T1"><text:line-break/></text:span><text:span text:style-name="T1">Erweiterte Operatoren</text:span></text:p>
          </draw:text-box>
        </draw:frame>
        <draw:frame draw:name="Inhaltsplatzhalter 8" presentation:style-name="pr2" draw:text-style-name="P4" draw:layer="layout" svg:width="32.993cm" svg:height="13.135cm" svg:x="1.705cm" svg:y="4.826cm" presentation:class="outline" presentation:user-transformed="true">
          <draw:text-box>
            <text:list text:style-name="L2">
              <text:list-item>
                <text:list>
                  <text:list-item>
                    <text:p xml:id="id20" text:id="id20" text:style-name="P16"><text:span text:style-name="T14">Grundrechnung mit direkter Zuweisung:</text:span></text:p>
                    <text:list>
                      <text:list-item>
                        <text:p xml:id="id21" text:id="id21" text:style-name="P17"><text:span text:style-name="T14">Addition (</text:span><text:span text:style-name="T15">+=</text:span><text:span text:style-name="T14">), Subtraktion (</text:span><text:span text:style-name="T17">-=</text:span><text:span text:style-name="T14">), Multiplikation (</text:span><text:span text:style-name="T17">*=</text:span><text:span text:style-name="T14">), Division (</text:span><text:span text:style-name="T17">/=</text:span><text:span text:style-name="T14">)</text:span></text:p>
                        <text:p text:style-name="P18"><text:span text:style-name="T24"/></text:p>
                        <text:p text:style-name="P18"><text:span text:style-name="T24"/></text:p>
                      </text:list-item>
                    </text:list>
                    <text:p xml:id="id22" text:id="id22" text:style-name="P18"><text:span text:style-name="T24">number = 42</text:span></text:p>
                    <text:p xml:id="id23" text:id="id23" text:style-name="P18"><text:span text:style-name="T25">number += 8</text:span></text:p>
                    <text:p xml:id="id24" text:id="id24" text:style-name="P18"><text:span text:style-name="T25">number -= 10</text:span></text:p>
                    <text:p xml:id="id25" text:id="id25" text:style-name="P18"><text:span text:style-name="T25">number /= 4</text:span></text:p>
                    <text:p xml:id="id26" text:id="id26" text:style-name="P18"><text:span text:style-name="T25">number *= 2</text:span></text:p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5" draw:text-style-name="P23" draw:layer="layout" svg:width="5.243cm" svg:height="5.623cm" svg:x="17.363cm" svg:y="12.446cm">
          <draw:text-box>
            <text:p text:style-name="P22"><text:span text:style-name="T26"/></text:p>
            <text:p text:style-name="P22"><text:span text:style-name="T26"/></text:p>
            <text:p text:style-name="P22"><text:span text:style-name="T26"/></text:p>
            <text:p text:style-name="P22"><text:span text:style-name="T26"/></text:p>
          </draw:text-box>
        </draw:frame>
        <draw:frame draw:style-name="gr6" draw:text-style-name="P23" draw:layer="layout" svg:width="12.356cm" svg:height="7.441cm" svg:x="21.024cm" svg:y="11.022cm">
          <draw:text-box>
            <text:p xml:id="id27" text:id="id27" text:style-name="P24"><text:span text:style-name="T27">number = 42</text:span></text:p>
            <text:p xml:id="id28" text:id="id28" text:style-name="P24"><text:span text:style-name="T25">number = number + 8 <text:s/></text:span></text:p>
            <text:p xml:id="id29" text:id="id29" text:style-name="P24"><text:span text:style-name="T25">number = number - 10 </text:span></text:p>
            <text:p xml:id="id30" text:id="id30" text:style-name="P24"><text:span text:style-name="T25">number = number / 4 <text:s/></text:span></text:p>
            <text:p xml:id="id31" text:id="id31" text:style-name="P24"><text:span text:style-name="T25">number = number *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/Zeichenketten (0)</text:span></text:p>
          </draw:text-box>
        </draw:frame>
        <draw:frame draw:name="Inhaltsplatzhalter 8" presentation:style-name="pr2" draw:text-style-name="P4" draw:layer="layout" svg:width="32.993cm" svg:height="14.74cm" svg:x="2.446cm" svg:y="3.703cm" presentation:class="outline" presentation:user-transformed="true">
          <draw:text-box>
            <text:list text:style-name="L2">
              <text:list-item>
                <text:list>
                  <text:list-item>
                    <text:p xml:id="id32" text:id="id32" text:style-name="P16"><text:span text:style-name="T14">Text = Folge von Zeichen („Characters“)</text:span></text:p>
                  </text:list-item>
                  <text:list-item>
                    <text:p xml:id="id33" text:id="id33" text:style-name="P16"><text:span text:style-name="T2">Start und Ende gekennzeichnet mit Anführungszeichen (</text:span><text:span text:style-name="T22">"</text:span><text:span text:style-name="T14"> oder </text:span><text:span text:style-name="T15">'</text:span><text:span text:style-name="T14">)</text:span></text:p>
                    <text:p text:style-name="P16"><text:span text:style-name="T28"/></text:p>
                    <text:p xml:id="id34" text:id="id34" text:style-name="P18"><text:span text:style-name="T16">string = 'Das ist ein String'</text:span></text:p>
                    <text:p xml:id="id35" text:id="id35" text:style-name="P18"><text:span text:style-name="T16">string = "Das ist auch ein String"</text:span></text:p>
                    <text:p xml:id="id36" text:id="id36" text:style-name="P18"><text:span text:style-name="T16">string = '"Python" ist nach "Monty Python" benannt.'</text:span></text:p>
                    <text:p xml:id="id37" text:id="id37" text:style-name="P18"><text:span text:style-name="T25">string = ''</text:span><text:span text:style-name="T16">'Dies ist ein</text:span></text:p>
                    <text:list>
                      <text:list-header>
                        <text:p xml:id="id38" text:id="id38" text:style-name="P18"><text:span text:style-name="T16"><text:s text:c="3"/></text:span><text:span text:style-name="T16"><text:tab/></text:span><text:span text:style-name="T16"><text:tab/></text:span><text:span text:style-name="T16"><text:tab/></text:span><text:span text:style-name="T16">mehrzeiliger </text:span><text:span text:style-name="T25">String''</text:span><text:span text:style-name="T16">'</text:span></text:p>
                      </text:list-header>
                    </text:list>
                    <text:p xml:id="id39" text:id="id39" text:style-name="P18"><text:span text:style-name="T25">string = ""</text:span><text:span text:style-name="T16">"Dies ist auch ein</text:span></text:p>
                    <text:list>
                      <text:list-header>
                        <text:p xml:id="id40" text:id="id40" text:style-name="P18"><text:span text:style-name="T16"><text:s text:c="3"/></text:span><text:span text:style-name="T16"><text:tab/></text:span><text:span text:style-name="T16"><text:tab/></text:span><text:span text:style-name="T16"><text:tab/></text:span><text:span text:style-name="T16">mehrzeiliger </text:span><text:span text:style-name="T25">String"""</text:span></text:p>
                        <text:p text:style-name="P18"><text:span text:style-name="T14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8"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/Zeichenketten (1)</text:span></text:p>
          </draw:text-box>
        </draw:frame>
        <draw:frame draw:name="Inhaltsplatzhalter 8" presentation:style-name="pr7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1" text:id="id41" text:style-name="P16"><text:span text:style-name="T2">Zugriff auf...</text:span></text:p>
                    <text:list>
                      <text:list-item>
                        <text:p xml:id="id42" text:id="id42" text:style-name="P25"><text:span text:style-name="T2">einzelne Zeichen: </text:span><text:span text:style-name="T22">[]</text:span><text:span text:style-name="T20"> </text:span><text:span text:style-name="T25">und</text:span><text:span text:style-name="T20"> Index (0-basiert!)</text:span></text:p>
                        <text:list>
                          <text:list-item>
                            <text:p xml:id="id43" text:id="id43" text:style-name="P26"><text:span text:style-name="T20">Erstes Zeichen = Index 0</text:span></text:p>
                          </text:list-item>
                          <text:list-item>
                            <text:p xml:id="id44" text:id="id44" text:style-name="P26"><text:span text:style-name="T20">Letztes Zeichen = Länge von String - 1</text:span></text:p>
                          </text:list-item>
                        </text:list>
                      </text:list-item>
                      <text:list-item>
                        <text:p xml:id="id45" text:id="id45" text:style-name="P25"><text:span text:style-name="T20">mehrere Zeichen („Slicing“): </text:span><text:span text:style-name="T22">[]</text:span><text:span text:style-name="T20">, </text:span><text:span text:style-name="T22">:</text:span><text:span text:style-name="T25"> </text:span><text:span text:style-name="T20">und Indices</text:span></text:p>
                      </text:list-item>
                      <text:list-item>
                        <text:p xml:id="id46" text:id="id46" text:style-name="P27"><text:span text:style-name="T20">Länge: </text:span><text:span text:style-name="T22">len(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 (2): Zugriff auf Teil-Strings (Slicing)</text:span></text:p>
          </draw:text-box>
        </draw:frame>
        <draw:frame draw:name="Inhaltsplatzhalter 8" presentation:style-name="pr2" draw:text-style-name="P4" draw:layer="layout" svg:width="28.034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7" text:id="id47" text:style-name="P16"><text:span text:style-name="T2">Zugriffsarten</text:span></text:p>
                    <text:list>
                      <text:list-item>
                        <text:p xml:id="id48" text:id="id48" text:style-name="P18"><text:span text:style-name="T22">string[n]</text:span></text:p>
                        <text:p xml:id="id49" text:id="id49" text:style-name="P18"><text:span text:style-name="T2">➡️ </text:span><text:span text:style-name="T22">n</text:span><text:span text:style-name="T2">-tes Zeichen (</text:span><text:span text:style-name="T22">n</text:span><text:span text:style-name="T2"> = Zahl)</text:span></text:p>
                      </text:list-item>
                      <text:list-item>
                        <text:p xml:id="id50" text:id="id50" text:style-name="P18"><text:span text:style-name="T22">string[start:ende]</text:span><text:span text:style-name="T25"> </text:span><text:span text:style-name="T2"><text:s text:c="3"/></text:span></text:p>
                        <text:p xml:id="id51" text:id="id51" text:style-name="P18"><text:span text:style-name="T2">➡️ </text:span><text:span text:style-name="T2">Zeichen von </text:span><text:span text:style-name="T22">start</text:span><text:span text:style-name="T2"> (inklusive) bis </text:span><text:span text:style-name="T22">ende</text:span><text:span text:style-name="T2"> (exklusive)</text:span></text:p>
                      </text:list-item>
                      <text:list-item>
                        <text:p xml:id="id52" text:id="id52" text:style-name="P18"><text:span text:style-name="T22">string[start:ende:schrittweite]</text:span></text:p>
                        <text:p xml:id="id53" text:id="id53" text:style-name="P18"><text:span text:style-name="T2">➡️ </text:span><text:span text:style-name="T2">Zeichen von </text:span><text:span text:style-name="T25">start</text:span><text:span text:style-name="T2"> (inklusive) bis </text:span><text:span text:style-name="T25">ende</text:span><text:span text:style-name="T2"> (exklusive) <text:s text:c="7"/>in Intervall (</text:span><text:span text:style-name="T22">schrittweite</text:span><text:span text:style-name="T25">)</text:span></text:p>
                        <text:p text:style-name="P18"><text:span text:style-name="T14"/></text:p>
                        <text:p text:style-name="P18"><text:span text:style-name="T14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8"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21" draw:layer="layout" svg:width="17.271cm" svg:height="12.572cm" svg:x="2.159cm" svg:y="13.271cm" presentation:class="notes" presentation:user-transformed="true">
            <draw:text-box>
              <text:p text:style-name="P9">Direkt mit beispiel auf Tafel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1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</text:span><text:span text:style-name="MT3">rmat </text:span><text:span text:style-name="MT3">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cken </text:span><text:span text:style-name="MT8">und </text:span><text:span text:style-name="MT8">eine </text:span><text:span text:style-name="MT8"><text:line-break/></text:span><text:span text:style-name="MT8">Übersch</text:span><text:span text:style-name="MT8">rift </text:span><text:span text:style-name="MT8">hinzufüg</text:span><text:span text:style-name="MT8">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n </text:span><text:span text:style-name="MT9">Ruprec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</text:span><text:span text:style-name="MT3">rmat </text:span><text:span text:style-name="MT3">bearbeite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26T12:26:08.984088968</dc:date>
    <meta:editing-cycles>1150</meta:editing-cycles>
    <dc:title>Python Crash Course A</dc:title>
    <meta:editing-duration>P3DT15H28S</meta:editing-duration>
    <meta:generator>LibreOffice/24.2.7.2$Linux_X86_64 LibreOffice_project/420$Build-2</meta:generator>
    <meta:print-date>2019-10-08T16:20:18.516837285</meta:print-date>
    <meta:document-statistic meta:object-count="21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