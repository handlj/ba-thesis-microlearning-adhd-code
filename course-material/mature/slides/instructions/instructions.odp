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738cm" fo:min-width="24.0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537cm" fo:min-width="28.722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8cm" fo:padding-bottom="0.18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6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384cm" fo:min-width="32.9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3cm" fo:min-width="1.694cm" fo:padding-top="0.18cm" fo:padding-bottom="0.18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75cm" fo:min-width="0cm" loext:decorative="false"/>
      <style:paragraph-properties style:writing-mode="lr-tb"/>
    </style:style>
    <style:style style:name="pr1" style:family="presentation" style:parent-style-name="Blank_20_Slide_5f_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51pt" style:font-size-asian="51pt" style:font-size-complex="51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51pt" style:font-size-asian="51pt" style:font-size-complex="5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line-height="150%" fo:text-align="center"/>
    </style:style>
    <style:style style:name="T1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name-asian="DejaVu Sans" style:font-size-asian="51pt" style:font-style-asian="normal" style:font-weight-asian="normal" style:font-name-complex="DejaVu Sans" style:font-size-complex="51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1_5" draw:style-name="gr1" draw:text-style-name="P2" draw:layer="layout" svg:width="24.05cm" svg:height="6.737cm" svg:x="2.446cm" svg:y="3.868cm">
          <text:p text:style-name="P1"><text:span text:style-name="T1">Einführung und Studienabla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2" draw:text-style-name="P3" draw:layer="layout" svg:width="29.221cm" svg:height="0.786cm" svg:x="2.446cm" svg:y="18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2.068cm" svg:height="2.301cm" svg:x="2.328cm" svg:y="11.183cm">
          <draw:text-box>
            <text:p><text:span text:style-name="T2">Lernsession – Grundlegende Konzepte in der Programmiersprache Pyth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2" draw:style-name="gr5" draw:text-style-name="P7" draw:layer="layout" svg:width="32.99cm" svg:height="3.383cm" svg:x="2.446cm" svg:y="0.317cm">
          <text:p text:style-name="P6"><text:span text:style-name="T3">Inhal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7" draw:layer="layout" svg:width="1.693cm" svg:height="1.702cm" svg:x="-0.025cm" svg:y="1.174cm">
          <text:p text:style-name="P8"><text:span text:style-name="T4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8.646cm" svg:height="10.829cm" svg:x="2.293cm" svg:y="5.292cm">
          <draw:text-box>
            <text:list text:style-name="L1">
              <text:list-header>
                <text:p><text:span text:style-name="T5">1. Videos</text:span></text:p>
                <text:list>
                  <text:list-item>
                    <text:p text:style-name="P9"><text:span text:style-name="T2">Eigenes Tempo (Pausieren, Zurück- und Vorspulen)</text:span></text:p>
                  </text:list-item>
                </text:list>
                <text:p text:style-name="P9"><text:span text:style-name="T6"/></text:p>
                <text:p/>
                <text:p/>
                <text:p/>
                <text:p><text:span text:style-name="T5">2. Quizfragen</text:span></text:p>
                <text:list>
                  <text:list-item text:start-value="1">
                    <text:p text:style-name="P9"><text:span text:style-name="T2">Arbeiten sie so sorgfältig wie möglich</text:span></text:p>
                  </text:list-item>
                  <text:list-item>
                    <text:p text:style-name="P9"><text:span text:style-name="T2">Fehler sind in Ordnung, geben Sie einfach Ihr Best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81" draw:style-name="gr8" draw:text-style-name="P11" draw:layer="layout" svg:width="32.99cm" svg:height="3.383cm" svg:x="2.446cm" svg:y="0.317cm">
          <text:p text:style-name="P6"><text:span text:style-name="T3">Hin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12" draw:layer="layout" svg:width="1.693cm" svg:height="1.702cm" svg:x="-0.025cm" svg:y="1.174cm">
          <text:p text:style-name="P8"><text:span text:style-name="T4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8.646cm" svg:height="14.639cm" svg:x="1.657cm" svg:y="3.633cm">
          <draw:text-box>
            <text:list text:style-name="L1">
              <text:list-header>
                <text:p><text:span text:style-name="T7">Empfohlene Arbeitsweise</text:span></text:p>
                <text:list>
                  <text:list-item>
                    <text:p text:style-name="P9"><text:span text:style-name="T8">Ohne (Zeit-) Druck</text:span></text:p>
                  </text:list-item>
                </text:list>
                <text:p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><text:span text:style-name="T9">“</text:span><text:span text:style-name="T9">Verhalten Sie sich so natürlich wie möglich, </text:span></text:p>
                                                    <text:p text:style-name="P13"><text:span text:style-name="T9">als würden Sie dieses Material auf eigene Faust studieren.”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><text:span text:style-name="T7">Bereit?</text:span></text:p>
                <text:list>
                  <text:list-item text:start-value="1">
                    <text:p text:style-name="P9"><text:span text:style-name="T8">Klicken Sie unten auf “</text:span><text:span text:style-name="T10">Weiter</text:span><text:span text:style-name="T8">”, um zu starten!</text:span></text:p>
                  </text:list-item>
                  <text:list-item>
                    <text:p text:style-name="P9"><text:span text:style-name="T8">Die Sitzung führt Sie automatisch durch die nächsten Schritte</text:span></text:p>
                    <text:p text:style-name="P9"><text:span text:style-name="T6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><text:span text:style-name="T5">Viel Erfolg!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2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2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6-04T11:01:07.529522169</dc:date>
    <meta:editing-cycles>1348</meta:editing-cycles>
    <dc:title>Organisatorisches und Motivation</dc:title>
    <meta:editing-duration>P3DT11H12S</meta:editing-duration>
    <meta:generator>LibreOffice/24.2.7.2$Linux_X86_64 LibreOffice_project/420$Build-2</meta:generator>
    <meta:print-date>2024-10-03T15:30:23.604229316</meta:print-date>
    <meta:printed-by>PDF files</meta:printed-by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